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n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Austria</text:p>
          </table:table-cell>
          <table:table-cell office:value-type="string">
            <text:p>France</text:p>
          </table:table-cell>
          <table:table-cell office:value-type="string">
            <text:p>Belgium</text:p>
          </table:table-cell>
          <table:table-cell office:value-type="string">
            <text:p>UnitedKigdom</text:p>
          </table:table-cell>
          <table:table-cell office:value-type="string">
            <text:p>Germany</text:p>
          </table:table-cell>
          <table:table-cell office:value-type="string">
            <text:p>Italy</text:p>
          </table:table-cell>
          <table:table-cell office:value-type="string">
            <text:p>Netherland</text:p>
          </table:table-cell>
          <table:table-cell office:value-type="string">
            <text:p>Swizterland</text:p>
          </table:table-cell>
          <table:table-cell office:value-type="string">
            <text:p>Spain</text:p>
          </table:table-cell>
          <table:table-cell office:value-type="string">
            <text:p>Portugal</text:p>
          </table:table-cell>
          <table:table-cell office:value-type="string">
            <text:p>Greece</text:p>
          </table:table-cell>
          <table:table-cell office:value-type="string">
            <text:p>Ireland</text:p>
          </table:table-cell>
          <table:table-cell office:value-type="string">
            <text:p>Denmark</text:p>
          </table:table-cell>
          <table:table-cell office:value-type="string">
            <text:p>Sweden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float" office:value="8.8">
            <text:p>8,8</text:p>
          </table:table-cell>
          <table:table-cell office:value-type="float" office:value="67">
            <text:p>67</text:p>
          </table:table-cell>
          <table:table-cell office:value-type="float" office:value="11.4">
            <text:p>11,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5">
            <text:p>5</text:p>
          </table:table-cell>
          <table:table-cell office:value-type="float" office:value="5.8">
            <text:p>5,8</text:p>
          </table:table-cell>
          <table:table-cell office:value-type="float" office:value="10.2">
            <text:p>10,2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168.0259131">
            <text:p>168,0259131</text:p>
          </table:table-cell>
          <table:table-cell office:value-type="float" office:value="166.4123227">
            <text:p>166,4123227</text:p>
          </table:table-cell>
          <table:table-cell office:value-type="float" office:value="167.2005018">
            <text:p>167,2005018</text:p>
          </table:table-cell>
          <table:table-cell office:value-type="float" office:value="166.8722859">
            <text:p>166,8722859</text:p>
          </table:table-cell>
          <table:table-cell office:value-type="float" office:value="167.1576279">
            <text:p>167,1576279</text:p>
          </table:table-cell>
          <table:table-cell office:value-type="float" office:value="164.7109285">
            <text:p>164,7109285</text:p>
          </table:table-cell>
          <table:table-cell office:value-type="float" office:value="169.4319209">
            <text:p>169,4319209</text:p>
          </table:table-cell>
          <table:table-cell office:value-type="float" office:value="167.5317823">
            <text:p>167,5317823</text:p>
          </table:table-cell>
          <table:table-cell office:value-type="float" office:value="162.2902593">
            <text:p>162,2902593</text:p>
          </table:table-cell>
          <table:table-cell office:value-type="float" office:value="158.9587779">
            <text:p>158,9587779</text:p>
          </table:table-cell>
          <table:table-cell office:value-type="float" office:value="162.5172116">
            <text:p>162,5172116</text:p>
          </table:table-cell>
          <table:table-cell office:value-type="float" office:value="166.3645843">
            <text:p>166,3645843</text:p>
          </table:table-cell>
          <table:table-cell office:value-type="float" office:value="169.9655954">
            <text:p>169,9655954</text:p>
          </table:table-cell>
          <table:table-cell office:value-type="float" office:value="171.8963521">
            <text:p>171,8963521</text:p>
          </table:table-cell>
          <table:table-cell office:value-type="float" office:value="171.2400832">
            <text:p>171,2400832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168.1631727">
            <text:p>168,1631727</text:p>
          </table:table-cell>
          <table:table-cell office:value-type="float" office:value="166.5037884">
            <text:p>166,5037884</text:p>
          </table:table-cell>
          <table:table-cell office:value-type="float" office:value="167.2963641">
            <text:p>167,2963641</text:p>
          </table:table-cell>
          <table:table-cell office:value-type="float" office:value="166.9968047">
            <text:p>166,9968047</text:p>
          </table:table-cell>
          <table:table-cell office:value-type="float" office:value="167.2979348">
            <text:p>167,2979348</text:p>
          </table:table-cell>
          <table:table-cell office:value-type="float" office:value="164.7700289">
            <text:p>164,7700289</text:p>
          </table:table-cell>
          <table:table-cell office:value-type="float" office:value="169.60885">
            <text:p>169,60885</text:p>
          </table:table-cell>
          <table:table-cell office:value-type="float" office:value="167.6588193">
            <text:p>167,6588193</text:p>
          </table:table-cell>
          <table:table-cell office:value-type="float" office:value="162.3736853">
            <text:p>162,3736853</text:p>
          </table:table-cell>
          <table:table-cell office:value-type="float" office:value="159.0693359">
            <text:p>159,0693359</text:p>
          </table:table-cell>
          <table:table-cell office:value-type="float" office:value="162.6319711">
            <text:p>162,6319711</text:p>
          </table:table-cell>
          <table:table-cell office:value-type="float" office:value="166.4811841">
            <text:p>166,4811841</text:p>
          </table:table-cell>
          <table:table-cell office:value-type="float" office:value="170.0921957">
            <text:p>170,0921957</text:p>
          </table:table-cell>
          <table:table-cell office:value-type="float" office:value="172.0028829">
            <text:p>172,0028829</text:p>
          </table:table-cell>
          <table:table-cell office:value-type="float" office:value="171.3809626">
            <text:p>171,3809626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168.3005384">
            <text:p>168,3005384</text:p>
          </table:table-cell>
          <table:table-cell office:value-type="float" office:value="166.5954723">
            <text:p>166,5954723</text:p>
          </table:table-cell>
          <table:table-cell office:value-type="float" office:value="167.3925989">
            <text:p>167,3925989</text:p>
          </table:table-cell>
          <table:table-cell office:value-type="float" office:value="167.1213332">
            <text:p>167,1213332</text:p>
          </table:table-cell>
          <table:table-cell office:value-type="float" office:value="167.4383483">
            <text:p>167,4383483</text:p>
          </table:table-cell>
          <table:table-cell office:value-type="float" office:value="164.8292298">
            <text:p>164,8292298</text:p>
          </table:table-cell>
          <table:table-cell office:value-type="float" office:value="169.7862777">
            <text:p>169,7862777</text:p>
          </table:table-cell>
          <table:table-cell office:value-type="float" office:value="167.7859786">
            <text:p>167,7859786</text:p>
          </table:table-cell>
          <table:table-cell office:value-type="float" office:value="162.4573722">
            <text:p>162,4573722</text:p>
          </table:table-cell>
          <table:table-cell office:value-type="float" office:value="159.1803704">
            <text:p>159,1803704</text:p>
          </table:table-cell>
          <table:table-cell office:value-type="float" office:value="162.7468188">
            <text:p>162,7468188</text:p>
          </table:table-cell>
          <table:table-cell office:value-type="float" office:value="166.5982112">
            <text:p>166,5982112</text:p>
          </table:table-cell>
          <table:table-cell office:value-type="float" office:value="170.2189786">
            <text:p>170,2189786</text:p>
          </table:table-cell>
          <table:table-cell office:value-type="float" office:value="172.1097899">
            <text:p>172,1097899</text:p>
          </table:table-cell>
          <table:table-cell office:value-type="float" office:value="171.5220685">
            <text:p>171,5220685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168.438014">
            <text:p>168,438014</text:p>
          </table:table-cell>
          <table:table-cell office:value-type="float" office:value="166.6874199">
            <text:p>166,6874199</text:p>
          </table:table-cell>
          <table:table-cell office:value-type="float" office:value="167.4888433">
            <text:p>167,4888433</text:p>
          </table:table-cell>
          <table:table-cell office:value-type="float" office:value="167.2459636">
            <text:p>167,2459636</text:p>
          </table:table-cell>
          <table:table-cell office:value-type="float" office:value="167.5786659">
            <text:p>167,5786659</text:p>
          </table:table-cell>
          <table:table-cell office:value-type="float" office:value="164.8886638">
            <text:p>164,8886638</text:p>
          </table:table-cell>
          <table:table-cell office:value-type="float" office:value="169.9637831">
            <text:p>169,9637831</text:p>
          </table:table-cell>
          <table:table-cell office:value-type="float" office:value="167.9130021">
            <text:p>167,9130021</text:p>
          </table:table-cell>
          <table:table-cell office:value-type="float" office:value="162.5413887">
            <text:p>162,5413887</text:p>
          </table:table-cell>
          <table:table-cell office:value-type="float" office:value="159.291585">
            <text:p>159,291585</text:p>
          </table:table-cell>
          <table:table-cell office:value-type="float" office:value="162.8615706">
            <text:p>162,8615706</text:p>
          </table:table-cell>
          <table:table-cell office:value-type="float" office:value="166.7154558">
            <text:p>166,7154558</text:p>
          </table:table-cell>
          <table:table-cell office:value-type="float" office:value="170.3457263">
            <text:p>170,3457263</text:p>
          </table:table-cell>
          <table:table-cell office:value-type="float" office:value="172.2167036">
            <text:p>172,2167036</text:p>
          </table:table-cell>
          <table:table-cell office:value-type="float" office:value="171.6626672">
            <text:p>171,6626672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68.5751477">
            <text:p>168,5751477</text:p>
          </table:table-cell>
          <table:table-cell office:value-type="float" office:value="166.7792837">
            <text:p>166,7792837</text:p>
          </table:table-cell>
          <table:table-cell office:value-type="float" office:value="167.5846962">
            <text:p>167,5846962</text:p>
          </table:table-cell>
          <table:table-cell office:value-type="float" office:value="167.3705933">
            <text:p>167,3705933</text:p>
          </table:table-cell>
          <table:table-cell office:value-type="float" office:value="167.7189406">
            <text:p>167,7189406</text:p>
          </table:table-cell>
          <table:table-cell office:value-type="float" office:value="164.9481084">
            <text:p>164,9481084</text:p>
          </table:table-cell>
          <table:table-cell office:value-type="float" office:value="170.1410883">
            <text:p>170,1410883</text:p>
          </table:table-cell>
          <table:table-cell office:value-type="float" office:value="168.0396293">
            <text:p>168,0396293</text:p>
          </table:table-cell>
          <table:table-cell office:value-type="float" office:value="162.6253387">
            <text:p>162,6253387</text:p>
          </table:table-cell>
          <table:table-cell office:value-type="float" office:value="159.402769">
            <text:p>159,402769</text:p>
          </table:table-cell>
          <table:table-cell office:value-type="float" office:value="162.9763279">
            <text:p>162,9763279</text:p>
          </table:table-cell>
          <table:table-cell office:value-type="float" office:value="166.8325572">
            <text:p>166,8325572</text:p>
          </table:table-cell>
          <table:table-cell office:value-type="float" office:value="170.4723805">
            <text:p>170,4723805</text:p>
          </table:table-cell>
          <table:table-cell office:value-type="float" office:value="172.3229958">
            <text:p>172,3229958</text:p>
          </table:table-cell>
          <table:table-cell office:value-type="float" office:value="171.8024054">
            <text:p>171,8024054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68.712516">
            <text:p>168,712516</text:p>
          </table:table-cell>
          <table:table-cell office:value-type="float" office:value="166.8722096">
            <text:p>166,8722096</text:p>
          </table:table-cell>
          <table:table-cell office:value-type="float" office:value="167.6812054">
            <text:p>167,6812054</text:p>
          </table:table-cell>
          <table:table-cell office:value-type="float" office:value="167.4958537">
            <text:p>167,4958537</text:p>
          </table:table-cell>
          <table:table-cell office:value-type="float" office:value="167.8599116">
            <text:p>167,8599116</text:p>
          </table:table-cell>
          <table:table-cell office:value-type="float" office:value="165.0083262">
            <text:p>165,0083262</text:p>
          </table:table-cell>
          <table:table-cell office:value-type="float" office:value="170.3191215">
            <text:p>170,3191215</text:p>
          </table:table-cell>
          <table:table-cell office:value-type="float" office:value="168.1669472">
            <text:p>168,1669472</text:p>
          </table:table-cell>
          <table:table-cell office:value-type="float" office:value="162.7100296">
            <text:p>162,7100296</text:p>
          </table:table-cell>
          <table:table-cell office:value-type="float" office:value="159.5150098">
            <text:p>159,5150098</text:p>
          </table:table-cell>
          <table:table-cell office:value-type="float" office:value="163.0920999">
            <text:p>163,0920999</text:p>
          </table:table-cell>
          <table:table-cell office:value-type="float" office:value="166.9503695">
            <text:p>166,9503695</text:p>
          </table:table-cell>
          <table:table-cell office:value-type="float" office:value="170.5996263">
            <text:p>170,5996263</text:p>
          </table:table-cell>
          <table:table-cell office:value-type="float" office:value="172.4297368">
            <text:p>172,4297368</text:p>
          </table:table-cell>
          <table:table-cell office:value-type="float" office:value="171.9425742">
            <text:p>171,9425742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68.850642">
            <text:p>168,850642</text:p>
          </table:table-cell>
          <table:table-cell office:value-type="float" office:value="166.9661303">
            <text:p>166,9661303</text:p>
          </table:table-cell>
          <table:table-cell office:value-type="float" office:value="167.7786474">
            <text:p>167,7786474</text:p>
          </table:table-cell>
          <table:table-cell office:value-type="float" office:value="167.622089">
            <text:p>167,622089</text:p>
          </table:table-cell>
          <table:table-cell office:value-type="float" office:value="168.0013499">
            <text:p>168,0013499</text:p>
          </table:table-cell>
          <table:table-cell office:value-type="float" office:value="165.0696414">
            <text:p>165,0696414</text:p>
          </table:table-cell>
          <table:table-cell office:value-type="float" office:value="170.497781">
            <text:p>170,497781</text:p>
          </table:table-cell>
          <table:table-cell office:value-type="float" office:value="168.2948452">
            <text:p>168,2948452</text:p>
          </table:table-cell>
          <table:table-cell office:value-type="float" office:value="162.7956278">
            <text:p>162,7956278</text:p>
          </table:table-cell>
          <table:table-cell office:value-type="float" office:value="159.628188">
            <text:p>159,628188</text:p>
          </table:table-cell>
          <table:table-cell office:value-type="float" office:value="163.208581">
            <text:p>163,208581</text:p>
          </table:table-cell>
          <table:table-cell office:value-type="float" office:value="167.0694727">
            <text:p>167,0694727</text:p>
          </table:table-cell>
          <table:table-cell office:value-type="float" office:value="170.727647">
            <text:p>170,727647</text:p>
          </table:table-cell>
          <table:table-cell office:value-type="float" office:value="172.5368838">
            <text:p>172,5368838</text:p>
          </table:table-cell>
          <table:table-cell office:value-type="float" office:value="172.0835421">
            <text:p>172,0835421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68.9889796">
            <text:p>168,9889796</text:p>
          </table:table-cell>
          <table:table-cell office:value-type="float" office:value="167.0597944">
            <text:p>167,0597944</text:p>
          </table:table-cell>
          <table:table-cell office:value-type="float" office:value="167.8761848">
            <text:p>167,8761848</text:p>
          </table:table-cell>
          <table:table-cell office:value-type="float" office:value="167.7486543">
            <text:p>167,7486543</text:p>
          </table:table-cell>
          <table:table-cell office:value-type="float" office:value="168.1431979">
            <text:p>168,1431979</text:p>
          </table:table-cell>
          <table:table-cell office:value-type="float" office:value="165.1311505">
            <text:p>165,1311505</text:p>
          </table:table-cell>
          <table:table-cell office:value-type="float" office:value="170.676573">
            <text:p>170,676573</text:p>
          </table:table-cell>
          <table:table-cell office:value-type="float" office:value="168.4232209">
            <text:p>168,4232209</text:p>
          </table:table-cell>
          <table:table-cell office:value-type="float" office:value="162.8816724">
            <text:p>162,8816724</text:p>
          </table:table-cell>
          <table:table-cell office:value-type="float" office:value="159.7410514">
            <text:p>159,7410514</text:p>
          </table:table-cell>
          <table:table-cell office:value-type="float" office:value="163.3252209">
            <text:p>163,3252209</text:p>
          </table:table-cell>
          <table:table-cell office:value-type="float" office:value="167.1889033">
            <text:p>167,1889033</text:p>
          </table:table-cell>
          <table:table-cell office:value-type="float" office:value="170.8559927">
            <text:p>170,8559927</text:p>
          </table:table-cell>
          <table:table-cell office:value-type="float" office:value="172.644193">
            <text:p>172,644193</text:p>
          </table:table-cell>
          <table:table-cell office:value-type="float" office:value="172.2248843">
            <text:p>172,2248843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69.1274203">
            <text:p>169,1274203</text:p>
          </table:table-cell>
          <table:table-cell office:value-type="float" office:value="167.1538037">
            <text:p>167,1538037</text:p>
          </table:table-cell>
          <table:table-cell office:value-type="float" office:value="167.9741394">
            <text:p>167,9741394</text:p>
          </table:table-cell>
          <table:table-cell office:value-type="float" office:value="167.8754744">
            <text:p>167,8754744</text:p>
          </table:table-cell>
          <table:table-cell office:value-type="float" office:value="168.2853215">
            <text:p>168,2853215</text:p>
          </table:table-cell>
          <table:table-cell office:value-type="float" office:value="165.1929809">
            <text:p>165,1929809</text:p>
          </table:table-cell>
          <table:table-cell office:value-type="float" office:value="170.8556292">
            <text:p>170,8556292</text:p>
          </table:table-cell>
          <table:table-cell office:value-type="float" office:value="168.5516217">
            <text:p>168,5516217</text:p>
          </table:table-cell>
          <table:table-cell office:value-type="float" office:value="162.9679757">
            <text:p>162,9679757</text:p>
          </table:table-cell>
          <table:table-cell office:value-type="float" office:value="159.8543015">
            <text:p>159,8543015</text:p>
          </table:table-cell>
          <table:table-cell office:value-type="float" office:value="163.4420937">
            <text:p>163,4420937</text:p>
          </table:table-cell>
          <table:table-cell office:value-type="float" office:value="167.3088168">
            <text:p>167,3088168</text:p>
          </table:table-cell>
          <table:table-cell office:value-type="float" office:value="170.9847987">
            <text:p>170,9847987</text:p>
          </table:table-cell>
          <table:table-cell office:value-type="float" office:value="172.7515452">
            <text:p>172,7515452</text:p>
          </table:table-cell>
          <table:table-cell office:value-type="float" office:value="172.3666117">
            <text:p>172,3666117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69.26611">
            <text:p>169,26611</text:p>
          </table:table-cell>
          <table:table-cell office:value-type="float" office:value="167.2484563">
            <text:p>167,2484563</text:p>
          </table:table-cell>
          <table:table-cell office:value-type="float" office:value="168.0726877">
            <text:p>168,0726877</text:p>
          </table:table-cell>
          <table:table-cell office:value-type="float" office:value="168.002204">
            <text:p>168,002204</text:p>
          </table:table-cell>
          <table:table-cell office:value-type="float" office:value="168.4279935">
            <text:p>168,4279935</text:p>
          </table:table-cell>
          <table:table-cell office:value-type="float" office:value="165.2557494">
            <text:p>165,2557494</text:p>
          </table:table-cell>
          <table:table-cell office:value-type="float" office:value="171.0351845">
            <text:p>171,0351845</text:p>
          </table:table-cell>
          <table:table-cell office:value-type="float" office:value="168.6804245">
            <text:p>168,6804245</text:p>
          </table:table-cell>
          <table:table-cell office:value-type="float" office:value="163.0546028">
            <text:p>163,0546028</text:p>
          </table:table-cell>
          <table:table-cell office:value-type="float" office:value="159.9683845">
            <text:p>159,9683845</text:p>
          </table:table-cell>
          <table:table-cell office:value-type="float" office:value="163.5599562">
            <text:p>163,5599562</text:p>
          </table:table-cell>
          <table:table-cell office:value-type="float" office:value="167.4286678">
            <text:p>167,4286678</text:p>
          </table:table-cell>
          <table:table-cell office:value-type="float" office:value="171.1139847">
            <text:p>171,1139847</text:p>
          </table:table-cell>
          <table:table-cell office:value-type="float" office:value="172.8591353">
            <text:p>172,8591353</text:p>
          </table:table-cell>
          <table:table-cell office:value-type="float" office:value="172.5089835">
            <text:p>172,5089835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69.4041225">
            <text:p>169,4041225</text:p>
          </table:table-cell>
          <table:table-cell office:value-type="float" office:value="167.3439861">
            <text:p>167,3439861</text:p>
          </table:table-cell>
          <table:table-cell office:value-type="float" office:value="168.1709234">
            <text:p>168,1709234</text:p>
          </table:table-cell>
          <table:table-cell office:value-type="float" office:value="168.1285933">
            <text:p>168,1285933</text:p>
          </table:table-cell>
          <table:table-cell office:value-type="float" office:value="168.5704904">
            <text:p>168,5704904</text:p>
          </table:table-cell>
          <table:table-cell office:value-type="float" office:value="165.3202608">
            <text:p>165,3202608</text:p>
          </table:table-cell>
          <table:table-cell office:value-type="float" office:value="171.2139362">
            <text:p>171,2139362</text:p>
          </table:table-cell>
          <table:table-cell office:value-type="float" office:value="168.8086331">
            <text:p>168,8086331</text:p>
          </table:table-cell>
          <table:table-cell office:value-type="float" office:value="163.1421541">
            <text:p>163,1421541</text:p>
          </table:table-cell>
          <table:table-cell office:value-type="float" office:value="160.0833934">
            <text:p>160,0833934</text:p>
          </table:table-cell>
          <table:table-cell office:value-type="float" office:value="163.6789576">
            <text:p>163,6789576</text:p>
          </table:table-cell>
          <table:table-cell office:value-type="float" office:value="167.5481851">
            <text:p>167,5481851</text:p>
          </table:table-cell>
          <table:table-cell office:value-type="float" office:value="171.243348">
            <text:p>171,243348</text:p>
          </table:table-cell>
          <table:table-cell office:value-type="float" office:value="172.965855">
            <text:p>172,965855</text:p>
          </table:table-cell>
          <table:table-cell office:value-type="float" office:value="172.6510997">
            <text:p>172,6510997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69.5426259">
            <text:p>169,5426259</text:p>
          </table:table-cell>
          <table:table-cell office:value-type="float" office:value="167.4409725">
            <text:p>167,4409725</text:p>
          </table:table-cell>
          <table:table-cell office:value-type="float" office:value="168.2701916">
            <text:p>168,2701916</text:p>
          </table:table-cell>
          <table:table-cell office:value-type="float" office:value="168.2553241">
            <text:p>168,2553241</text:p>
          </table:table-cell>
          <table:table-cell office:value-type="float" office:value="168.7140661">
            <text:p>168,7140661</text:p>
          </table:table-cell>
          <table:table-cell office:value-type="float" office:value="165.3870815">
            <text:p>165,3870815</text:p>
          </table:table-cell>
          <table:table-cell office:value-type="float" office:value="171.3933455">
            <text:p>171,3933455</text:p>
          </table:table-cell>
          <table:table-cell office:value-type="float" office:value="168.9373039">
            <text:p>168,9373039</text:p>
          </table:table-cell>
          <table:table-cell office:value-type="float" office:value="163.2312943">
            <text:p>163,2312943</text:p>
          </table:table-cell>
          <table:table-cell office:value-type="float" office:value="160.1999543">
            <text:p>160,1999543</text:p>
          </table:table-cell>
          <table:table-cell office:value-type="float" office:value="163.799676">
            <text:p>163,799676</text:p>
          </table:table-cell>
          <table:table-cell office:value-type="float" office:value="167.6682055">
            <text:p>167,6682055</text:p>
          </table:table-cell>
          <table:table-cell office:value-type="float" office:value="171.3733297">
            <text:p>171,3733297</text:p>
          </table:table-cell>
          <table:table-cell office:value-type="float" office:value="173.0732455">
            <text:p>173,0732455</text:p>
          </table:table-cell>
          <table:table-cell office:value-type="float" office:value="172.7940666">
            <text:p>172,7940666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69.6826497">
            <text:p>169,6826497</text:p>
          </table:table-cell>
          <table:table-cell office:value-type="float" office:value="167.541165">
            <text:p>167,541165</text:p>
          </table:table-cell>
          <table:table-cell office:value-type="float" office:value="168.3714332">
            <text:p>168,3714332</text:p>
          </table:table-cell>
          <table:table-cell office:value-type="float" office:value="168.3843185">
            <text:p>168,3843185</text:p>
          </table:table-cell>
          <table:table-cell office:value-type="float" office:value="168.8593126">
            <text:p>168,8593126</text:p>
          </table:table-cell>
          <table:table-cell office:value-type="float" office:value="165.4583541">
            <text:p>165,4583541</text:p>
          </table:table-cell>
          <table:table-cell office:value-type="float" office:value="171.5746374">
            <text:p>171,5746374</text:p>
          </table:table-cell>
          <table:table-cell office:value-type="float" office:value="169.0673603">
            <text:p>169,0673603</text:p>
          </table:table-cell>
          <table:table-cell office:value-type="float" office:value="163.3235493">
            <text:p>163,3235493</text:p>
          </table:table-cell>
          <table:table-cell office:value-type="float" office:value="160.3196246">
            <text:p>160,3196246</text:p>
          </table:table-cell>
          <table:table-cell office:value-type="float" office:value="163.9238906">
            <text:p>163,9238906</text:p>
          </table:table-cell>
          <table:table-cell office:value-type="float" office:value="167.7904967">
            <text:p>167,7904967</text:p>
          </table:table-cell>
          <table:table-cell office:value-type="float" office:value="171.5048742">
            <text:p>171,5048742</text:p>
          </table:table-cell>
          <table:table-cell office:value-type="float" office:value="173.1823002">
            <text:p>173,1823002</text:p>
          </table:table-cell>
          <table:table-cell office:value-type="float" office:value="172.9389266">
            <text:p>172,9389266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69.8247019">
            <text:p>169,8247019</text:p>
          </table:table-cell>
          <table:table-cell office:value-type="float" office:value="167.6451367">
            <text:p>167,6451367</text:p>
          </table:table-cell>
          <table:table-cell office:value-type="float" office:value="168.4750553">
            <text:p>168,4750553</text:p>
          </table:table-cell>
          <table:table-cell office:value-type="float" office:value="168.5155536">
            <text:p>168,5155536</text:p>
          </table:table-cell>
          <table:table-cell office:value-type="float" office:value="169.0069266">
            <text:p>169,0069266</text:p>
          </table:table-cell>
          <table:table-cell office:value-type="float" office:value="165.5348621">
            <text:p>165,5348621</text:p>
          </table:table-cell>
          <table:table-cell office:value-type="float" office:value="171.7582105">
            <text:p>171,7582105</text:p>
          </table:table-cell>
          <table:table-cell office:value-type="float" office:value="169.1993425">
            <text:p>169,1993425</text:p>
          </table:table-cell>
          <table:table-cell office:value-type="float" office:value="163.4194421">
            <text:p>163,4194421</text:p>
          </table:table-cell>
          <table:table-cell office:value-type="float" office:value="160.4428682">
            <text:p>160,4428682</text:p>
          </table:table-cell>
          <table:table-cell office:value-type="float" office:value="164.0520832">
            <text:p>164,0520832</text:p>
          </table:table-cell>
          <table:table-cell office:value-type="float" office:value="167.9155484">
            <text:p>167,9155484</text:p>
          </table:table-cell>
          <table:table-cell office:value-type="float" office:value="171.6384003">
            <text:p>171,6384003</text:p>
          </table:table-cell>
          <table:table-cell office:value-type="float" office:value="173.2929309">
            <text:p>173,2929309</text:p>
          </table:table-cell>
          <table:table-cell office:value-type="float" office:value="173.0860542">
            <text:p>173,0860542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69.9698909">
            <text:p>169,9698909</text:p>
          </table:table-cell>
          <table:table-cell office:value-type="float" office:value="167.7537086">
            <text:p>167,7537086</text:p>
          </table:table-cell>
          <table:table-cell office:value-type="float" office:value="168.5821986">
            <text:p>168,5821986</text:p>
          </table:table-cell>
          <table:table-cell office:value-type="float" office:value="168.6509493">
            <text:p>168,6509493</text:p>
          </table:table-cell>
          <table:table-cell office:value-type="float" office:value="169.1578626">
            <text:p>169,1578626</text:p>
          </table:table-cell>
          <table:table-cell office:value-type="float" office:value="165.6180948">
            <text:p>165,6180948</text:p>
          </table:table-cell>
          <table:table-cell office:value-type="float" office:value="171.9452313">
            <text:p>171,9452313</text:p>
          </table:table-cell>
          <table:table-cell office:value-type="float" office:value="169.3346572">
            <text:p>169,3346572</text:p>
          </table:table-cell>
          <table:table-cell office:value-type="float" office:value="163.5200752">
            <text:p>163,5200752</text:p>
          </table:table-cell>
          <table:table-cell office:value-type="float" office:value="160.5713578">
            <text:p>160,5713578</text:p>
          </table:table-cell>
          <table:table-cell office:value-type="float" office:value="164.1853766">
            <text:p>164,1853766</text:p>
          </table:table-cell>
          <table:table-cell office:value-type="float" office:value="168.0442737">
            <text:p>168,0442737</text:p>
          </table:table-cell>
          <table:table-cell office:value-type="float" office:value="171.7750636">
            <text:p>171,7750636</text:p>
          </table:table-cell>
          <table:table-cell office:value-type="float" office:value="173.4061959">
            <text:p>173,4061959</text:p>
          </table:table-cell>
          <table:table-cell office:value-type="float" office:value="173.2365482">
            <text:p>173,2365482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70.1198542">
            <text:p>170,1198542</text:p>
          </table:table-cell>
          <table:table-cell office:value-type="float" office:value="167.8686388">
            <text:p>167,8686388</text:p>
          </table:table-cell>
          <table:table-cell office:value-type="float" office:value="168.6947979">
            <text:p>168,6947979</text:p>
          </table:table-cell>
          <table:table-cell office:value-type="float" office:value="168.793378">
            <text:p>168,793378</text:p>
          </table:table-cell>
          <table:table-cell office:value-type="float" office:value="169.3137926">
            <text:p>169,3137926</text:p>
          </table:table-cell>
          <table:table-cell office:value-type="float" office:value="165.7097919">
            <text:p>165,7097919</text:p>
          </table:table-cell>
          <table:table-cell office:value-type="float" office:value="172.1371187">
            <text:p>172,1371187</text:p>
          </table:table-cell>
          <table:table-cell office:value-type="float" office:value="169.4747618">
            <text:p>169,4747618</text:p>
          </table:table-cell>
          <table:table-cell office:value-type="float" office:value="163.6271773">
            <text:p>163,6271773</text:p>
          </table:table-cell>
          <table:table-cell office:value-type="float" office:value="160.7068596">
            <text:p>160,7068596</text:p>
          </table:table-cell>
          <table:table-cell office:value-type="float" office:value="164.3254521">
            <text:p>164,3254521</text:p>
          </table:table-cell>
          <table:table-cell office:value-type="float" office:value="168.178953">
            <text:p>168,178953</text:p>
          </table:table-cell>
          <table:table-cell office:value-type="float" office:value="171.9166583">
            <text:p>171,9166583</text:p>
          </table:table-cell>
          <table:table-cell office:value-type="float" office:value="173.5239113">
            <text:p>173,5239113</text:p>
          </table:table-cell>
          <table:table-cell office:value-type="float" office:value="173.3923135">
            <text:p>173,3923135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70.274784">
            <text:p>170,274784</text:p>
          </table:table-cell>
          <table:table-cell office:value-type="float" office:value="167.9916771">
            <text:p>167,9916771</text:p>
          </table:table-cell>
          <table:table-cell office:value-type="float" office:value="168.8133382">
            <text:p>168,8133382</text:p>
          </table:table-cell>
          <table:table-cell office:value-type="float" office:value="168.9451394">
            <text:p>168,9451394</text:p>
          </table:table-cell>
          <table:table-cell office:value-type="float" office:value="169.4754649">
            <text:p>169,4754649</text:p>
          </table:table-cell>
          <table:table-cell office:value-type="float" office:value="165.8118692">
            <text:p>165,8118692</text:p>
          </table:table-cell>
          <table:table-cell office:value-type="float" office:value="172.334295">
            <text:p>172,334295</text:p>
          </table:table-cell>
          <table:table-cell office:value-type="float" office:value="169.6204977">
            <text:p>169,6204977</text:p>
          </table:table-cell>
          <table:table-cell office:value-type="float" office:value="163.7426559">
            <text:p>163,7426559</text:p>
          </table:table-cell>
          <table:table-cell office:value-type="float" office:value="160.8504206">
            <text:p>160,8504206</text:p>
          </table:table-cell>
          <table:table-cell office:value-type="float" office:value="164.4742436">
            <text:p>164,4742436</text:p>
          </table:table-cell>
          <table:table-cell office:value-type="float" office:value="168.3211493">
            <text:p>168,3211493</text:p>
          </table:table-cell>
          <table:table-cell office:value-type="float" office:value="172.0638498">
            <text:p>172,0638498</text:p>
          </table:table-cell>
          <table:table-cell office:value-type="float" office:value="173.6463472">
            <text:p>173,6463472</text:p>
          </table:table-cell>
          <table:table-cell office:value-type="float" office:value="173.554054">
            <text:p>173,554054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70.434075">
            <text:p>170,434075</text:p>
          </table:table-cell>
          <table:table-cell office:value-type="float" office:value="168.1222281">
            <text:p>168,1222281</text:p>
          </table:table-cell>
          <table:table-cell office:value-type="float" office:value="168.9368432">
            <text:p>168,9368432</text:p>
          </table:table-cell>
          <table:table-cell office:value-type="float" office:value="169.1059444">
            <text:p>169,1059444</text:p>
          </table:table-cell>
          <table:table-cell office:value-type="float" office:value="169.6423783">
            <text:p>169,6423783</text:p>
          </table:table-cell>
          <table:table-cell office:value-type="float" office:value="165.923701">
            <text:p>165,923701</text:p>
          </table:table-cell>
          <table:table-cell office:value-type="float" office:value="172.5362183">
            <text:p>172,5362183</text:p>
          </table:table-cell>
          <table:table-cell office:value-type="float" office:value="169.7705391">
            <text:p>169,7705391</text:p>
          </table:table-cell>
          <table:table-cell office:value-type="float" office:value="163.8657714">
            <text:p>163,8657714</text:p>
          </table:table-cell>
          <table:table-cell office:value-type="float" office:value="161.0017562">
            <text:p>161,0017562</text:p>
          </table:table-cell>
          <table:table-cell office:value-type="float" office:value="164.6308095">
            <text:p>164,6308095</text:p>
          </table:table-cell>
          <table:table-cell office:value-type="float" office:value="168.4706484">
            <text:p>168,4706484</text:p>
          </table:table-cell>
          <table:table-cell office:value-type="float" office:value="172.215841">
            <text:p>172,215841</text:p>
          </table:table-cell>
          <table:table-cell office:value-type="float" office:value="173.7723561">
            <text:p>173,7723561</text:p>
          </table:table-cell>
          <table:table-cell office:value-type="float" office:value="173.720508">
            <text:p>173,720508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70.5970126">
            <text:p>170,5970126</text:p>
          </table:table-cell>
          <table:table-cell office:value-type="float" office:value="168.2594079">
            <text:p>168,2594079</text:p>
          </table:table-cell>
          <table:table-cell office:value-type="float" office:value="169.0648989">
            <text:p>169,0648989</text:p>
          </table:table-cell>
          <table:table-cell office:value-type="float" office:value="169.2755072">
            <text:p>169,2755072</text:p>
          </table:table-cell>
          <table:table-cell office:value-type="float" office:value="169.8135116">
            <text:p>169,8135116</text:p>
          </table:table-cell>
          <table:table-cell office:value-type="float" office:value="166.0455425">
            <text:p>166,0455425</text:p>
          </table:table-cell>
          <table:table-cell office:value-type="float" office:value="172.7415277">
            <text:p>172,7415277</text:p>
          </table:table-cell>
          <table:table-cell office:value-type="float" office:value="169.9238897">
            <text:p>169,9238897</text:p>
          </table:table-cell>
          <table:table-cell office:value-type="float" office:value="163.9960369">
            <text:p>163,9960369</text:p>
          </table:table-cell>
          <table:table-cell office:value-type="float" office:value="161.1606423">
            <text:p>161,1606423</text:p>
          </table:table-cell>
          <table:table-cell office:value-type="float" office:value="164.7949145">
            <text:p>164,7949145</text:p>
          </table:table-cell>
          <table:table-cell office:value-type="float" office:value="168.6267585">
            <text:p>168,6267585</text:p>
          </table:table-cell>
          <table:table-cell office:value-type="float" office:value="172.3714529">
            <text:p>172,3714529</text:p>
          </table:table-cell>
          <table:table-cell office:value-type="float" office:value="173.9007398">
            <text:p>173,9007398</text:p>
          </table:table-cell>
          <table:table-cell office:value-type="float" office:value="173.8900338">
            <text:p>173,8900338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70.7621007">
            <text:p>170,7621007</text:p>
          </table:table-cell>
          <table:table-cell office:value-type="float" office:value="168.4028693">
            <text:p>168,4028693</text:p>
          </table:table-cell>
          <table:table-cell office:value-type="float" office:value="169.1962705">
            <text:p>169,1962705</text:p>
          </table:table-cell>
          <table:table-cell office:value-type="float" office:value="169.4524768">
            <text:p>169,4524768</text:p>
          </table:table-cell>
          <table:table-cell office:value-type="float" office:value="169.987298">
            <text:p>169,987298</text:p>
          </table:table-cell>
          <table:table-cell office:value-type="float" office:value="166.1766643">
            <text:p>166,1766643</text:p>
          </table:table-cell>
          <table:table-cell office:value-type="float" office:value="172.9490452">
            <text:p>172,9490452</text:p>
          </table:table-cell>
          <table:table-cell office:value-type="float" office:value="170.0789638">
            <text:p>170,0789638</text:p>
          </table:table-cell>
          <table:table-cell office:value-type="float" office:value="164.1326989">
            <text:p>164,1326989</text:p>
          </table:table-cell>
          <table:table-cell office:value-type="float" office:value="161.3261822">
            <text:p>161,3261822</text:p>
          </table:table-cell>
          <table:table-cell office:value-type="float" office:value="164.9660477">
            <text:p>164,9660477</text:p>
          </table:table-cell>
          <table:table-cell office:value-type="float" office:value="168.7886005">
            <text:p>168,7886005</text:p>
          </table:table-cell>
          <table:table-cell office:value-type="float" office:value="172.5296656">
            <text:p>172,5296656</text:p>
          </table:table-cell>
          <table:table-cell office:value-type="float" office:value="174.0302131">
            <text:p>174,0302131</text:p>
          </table:table-cell>
          <table:table-cell office:value-type="float" office:value="174.0605283">
            <text:p>174,0605283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70.9274155">
            <text:p>170,9274155</text:p>
          </table:table-cell>
          <table:table-cell office:value-type="float" office:value="168.5518999">
            <text:p>168,5518999</text:p>
          </table:table-cell>
          <table:table-cell office:value-type="float" office:value="169.3290195">
            <text:p>169,3290195</text:p>
          </table:table-cell>
          <table:table-cell office:value-type="float" office:value="169.6353482">
            <text:p>169,6353482</text:p>
          </table:table-cell>
          <table:table-cell office:value-type="float" office:value="170.1619312">
            <text:p>170,1619312</text:p>
          </table:table-cell>
          <table:table-cell office:value-type="float" office:value="166.3159061">
            <text:p>166,3159061</text:p>
          </table:table-cell>
          <table:table-cell office:value-type="float" office:value="173.1563177">
            <text:p>173,1563177</text:p>
          </table:table-cell>
          <table:table-cell office:value-type="float" office:value="170.2338263">
            <text:p>170,2338263</text:p>
          </table:table-cell>
          <table:table-cell office:value-type="float" office:value="164.2750511">
            <text:p>164,2750511</text:p>
          </table:table-cell>
          <table:table-cell office:value-type="float" office:value="161.4971043">
            <text:p>161,4971043</text:p>
          </table:table-cell>
          <table:table-cell office:value-type="float" office:value="165.143177">
            <text:p>165,143177</text:p>
          </table:table-cell>
          <table:table-cell office:value-type="float" office:value="168.9550353">
            <text:p>168,9550353</text:p>
          </table:table-cell>
          <table:table-cell office:value-type="float" office:value="172.6883921">
            <text:p>172,6883921</text:p>
          </table:table-cell>
          <table:table-cell office:value-type="float" office:value="174.1586936">
            <text:p>174,1586936</text:p>
          </table:table-cell>
          <table:table-cell office:value-type="float" office:value="174.2295152">
            <text:p>174,2295152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71.0914304">
            <text:p>171,0914304</text:p>
          </table:table-cell>
          <table:table-cell office:value-type="float" office:value="168.7060244">
            <text:p>168,7060244</text:p>
          </table:table-cell>
          <table:table-cell office:value-type="float" office:value="169.4620078">
            <text:p>169,4620078</text:p>
          </table:table-cell>
          <table:table-cell office:value-type="float" office:value="169.8232346">
            <text:p>169,8232346</text:p>
          </table:table-cell>
          <table:table-cell office:value-type="float" office:value="170.3360673">
            <text:p>170,3360673</text:p>
          </table:table-cell>
          <table:table-cell office:value-type="float" office:value="166.4627601">
            <text:p>166,4627601</text:p>
          </table:table-cell>
          <table:table-cell office:value-type="float" office:value="173.3615805">
            <text:p>173,3615805</text:p>
          </table:table-cell>
          <table:table-cell office:value-type="float" office:value="170.3869523">
            <text:p>170,3869523</text:p>
          </table:table-cell>
          <table:table-cell office:value-type="float" office:value="164.4229439">
            <text:p>164,4229439</text:p>
          </table:table-cell>
          <table:table-cell office:value-type="float" office:value="161.6735083">
            <text:p>161,6735083</text:p>
          </table:table-cell>
          <table:table-cell office:value-type="float" office:value="165.3256554">
            <text:p>165,3256554</text:p>
          </table:table-cell>
          <table:table-cell office:value-type="float" office:value="169.1250127">
            <text:p>169,1250127</text:p>
          </table:table-cell>
          <table:table-cell office:value-type="float" office:value="172.8462691">
            <text:p>172,8462691</text:p>
          </table:table-cell>
          <table:table-cell office:value-type="float" office:value="174.2849179">
            <text:p>174,2849179</text:p>
          </table:table-cell>
          <table:table-cell office:value-type="float" office:value="174.3951524">
            <text:p>174,3951524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71.2527572">
            <text:p>171,2527572</text:p>
          </table:table-cell>
          <table:table-cell office:value-type="float" office:value="168.8642688">
            <text:p>168,8642688</text:p>
          </table:table-cell>
          <table:table-cell office:value-type="float" office:value="169.5939385">
            <text:p>169,5939385</text:p>
          </table:table-cell>
          <table:table-cell office:value-type="float" office:value="170.0151179">
            <text:p>170,0151179</text:p>
          </table:table-cell>
          <table:table-cell office:value-type="float" office:value="170.5083359">
            <text:p>170,5083359</text:p>
          </table:table-cell>
          <table:table-cell office:value-type="float" office:value="166.6160151">
            <text:p>166,6160151</text:p>
          </table:table-cell>
          <table:table-cell office:value-type="float" office:value="173.5635289">
            <text:p>173,5635289</text:p>
          </table:table-cell>
          <table:table-cell office:value-type="float" office:value="170.5370986">
            <text:p>170,5370986</text:p>
          </table:table-cell>
          <table:table-cell office:value-type="float" office:value="164.5752406">
            <text:p>164,5752406</text:p>
          </table:table-cell>
          <table:table-cell office:value-type="float" office:value="161.8547716">
            <text:p>161,8547716</text:p>
          </table:table-cell>
          <table:table-cell office:value-type="float" office:value="165.5134511">
            <text:p>165,5134511</text:p>
          </table:table-cell>
          <table:table-cell office:value-type="float" office:value="169.2980039">
            <text:p>169,2980039</text:p>
          </table:table-cell>
          <table:table-cell office:value-type="float" office:value="173.0021483">
            <text:p>173,0021483</text:p>
          </table:table-cell>
          <table:table-cell office:value-type="float" office:value="174.4078253">
            <text:p>174,4078253</text:p>
          </table:table-cell>
          <table:table-cell office:value-type="float" office:value="174.5553846">
            <text:p>174,5553846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71.4101431">
            <text:p>171,4101431</text:p>
          </table:table-cell>
          <table:table-cell office:value-type="float" office:value="169.0253284">
            <text:p>169,0253284</text:p>
          </table:table-cell>
          <table:table-cell office:value-type="float" office:value="169.7232918">
            <text:p>169,7232918</text:p>
          </table:table-cell>
          <table:table-cell office:value-type="float" office:value="170.2086787">
            <text:p>170,2086787</text:p>
          </table:table-cell>
          <table:table-cell office:value-type="float" office:value="170.6778884">
            <text:p>170,6778884</text:p>
          </table:table-cell>
          <table:table-cell office:value-type="float" office:value="166.7738249">
            <text:p>166,7738249</text:p>
          </table:table-cell>
          <table:table-cell office:value-type="float" office:value="173.7606182">
            <text:p>173,7606182</text:p>
          </table:table-cell>
          <table:table-cell office:value-type="float" office:value="170.6828584">
            <text:p>170,6828584</text:p>
          </table:table-cell>
          <table:table-cell office:value-type="float" office:value="164.7308904">
            <text:p>164,7308904</text:p>
          </table:table-cell>
          <table:table-cell office:value-type="float" office:value="162.0394118">
            <text:p>162,0394118</text:p>
          </table:table-cell>
          <table:table-cell office:value-type="float" office:value="165.7047409">
            <text:p>165,7047409</text:p>
          </table:table-cell>
          <table:table-cell office:value-type="float" office:value="169.4722294">
            <text:p>169,4722294</text:p>
          </table:table-cell>
          <table:table-cell office:value-type="float" office:value="173.154956">
            <text:p>173,154956</text:p>
          </table:table-cell>
          <table:table-cell office:value-type="float" office:value="174.526197">
            <text:p>174,526197</text:p>
          </table:table-cell>
          <table:table-cell office:value-type="float" office:value="174.7095716">
            <text:p>174,7095716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71.5635831">
            <text:p>171,5635831</text:p>
          </table:table-cell>
          <table:table-cell office:value-type="float" office:value="169.188397">
            <text:p>169,188397</text:p>
          </table:table-cell>
          <table:table-cell office:value-type="float" office:value="169.8501428">
            <text:p>169,8501428</text:p>
          </table:table-cell>
          <table:table-cell office:value-type="float" office:value="170.4041876">
            <text:p>170,4041876</text:p>
          </table:table-cell>
          <table:table-cell office:value-type="float" office:value="170.844847">
            <text:p>170,844847</text:p>
          </table:table-cell>
          <table:table-cell office:value-type="float" office:value="166.9354384">
            <text:p>166,9354384</text:p>
          </table:table-cell>
          <table:table-cell office:value-type="float" office:value="173.9531246">
            <text:p>173,9531246</text:p>
          </table:table-cell>
          <table:table-cell office:value-type="float" office:value="170.8239234">
            <text:p>170,8239234</text:p>
          </table:table-cell>
          <table:table-cell office:value-type="float" office:value="164.8895">
            <text:p>164,8895</text:p>
          </table:table-cell>
          <table:table-cell office:value-type="float" office:value="162.2268779">
            <text:p>162,2268779</text:p>
          </table:table-cell>
          <table:table-cell office:value-type="float" office:value="165.8991">
            <text:p>165,8991</text:p>
          </table:table-cell>
          <table:table-cell office:value-type="float" office:value="169.6478511">
            <text:p>169,6478511</text:p>
          </table:table-cell>
          <table:table-cell office:value-type="float" office:value="173.3041901">
            <text:p>173,3041901</text:p>
          </table:table-cell>
          <table:table-cell office:value-type="float" office:value="174.6402149">
            <text:p>174,6402149</text:p>
          </table:table-cell>
          <table:table-cell office:value-type="float" office:value="174.8574138">
            <text:p>174,8574138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71.7132428">
            <text:p>171,7132428</text:p>
          </table:table-cell>
          <table:table-cell office:value-type="float" office:value="169.3530696">
            <text:p>169,3530696</text:p>
          </table:table-cell>
          <table:table-cell office:value-type="float" office:value="169.9740072">
            <text:p>169,9740072</text:p>
          </table:table-cell>
          <table:table-cell office:value-type="float" office:value="170.6010512">
            <text:p>170,6010512</text:p>
          </table:table-cell>
          <table:table-cell office:value-type="float" office:value="171.008907">
            <text:p>171,008907</text:p>
          </table:table-cell>
          <table:table-cell office:value-type="float" office:value="167.0995392">
            <text:p>167,0995392</text:p>
          </table:table-cell>
          <table:table-cell office:value-type="float" office:value="174.1400803">
            <text:p>174,1400803</text:p>
          </table:table-cell>
          <table:table-cell office:value-type="float" office:value="170.9597547">
            <text:p>170,9597547</text:p>
          </table:table-cell>
          <table:table-cell office:value-type="float" office:value="165.0506903">
            <text:p>165,0506903</text:p>
          </table:table-cell>
          <table:table-cell office:value-type="float" office:value="162.4167339">
            <text:p>162,4167339</text:p>
          </table:table-cell>
          <table:table-cell office:value-type="float" office:value="166.0960779">
            <text:p>166,0960779</text:p>
          </table:table-cell>
          <table:table-cell office:value-type="float" office:value="169.8245746">
            <text:p>169,8245746</text:p>
          </table:table-cell>
          <table:table-cell office:value-type="float" office:value="173.4497057">
            <text:p>173,4497057</text:p>
          </table:table-cell>
          <table:table-cell office:value-type="float" office:value="174.7491868">
            <text:p>174,7491868</text:p>
          </table:table-cell>
          <table:table-cell office:value-type="float" office:value="174.9991371">
            <text:p>174,9991371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71.8578725">
            <text:p>171,8578725</text:p>
          </table:table-cell>
          <table:table-cell office:value-type="float" office:value="169.5176503">
            <text:p>169,5176503</text:p>
          </table:table-cell>
          <table:table-cell office:value-type="float" office:value="170.0945043">
            <text:p>170,0945043</text:p>
          </table:table-cell>
          <table:table-cell office:value-type="float" office:value="170.7991602">
            <text:p>170,7991602</text:p>
          </table:table-cell>
          <table:table-cell office:value-type="float" office:value="171.1696264">
            <text:p>171,1696264</text:p>
          </table:table-cell>
          <table:table-cell office:value-type="float" office:value="167.2631997">
            <text:p>167,2631997</text:p>
          </table:table-cell>
          <table:table-cell office:value-type="float" office:value="174.3209944">
            <text:p>174,3209944</text:p>
          </table:table-cell>
          <table:table-cell office:value-type="float" office:value="171.0896222">
            <text:p>171,0896222</text:p>
          </table:table-cell>
          <table:table-cell office:value-type="float" office:value="165.2119743">
            <text:p>165,2119743</text:p>
          </table:table-cell>
          <table:table-cell office:value-type="float" office:value="162.6070691">
            <text:p>162,6070691</text:p>
          </table:table-cell>
          <table:table-cell office:value-type="float" office:value="166.2934938">
            <text:p>166,2934938</text:p>
          </table:table-cell>
          <table:table-cell office:value-type="float" office:value="170.0020245">
            <text:p>170,0020245</text:p>
          </table:table-cell>
          <table:table-cell office:value-type="float" office:value="173.5910316">
            <text:p>173,5910316</text:p>
          </table:table-cell>
          <table:table-cell office:value-type="float" office:value="174.8529829">
            <text:p>174,8529829</text:p>
          </table:table-cell>
          <table:table-cell office:value-type="float" office:value="175.1343133">
            <text:p>175,1343133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71.9970137">
            <text:p>171,9970137</text:p>
          </table:table-cell>
          <table:table-cell office:value-type="float" office:value="169.6801403">
            <text:p>169,6801403</text:p>
          </table:table-cell>
          <table:table-cell office:value-type="float" office:value="170.2107374">
            <text:p>170,2107374</text:p>
          </table:table-cell>
          <table:table-cell office:value-type="float" office:value="170.9973881">
            <text:p>170,9973881</text:p>
          </table:table-cell>
          <table:table-cell office:value-type="float" office:value="171.3262849">
            <text:p>171,3262849</text:p>
          </table:table-cell>
          <table:table-cell office:value-type="float" office:value="167.4239562">
            <text:p>167,4239562</text:p>
          </table:table-cell>
          <table:table-cell office:value-type="float" office:value="174.4950744">
            <text:p>174,4950744</text:p>
          </table:table-cell>
          <table:table-cell office:value-type="float" office:value="171.2130565">
            <text:p>171,2130565</text:p>
          </table:table-cell>
          <table:table-cell office:value-type="float" office:value="165.3720141">
            <text:p>165,3720141</text:p>
          </table:table-cell>
          <table:table-cell office:value-type="float" office:value="162.7963106">
            <text:p>162,7963106</text:p>
          </table:table-cell>
          <table:table-cell office:value-type="float" office:value="166.490242">
            <text:p>166,490242</text:p>
          </table:table-cell>
          <table:table-cell office:value-type="float" office:value="170.1793324">
            <text:p>170,1793324</text:p>
          </table:table-cell>
          <table:table-cell office:value-type="float" office:value="173.7274717">
            <text:p>173,7274717</text:p>
          </table:table-cell>
          <table:table-cell office:value-type="float" office:value="174.9511067">
            <text:p>174,9511067</text:p>
          </table:table-cell>
          <table:table-cell office:value-type="float" office:value="175.2621687">
            <text:p>175,2621687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72.1321049">
            <text:p>172,1321049</text:p>
          </table:table-cell>
          <table:table-cell office:value-type="float" office:value="169.840846">
            <text:p>169,840846</text:p>
          </table:table-cell>
          <table:table-cell office:value-type="float" office:value="170.3242198">
            <text:p>170,3242198</text:p>
          </table:table-cell>
          <table:table-cell office:value-type="float" office:value="171.1966566">
            <text:p>171,1966566</text:p>
          </table:table-cell>
          <table:table-cell office:value-type="float" office:value="171.4805618">
            <text:p>171,4805618</text:p>
          </table:table-cell>
          <table:table-cell office:value-type="float" office:value="167.5821412">
            <text:p>167,5821412</text:p>
          </table:table-cell>
          <table:table-cell office:value-type="float" office:value="174.6638168">
            <text:p>174,6638168</text:p>
          </table:table-cell>
          <table:table-cell office:value-type="float" office:value="171.3314505">
            <text:p>171,3314505</text:p>
          </table:table-cell>
          <table:table-cell office:value-type="float" office:value="165.5306209">
            <text:p>165,5306209</text:p>
          </table:table-cell>
          <table:table-cell office:value-type="float" office:value="162.9847651">
            <text:p>162,9847651</text:p>
          </table:table-cell>
          <table:table-cell office:value-type="float" office:value="166.6866636">
            <text:p>166,6866636</text:p>
          </table:table-cell>
          <table:table-cell office:value-type="float" office:value="170.357371">
            <text:p>170,357371</text:p>
          </table:table-cell>
          <table:table-cell office:value-type="float" office:value="173.8605071">
            <text:p>173,8605071</text:p>
          </table:table-cell>
          <table:table-cell office:value-type="float" office:value="175.04493">
            <text:p>175,04493</text:p>
          </table:table-cell>
          <table:table-cell office:value-type="float" office:value="175.3845673">
            <text:p>175,3845673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72.2670468">
            <text:p>172,2670468</text:p>
          </table:table-cell>
          <table:table-cell office:value-type="float" office:value="170.0007965">
            <text:p>170,0007965</text:p>
          </table:table-cell>
          <table:table-cell office:value-type="float" office:value="170.4391704">
            <text:p>170,4391704</text:p>
          </table:table-cell>
          <table:table-cell office:value-type="float" office:value="171.3990632">
            <text:p>171,3990632</text:p>
          </table:table-cell>
          <table:table-cell office:value-type="float" office:value="171.6368024">
            <text:p>171,6368024</text:p>
          </table:table-cell>
          <table:table-cell office:value-type="float" office:value="167.7385288">
            <text:p>167,7385288</text:p>
          </table:table-cell>
          <table:table-cell office:value-type="float" office:value="174.8311563">
            <text:p>174,8311563</text:p>
          </table:table-cell>
          <table:table-cell office:value-type="float" office:value="171.4486019">
            <text:p>171,4486019</text:p>
          </table:table-cell>
          <table:table-cell office:value-type="float" office:value="165.688677">
            <text:p>165,688677</text:p>
          </table:table-cell>
          <table:table-cell office:value-type="float" office:value="163.173736">
            <text:p>163,173736</text:p>
          </table:table-cell>
          <table:table-cell office:value-type="float" office:value="166.8841949">
            <text:p>166,8841949</text:p>
          </table:table-cell>
          <table:table-cell office:value-type="float" office:value="170.5377976">
            <text:p>170,5377976</text:p>
          </table:table-cell>
          <table:table-cell office:value-type="float" office:value="173.994186">
            <text:p>173,994186</text:p>
          </table:table-cell>
          <table:table-cell office:value-type="float" office:value="175.1385841">
            <text:p>175,1385841</text:p>
          </table:table-cell>
          <table:table-cell office:value-type="float" office:value="175.5047799">
            <text:p>175,5047799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72.4034134">
            <text:p>172,4034134</text:p>
          </table:table-cell>
          <table:table-cell office:value-type="float" office:value="170.1599528">
            <text:p>170,1599528</text:p>
          </table:table-cell>
          <table:table-cell office:value-type="float" office:value="170.5579548">
            <text:p>170,5579548</text:p>
          </table:table-cell>
          <table:table-cell office:value-type="float" office:value="171.6048372">
            <text:p>171,6048372</text:p>
          </table:table-cell>
          <table:table-cell office:value-type="float" office:value="171.7967341">
            <text:p>171,7967341</text:p>
          </table:table-cell>
          <table:table-cell office:value-type="float" office:value="167.8924596">
            <text:p>167,8924596</text:p>
          </table:table-cell>
          <table:table-cell office:value-type="float" office:value="174.9987505">
            <text:p>174,9987505</text:p>
          </table:table-cell>
          <table:table-cell office:value-type="float" office:value="171.5659738">
            <text:p>171,5659738</text:p>
          </table:table-cell>
          <table:table-cell office:value-type="float" office:value="165.8462455">
            <text:p>165,8462455</text:p>
          </table:table-cell>
          <table:table-cell office:value-type="float" office:value="163.3628561">
            <text:p>163,3628561</text:p>
          </table:table-cell>
          <table:table-cell office:value-type="float" office:value="167.0823093">
            <text:p>167,0823093</text:p>
          </table:table-cell>
          <table:table-cell office:value-type="float" office:value="170.7217912">
            <text:p>170,7217912</text:p>
          </table:table-cell>
          <table:table-cell office:value-type="float" office:value="174.1298745">
            <text:p>174,1298745</text:p>
          </table:table-cell>
          <table:table-cell office:value-type="float" office:value="175.2344721">
            <text:p>175,2344721</text:p>
          </table:table-cell>
          <table:table-cell office:value-type="float" office:value="175.6243555">
            <text:p>175,6243555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72.543444">
            <text:p>172,543444</text:p>
          </table:table-cell>
          <table:table-cell office:value-type="float" office:value="170.3185895">
            <text:p>170,3185895</text:p>
          </table:table-cell>
          <table:table-cell office:value-type="float" office:value="170.6829623">
            <text:p>170,6829623</text:p>
          </table:table-cell>
          <table:table-cell office:value-type="float" office:value="171.8136043">
            <text:p>171,8136043</text:p>
          </table:table-cell>
          <table:table-cell office:value-type="float" office:value="171.9631706">
            <text:p>171,9631706</text:p>
          </table:table-cell>
          <table:table-cell office:value-type="float" office:value="168.0433133">
            <text:p>168,0433133</text:p>
          </table:table-cell>
          <table:table-cell office:value-type="float" office:value="175.1688961">
            <text:p>175,1688961</text:p>
          </table:table-cell>
          <table:table-cell office:value-type="float" office:value="171.6861492">
            <text:p>171,6861492</text:p>
          </table:table-cell>
          <table:table-cell office:value-type="float" office:value="166.0037911">
            <text:p>166,0037911</text:p>
          </table:table-cell>
          <table:table-cell office:value-type="float" office:value="163.5521484">
            <text:p>163,5521484</text:p>
          </table:table-cell>
          <table:table-cell office:value-type="float" office:value="167.2817831">
            <text:p>167,2817831</text:p>
          </table:table-cell>
          <table:table-cell office:value-type="float" office:value="170.9099055">
            <text:p>170,9099055</text:p>
          </table:table-cell>
          <table:table-cell office:value-type="float" office:value="174.2695049">
            <text:p>174,2695049</text:p>
          </table:table-cell>
          <table:table-cell office:value-type="float" office:value="175.3351384">
            <text:p>175,3351384</text:p>
          </table:table-cell>
          <table:table-cell office:value-type="float" office:value="175.7446449">
            <text:p>175,7446449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2.688226">
            <text:p>172,688226</text:p>
          </table:table-cell>
          <table:table-cell office:value-type="float" office:value="170.4765116">
            <text:p>170,4765116</text:p>
          </table:table-cell>
          <table:table-cell office:value-type="float" office:value="170.8158096">
            <text:p>170,8158096</text:p>
          </table:table-cell>
          <table:table-cell office:value-type="float" office:value="172.0242809">
            <text:p>172,0242809</text:p>
          </table:table-cell>
          <table:table-cell office:value-type="float" office:value="172.1380657">
            <text:p>172,1380657</text:p>
          </table:table-cell>
          <table:table-cell office:value-type="float" office:value="168.1904706">
            <text:p>168,1904706</text:p>
          </table:table-cell>
          <table:table-cell office:value-type="float" office:value="175.3431562">
            <text:p>175,3431562</text:p>
          </table:table-cell>
          <table:table-cell office:value-type="float" office:value="171.8107207">
            <text:p>171,8107207</text:p>
          </table:table-cell>
          <table:table-cell office:value-type="float" office:value="166.161177">
            <text:p>166,161177</text:p>
          </table:table-cell>
          <table:table-cell office:value-type="float" office:value="163.7414505">
            <text:p>163,7414505</text:p>
          </table:table-cell>
          <table:table-cell office:value-type="float" office:value="167.4824507">
            <text:p>167,4824507</text:p>
          </table:table-cell>
          <table:table-cell office:value-type="float" office:value="171.1014193">
            <text:p>171,1014193</text:p>
          </table:table-cell>
          <table:table-cell office:value-type="float" office:value="174.4144275">
            <text:p>174,4144275</text:p>
          </table:table-cell>
          <table:table-cell office:value-type="float" office:value="175.4422593">
            <text:p>175,4422593</text:p>
          </table:table-cell>
          <table:table-cell office:value-type="float" office:value="175.8670114">
            <text:p>175,8670114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72.8366242">
            <text:p>172,8366242</text:p>
          </table:table-cell>
          <table:table-cell office:value-type="float" office:value="170.6331385">
            <text:p>170,6331385</text:p>
          </table:table-cell>
          <table:table-cell office:value-type="float" office:value="170.9559321">
            <text:p>170,9559321</text:p>
          </table:table-cell>
          <table:table-cell office:value-type="float" office:value="172.2338393">
            <text:p>172,2338393</text:p>
          </table:table-cell>
          <table:table-cell office:value-type="float" office:value="172.3202397">
            <text:p>172,3202397</text:p>
          </table:table-cell>
          <table:table-cell office:value-type="float" office:value="168.3335011">
            <text:p>168,3335011</text:p>
          </table:table-cell>
          <table:table-cell office:value-type="float" office:value="175.5207798">
            <text:p>175,5207798</text:p>
          </table:table-cell>
          <table:table-cell office:value-type="float" office:value="171.9387776">
            <text:p>171,9387776</text:p>
          </table:table-cell>
          <table:table-cell office:value-type="float" office:value="166.3179361">
            <text:p>166,3179361</text:p>
          </table:table-cell>
          <table:table-cell office:value-type="float" office:value="163.9300753">
            <text:p>163,9300753</text:p>
          </table:table-cell>
          <table:table-cell office:value-type="float" office:value="167.6836399">
            <text:p>167,6836399</text:p>
          </table:table-cell>
          <table:table-cell office:value-type="float" office:value="171.294418">
            <text:p>171,294418</text:p>
          </table:table-cell>
          <table:table-cell office:value-type="float" office:value="174.5628643">
            <text:p>174,5628643</text:p>
          </table:table-cell>
          <table:table-cell office:value-type="float" office:value="175.5546639">
            <text:p>175,5546639</text:p>
          </table:table-cell>
          <table:table-cell office:value-type="float" office:value="175.9903589">
            <text:p>175,9903589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72.9886967">
            <text:p>172,9886967</text:p>
          </table:table-cell>
          <table:table-cell office:value-type="float" office:value="170.7887698">
            <text:p>170,7887698</text:p>
          </table:table-cell>
          <table:table-cell office:value-type="float" office:value="171.1036993">
            <text:p>171,1036993</text:p>
          </table:table-cell>
          <table:table-cell office:value-type="float" office:value="172.4391508">
            <text:p>172,4391508</text:p>
          </table:table-cell>
          <table:table-cell office:value-type="float" office:value="172.50959">
            <text:p>172,50959</text:p>
          </table:table-cell>
          <table:table-cell office:value-type="float" office:value="168.4729627">
            <text:p>168,4729627</text:p>
          </table:table-cell>
          <table:table-cell office:value-type="float" office:value="175.701706">
            <text:p>175,701706</text:p>
          </table:table-cell>
          <table:table-cell office:value-type="float" office:value="172.0703468">
            <text:p>172,0703468</text:p>
          </table:table-cell>
          <table:table-cell office:value-type="float" office:value="166.4746233">
            <text:p>166,4746233</text:p>
          </table:table-cell>
          <table:table-cell office:value-type="float" office:value="164.1178084">
            <text:p>164,1178084</text:p>
          </table:table-cell>
          <table:table-cell office:value-type="float" office:value="167.8857143">
            <text:p>167,8857143</text:p>
          </table:table-cell>
          <table:table-cell office:value-type="float" office:value="171.4872994">
            <text:p>171,4872994</text:p>
          </table:table-cell>
          <table:table-cell office:value-type="float" office:value="174.7153782">
            <text:p>174,7153782</text:p>
          </table:table-cell>
          <table:table-cell office:value-type="float" office:value="175.6729205">
            <text:p>175,6729205</text:p>
          </table:table-cell>
          <table:table-cell office:value-type="float" office:value="176.1145759">
            <text:p>176,1145759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73.1434854">
            <text:p>173,1434854</text:p>
          </table:table-cell>
          <table:table-cell office:value-type="float" office:value="170.9432394">
            <text:p>170,9432394</text:p>
          </table:table-cell>
          <table:table-cell office:value-type="float" office:value="171.2572251">
            <text:p>171,2572251</text:p>
          </table:table-cell>
          <table:table-cell office:value-type="float" office:value="172.637431">
            <text:p>172,637431</text:p>
          </table:table-cell>
          <table:table-cell office:value-type="float" office:value="172.7050067">
            <text:p>172,7050067</text:p>
          </table:table-cell>
          <table:table-cell office:value-type="float" office:value="168.6088777">
            <text:p>168,6088777</text:p>
          </table:table-cell>
          <table:table-cell office:value-type="float" office:value="175.8847294">
            <text:p>175,8847294</text:p>
          </table:table-cell>
          <table:table-cell office:value-type="float" office:value="172.2046818">
            <text:p>172,2046818</text:p>
          </table:table-cell>
          <table:table-cell office:value-type="float" office:value="166.6310636">
            <text:p>166,6310636</text:p>
          </table:table-cell>
          <table:table-cell office:value-type="float" office:value="164.3035459">
            <text:p>164,3035459</text:p>
          </table:table-cell>
          <table:table-cell office:value-type="float" office:value="168.088671">
            <text:p>168,088671</text:p>
          </table:table-cell>
          <table:table-cell office:value-type="float" office:value="171.6782689">
            <text:p>171,6782689</text:p>
          </table:table-cell>
          <table:table-cell office:value-type="float" office:value="174.8709639">
            <text:p>174,8709639</text:p>
          </table:table-cell>
          <table:table-cell office:value-type="float" office:value="175.7961636">
            <text:p>175,7961636</text:p>
          </table:table-cell>
          <table:table-cell office:value-type="float" office:value="176.2384768">
            <text:p>176,2384768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73.2997514">
            <text:p>173,2997514</text:p>
          </table:table-cell>
          <table:table-cell office:value-type="float" office:value="171.0958274">
            <text:p>171,0958274</text:p>
          </table:table-cell>
          <table:table-cell office:value-type="float" office:value="171.4148835">
            <text:p>171,4148835</text:p>
          </table:table-cell>
          <table:table-cell office:value-type="float" office:value="172.8263315">
            <text:p>172,8263315</text:p>
          </table:table-cell>
          <table:table-cell office:value-type="float" office:value="172.9051801">
            <text:p>172,9051801</text:p>
          </table:table-cell>
          <table:table-cell office:value-type="float" office:value="168.7405284">
            <text:p>168,7405284</text:p>
          </table:table-cell>
          <table:table-cell office:value-type="float" office:value="176.0686244">
            <text:p>176,0686244</text:p>
          </table:table-cell>
          <table:table-cell office:value-type="float" office:value="172.3402188">
            <text:p>172,3402188</text:p>
          </table:table-cell>
          <table:table-cell office:value-type="float" office:value="166.7868982">
            <text:p>166,7868982</text:p>
          </table:table-cell>
          <table:table-cell office:value-type="float" office:value="164.4861686">
            <text:p>164,4861686</text:p>
          </table:table-cell>
          <table:table-cell office:value-type="float" office:value="168.2914827">
            <text:p>168,2914827</text:p>
          </table:table-cell>
          <table:table-cell office:value-type="float" office:value="171.8652381">
            <text:p>171,8652381</text:p>
          </table:table-cell>
          <table:table-cell office:value-type="float" office:value="175.0279498">
            <text:p>175,0279498</text:p>
          </table:table-cell>
          <table:table-cell office:value-type="float" office:value="175.9233137">
            <text:p>175,9233137</text:p>
          </table:table-cell>
          <table:table-cell office:value-type="float" office:value="176.360374">
            <text:p>176,360374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173.4581797">
            <text:p>173,4581797</text:p>
          </table:table-cell>
          <table:table-cell office:value-type="float" office:value="171.2489121">
            <text:p>171,2489121</text:p>
          </table:table-cell>
          <table:table-cell office:value-type="float" office:value="171.5782239">
            <text:p>171,5782239</text:p>
          </table:table-cell>
          <table:table-cell office:value-type="float" office:value="173.0061423">
            <text:p>173,0061423</text:p>
          </table:table-cell>
          <table:table-cell office:value-type="float" office:value="173.1113853">
            <text:p>173,1113853</text:p>
          </table:table-cell>
          <table:table-cell office:value-type="float" office:value="168.8702596">
            <text:p>168,8702596</text:p>
          </table:table-cell>
          <table:table-cell office:value-type="float" office:value="176.2549186">
            <text:p>176,2549186</text:p>
          </table:table-cell>
          <table:table-cell office:value-type="float" office:value="172.4783946">
            <text:p>172,4783946</text:p>
          </table:table-cell>
          <table:table-cell office:value-type="float" office:value="166.9445541">
            <text:p>166,9445541</text:p>
          </table:table-cell>
          <table:table-cell office:value-type="float" office:value="164.6678283">
            <text:p>164,6678283</text:p>
          </table:table-cell>
          <table:table-cell office:value-type="float" office:value="168.4964058">
            <text:p>168,4964058</text:p>
          </table:table-cell>
          <table:table-cell office:value-type="float" office:value="172.04852">
            <text:p>172,04852</text:p>
          </table:table-cell>
          <table:table-cell office:value-type="float" office:value="175.1877618">
            <text:p>175,1877618</text:p>
          </table:table-cell>
          <table:table-cell office:value-type="float" office:value="176.0560264">
            <text:p>176,0560264</text:p>
          </table:table-cell>
          <table:table-cell office:value-type="float" office:value="176.4822101">
            <text:p>176,4822101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73.6189389">
            <text:p>173,6189389</text:p>
          </table:table-cell>
          <table:table-cell office:value-type="float" office:value="171.4048054">
            <text:p>171,4048054</text:p>
          </table:table-cell>
          <table:table-cell office:value-type="float" office:value="171.7477271">
            <text:p>171,7477271</text:p>
          </table:table-cell>
          <table:table-cell office:value-type="float" office:value="173.1795466">
            <text:p>173,1795466</text:p>
          </table:table-cell>
          <table:table-cell office:value-type="float" office:value="173.3230939">
            <text:p>173,3230939</text:p>
          </table:table-cell>
          <table:table-cell office:value-type="float" office:value="169.001728">
            <text:p>169,001728</text:p>
          </table:table-cell>
          <table:table-cell office:value-type="float" office:value="176.4440937">
            <text:p>176,4440937</text:p>
          </table:table-cell>
          <table:table-cell office:value-type="float" office:value="172.6190896">
            <text:p>172,6190896</text:p>
          </table:table-cell>
          <table:table-cell office:value-type="float" office:value="167.1063069">
            <text:p>167,1063069</text:p>
          </table:table-cell>
          <table:table-cell office:value-type="float" office:value="164.8505458">
            <text:p>164,8505458</text:p>
          </table:table-cell>
          <table:table-cell office:value-type="float" office:value="168.7053573">
            <text:p>168,7053573</text:p>
          </table:table-cell>
          <table:table-cell office:value-type="float" office:value="172.2302906">
            <text:p>172,2302906</text:p>
          </table:table-cell>
          <table:table-cell office:value-type="float" office:value="175.3502557">
            <text:p>175,3502557</text:p>
          </table:table-cell>
          <table:table-cell office:value-type="float" office:value="176.1945593">
            <text:p>176,1945593</text:p>
          </table:table-cell>
          <table:table-cell office:value-type="float" office:value="176.6040362">
            <text:p>176,6040362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73.7799991">
            <text:p>173,7799991</text:p>
          </table:table-cell>
          <table:table-cell office:value-type="float" office:value="171.5638853">
            <text:p>171,5638853</text:p>
          </table:table-cell>
          <table:table-cell office:value-type="float" office:value="171.9213746">
            <text:p>171,9213746</text:p>
          </table:table-cell>
          <table:table-cell office:value-type="float" office:value="173.3471126">
            <text:p>173,3471126</text:p>
          </table:table-cell>
          <table:table-cell office:value-type="float" office:value="173.5374401">
            <text:p>173,5374401</text:p>
          </table:table-cell>
          <table:table-cell office:value-type="float" office:value="169.1365914">
            <text:p>169,1365914</text:p>
          </table:table-cell>
          <table:table-cell office:value-type="float" office:value="176.6336257">
            <text:p>176,6336257</text:p>
          </table:table-cell>
          <table:table-cell office:value-type="float" office:value="172.7600413">
            <text:p>172,7600413</text:p>
          </table:table-cell>
          <table:table-cell office:value-type="float" office:value="167.2731335">
            <text:p>167,2731335</text:p>
          </table:table-cell>
          <table:table-cell office:value-type="float" office:value="165.0347388">
            <text:p>165,0347388</text:p>
          </table:table-cell>
          <table:table-cell office:value-type="float" office:value="168.9184831">
            <text:p>168,9184831</text:p>
          </table:table-cell>
          <table:table-cell office:value-type="float" office:value="172.4108859">
            <text:p>172,4108859</text:p>
          </table:table-cell>
          <table:table-cell office:value-type="float" office:value="175.5123537">
            <text:p>175,5123537</text:p>
          </table:table-cell>
          <table:table-cell office:value-type="float" office:value="176.3369435">
            <text:p>176,3369435</text:p>
          </table:table-cell>
          <table:table-cell office:value-type="float" office:value="176.7231325">
            <text:p>176,7231325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73.9379867">
            <text:p>173,9379867</text:p>
          </table:table-cell>
          <table:table-cell office:value-type="float" office:value="171.7238545">
            <text:p>171,7238545</text:p>
          </table:table-cell>
          <table:table-cell office:value-type="float" office:value="172.0958548">
            <text:p>172,0958548</text:p>
          </table:table-cell>
          <table:table-cell office:value-type="float" office:value="173.5093971">
            <text:p>173,5093971</text:p>
          </table:table-cell>
          <table:table-cell office:value-type="float" office:value="173.7498228">
            <text:p>173,7498228</text:p>
          </table:table-cell>
          <table:table-cell office:value-type="float" office:value="169.2737624">
            <text:p>169,2737624</text:p>
          </table:table-cell>
          <table:table-cell office:value-type="float" office:value="176.8205349">
            <text:p>176,8205349</text:p>
          </table:table-cell>
          <table:table-cell office:value-type="float" office:value="172.8975584">
            <text:p>172,8975584</text:p>
          </table:table-cell>
          <table:table-cell office:value-type="float" office:value="167.4430952">
            <text:p>167,4430952</text:p>
          </table:table-cell>
          <table:table-cell office:value-type="float" office:value="165.2187562">
            <text:p>165,2187562</text:p>
          </table:table-cell>
          <table:table-cell office:value-type="float" office:value="169.1341049">
            <text:p>169,1341049</text:p>
          </table:table-cell>
          <table:table-cell office:value-type="float" office:value="172.5898024">
            <text:p>172,5898024</text:p>
          </table:table-cell>
          <table:table-cell office:value-type="float" office:value="175.6701447">
            <text:p>175,6701447</text:p>
          </table:table-cell>
          <table:table-cell office:value-type="float" office:value="176.4795311">
            <text:p>176,4795311</text:p>
          </table:table-cell>
          <table:table-cell office:value-type="float" office:value="176.8360771">
            <text:p>176,8360771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74.0901354">
            <text:p>174,0901354</text:p>
          </table:table-cell>
          <table:table-cell office:value-type="float" office:value="171.883198">
            <text:p>171,883198</text:p>
          </table:table-cell>
          <table:table-cell office:value-type="float" office:value="172.2691018">
            <text:p>172,2691018</text:p>
          </table:table-cell>
          <table:table-cell office:value-type="float" office:value="173.6664284">
            <text:p>173,6664284</text:p>
          </table:table-cell>
          <table:table-cell office:value-type="float" office:value="173.9565174">
            <text:p>173,9565174</text:p>
          </table:table-cell>
          <table:table-cell office:value-type="float" office:value="169.4122959">
            <text:p>169,4122959</text:p>
          </table:table-cell>
          <table:table-cell office:value-type="float" office:value="177.0022554">
            <text:p>177,0022554</text:p>
          </table:table-cell>
          <table:table-cell office:value-type="float" office:value="173.0294128">
            <text:p>173,0294128</text:p>
          </table:table-cell>
          <table:table-cell office:value-type="float" office:value="167.6157474">
            <text:p>167,6157474</text:p>
          </table:table-cell>
          <table:table-cell office:value-type="float" office:value="165.4009536">
            <text:p>165,4009536</text:p>
          </table:table-cell>
          <table:table-cell office:value-type="float" office:value="169.3509662">
            <text:p>169,3509662</text:p>
          </table:table-cell>
          <table:table-cell office:value-type="float" office:value="172.7667816">
            <text:p>172,7667816</text:p>
          </table:table-cell>
          <table:table-cell office:value-type="float" office:value="175.8197623">
            <text:p>175,8197623</text:p>
          </table:table-cell>
          <table:table-cell office:value-type="float" office:value="176.6201557">
            <text:p>176,6201557</text:p>
          </table:table-cell>
          <table:table-cell office:value-type="float" office:value="176.939801">
            <text:p>176,939801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74.2350647">
            <text:p>174,2350647</text:p>
          </table:table-cell>
          <table:table-cell office:value-type="float" office:value="172.041543">
            <text:p>172,041543</text:p>
          </table:table-cell>
          <table:table-cell office:value-type="float" office:value="172.4398531">
            <text:p>172,4398531</text:p>
          </table:table-cell>
          <table:table-cell office:value-type="float" office:value="173.819259">
            <text:p>173,819259</text:p>
          </table:table-cell>
          <table:table-cell office:value-type="float" office:value="174.1543108">
            <text:p>174,1543108</text:p>
          </table:table-cell>
          <table:table-cell office:value-type="float" office:value="169.5523599">
            <text:p>169,5523599</text:p>
          </table:table-cell>
          <table:table-cell office:value-type="float" office:value="177.1779918">
            <text:p>177,1779918</text:p>
          </table:table-cell>
          <table:table-cell office:value-type="float" office:value="173.1543348">
            <text:p>173,1543348</text:p>
          </table:table-cell>
          <table:table-cell office:value-type="float" office:value="167.790651">
            <text:p>167,790651</text:p>
          </table:table-cell>
          <table:table-cell office:value-type="float" office:value="165.5819481">
            <text:p>165,5819481</text:p>
          </table:table-cell>
          <table:table-cell office:value-type="float" office:value="169.5688422">
            <text:p>169,5688422</text:p>
          </table:table-cell>
          <table:table-cell office:value-type="float" office:value="172.9419236">
            <text:p>172,9419236</text:p>
          </table:table-cell>
          <table:table-cell office:value-type="float" office:value="175.9596049">
            <text:p>175,9596049</text:p>
          </table:table-cell>
          <table:table-cell office:value-type="float" office:value="176.757382">
            <text:p>176,757382</text:p>
          </table:table-cell>
          <table:table-cell office:value-type="float" office:value="177.0332282">
            <text:p>177,0332282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74.3720516">
            <text:p>174,3720516</text:p>
          </table:table-cell>
          <table:table-cell office:value-type="float" office:value="172.1975855">
            <text:p>172,1975855</text:p>
          </table:table-cell>
          <table:table-cell office:value-type="float" office:value="172.6075162">
            <text:p>172,6075162</text:p>
          </table:table-cell>
          <table:table-cell office:value-type="float" office:value="173.9671718">
            <text:p>173,9671718</text:p>
          </table:table-cell>
          <table:table-cell office:value-type="float" office:value="174.3415127">
            <text:p>174,3415127</text:p>
          </table:table-cell>
          <table:table-cell office:value-type="float" office:value="169.6932306">
            <text:p>169,6932306</text:p>
          </table:table-cell>
          <table:table-cell office:value-type="float" office:value="177.3480269">
            <text:p>177,3480269</text:p>
          </table:table-cell>
          <table:table-cell office:value-type="float" office:value="173.2720017">
            <text:p>173,2720017</text:p>
          </table:table-cell>
          <table:table-cell office:value-type="float" office:value="167.9673313">
            <text:p>167,9673313</text:p>
          </table:table-cell>
          <table:table-cell office:value-type="float" office:value="165.7602379">
            <text:p>165,7602379</text:p>
          </table:table-cell>
          <table:table-cell office:value-type="float" office:value="169.7863312">
            <text:p>169,7863312</text:p>
          </table:table-cell>
          <table:table-cell office:value-type="float" office:value="173.113664">
            <text:p>173,113664</text:p>
          </table:table-cell>
          <table:table-cell office:value-type="float" office:value="176.0892681">
            <text:p>176,0892681</text:p>
          </table:table-cell>
          <table:table-cell office:value-type="float" office:value="176.8905415">
            <text:p>176,8905415</text:p>
          </table:table-cell>
          <table:table-cell office:value-type="float" office:value="177.1159344">
            <text:p>177,1159344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74.5006329">
            <text:p>174,5006329</text:p>
          </table:table-cell>
          <table:table-cell office:value-type="float" office:value="172.3503577">
            <text:p>172,3503577</text:p>
          </table:table-cell>
          <table:table-cell office:value-type="float" office:value="172.7722179">
            <text:p>172,7722179</text:p>
          </table:table-cell>
          <table:table-cell office:value-type="float" office:value="174.1091096">
            <text:p>174,1091096</text:p>
          </table:table-cell>
          <table:table-cell office:value-type="float" office:value="174.5169952">
            <text:p>174,5169952</text:p>
          </table:table-cell>
          <table:table-cell office:value-type="float" office:value="169.8341861">
            <text:p>169,8341861</text:p>
          </table:table-cell>
          <table:table-cell office:value-type="float" office:value="177.5121167">
            <text:p>177,5121167</text:p>
          </table:table-cell>
          <table:table-cell office:value-type="float" office:value="173.3821133">
            <text:p>173,3821133</text:p>
          </table:table-cell>
          <table:table-cell office:value-type="float" office:value="168.1445747">
            <text:p>168,1445747</text:p>
          </table:table-cell>
          <table:table-cell office:value-type="float" office:value="165.9349683">
            <text:p>165,9349683</text:p>
          </table:table-cell>
          <table:table-cell office:value-type="float" office:value="170.0026904">
            <text:p>170,0026904</text:p>
          </table:table-cell>
          <table:table-cell office:value-type="float" office:value="173.2811375">
            <text:p>173,2811375</text:p>
          </table:table-cell>
          <table:table-cell office:value-type="float" office:value="176.2092946">
            <text:p>176,2092946</text:p>
          </table:table-cell>
          <table:table-cell office:value-type="float" office:value="177.0194774">
            <text:p>177,0194774</text:p>
          </table:table-cell>
          <table:table-cell office:value-type="float" office:value="177.1875559">
            <text:p>177,1875559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74.6216288">
            <text:p>174,6216288</text:p>
          </table:table-cell>
          <table:table-cell office:value-type="float" office:value="172.4999654">
            <text:p>172,4999654</text:p>
          </table:table-cell>
          <table:table-cell office:value-type="float" office:value="172.9344961">
            <text:p>172,9344961</text:p>
          </table:table-cell>
          <table:table-cell office:value-type="float" office:value="174.2445857">
            <text:p>174,2445857</text:p>
          </table:table-cell>
          <table:table-cell office:value-type="float" office:value="174.6816418">
            <text:p>174,6816418</text:p>
          </table:table-cell>
          <table:table-cell office:value-type="float" office:value="169.9761602">
            <text:p>169,9761602</text:p>
          </table:table-cell>
          <table:table-cell office:value-type="float" office:value="177.671976">
            <text:p>177,671976</text:p>
          </table:table-cell>
          <table:table-cell office:value-type="float" office:value="173.4857719">
            <text:p>173,4857719</text:p>
          </table:table-cell>
          <table:table-cell office:value-type="float" office:value="168.3223756">
            <text:p>168,3223756</text:p>
          </table:table-cell>
          <table:table-cell office:value-type="float" office:value="166.1067665">
            <text:p>166,1067665</text:p>
          </table:table-cell>
          <table:table-cell office:value-type="float" office:value="170.2183497">
            <text:p>170,2183497</text:p>
          </table:table-cell>
          <table:table-cell office:value-type="float" office:value="173.4438648">
            <text:p>173,4438648</text:p>
          </table:table-cell>
          <table:table-cell office:value-type="float" office:value="176.3215785">
            <text:p>176,3215785</text:p>
          </table:table-cell>
          <table:table-cell office:value-type="float" office:value="177.1441639">
            <text:p>177,1441639</text:p>
          </table:table-cell>
          <table:table-cell office:value-type="float" office:value="177.2489432">
            <text:p>177,2489432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74.7380903">
            <text:p>174,7380903</text:p>
          </table:table-cell>
          <table:table-cell office:value-type="float" office:value="172.6482687">
            <text:p>172,6482687</text:p>
          </table:table-cell>
          <table:table-cell office:value-type="float" office:value="173.0974912">
            <text:p>173,0974912</text:p>
          </table:table-cell>
          <table:table-cell office:value-type="float" office:value="174.3746622">
            <text:p>174,3746622</text:p>
          </table:table-cell>
          <table:table-cell office:value-type="float" office:value="174.8388241">
            <text:p>174,8388241</text:p>
          </table:table-cell>
          <table:table-cell office:value-type="float" office:value="170.1219256">
            <text:p>170,1219256</text:p>
          </table:table-cell>
          <table:table-cell office:value-type="float" office:value="177.8308264">
            <text:p>177,8308264</text:p>
          </table:table-cell>
          <table:table-cell office:value-type="float" office:value="173.5860842">
            <text:p>173,5860842</text:p>
          </table:table-cell>
          <table:table-cell office:value-type="float" office:value="168.5028287">
            <text:p>168,5028287</text:p>
          </table:table-cell>
          <table:table-cell office:value-type="float" office:value="166.2776317">
            <text:p>166,2776317</text:p>
          </table:table-cell>
          <table:table-cell office:value-type="float" office:value="170.4350077">
            <text:p>170,4350077</text:p>
          </table:table-cell>
          <table:table-cell office:value-type="float" office:value="173.6027991">
            <text:p>173,6027991</text:p>
          </table:table-cell>
          <table:table-cell office:value-type="float" office:value="176.4302071">
            <text:p>176,4302071</text:p>
          </table:table-cell>
          <table:table-cell office:value-type="float" office:value="177.2670058">
            <text:p>177,2670058</text:p>
          </table:table-cell>
          <table:table-cell office:value-type="float" office:value="177.3043173">
            <text:p>177,3043173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74.8535593">
            <text:p>174,8535593</text:p>
          </table:table-cell>
          <table:table-cell office:value-type="float" office:value="172.7983872">
            <text:p>172,7983872</text:p>
          </table:table-cell>
          <table:table-cell office:value-type="float" office:value="173.2639894">
            <text:p>173,2639894</text:p>
          </table:table-cell>
          <table:table-cell office:value-type="float" office:value="174.5014826">
            <text:p>174,5014826</text:p>
          </table:table-cell>
          <table:table-cell office:value-type="float" office:value="174.9917982">
            <text:p>174,9917982</text:p>
          </table:table-cell>
          <table:table-cell office:value-type="float" office:value="170.2748937">
            <text:p>170,2748937</text:p>
          </table:table-cell>
          <table:table-cell office:value-type="float" office:value="177.9916953">
            <text:p>177,9916953</text:p>
          </table:table-cell>
          <table:table-cell office:value-type="float" office:value="173.6865631">
            <text:p>173,6865631</text:p>
          </table:table-cell>
          <table:table-cell office:value-type="float" office:value="168.6889789">
            <text:p>168,6889789</text:p>
          </table:table-cell>
          <table:table-cell office:value-type="float" office:value="166.4502144">
            <text:p>166,4502144</text:p>
          </table:table-cell>
          <table:table-cell office:value-type="float" office:value="170.6554342">
            <text:p>170,6554342</text:p>
          </table:table-cell>
          <table:table-cell office:value-type="float" office:value="173.7598128">
            <text:p>173,7598128</text:p>
          </table:table-cell>
          <table:table-cell office:value-type="float" office:value="176.5393391">
            <text:p>176,5393391</text:p>
          </table:table-cell>
          <table:table-cell office:value-type="float" office:value="177.3902353">
            <text:p>177,3902353</text:p>
          </table:table-cell>
          <table:table-cell office:value-type="float" office:value="177.3577014">
            <text:p>177,3577014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74.9694575">
            <text:p>174,9694575</text:p>
          </table:table-cell>
          <table:table-cell office:value-type="float" office:value="172.9510639">
            <text:p>172,9510639</text:p>
          </table:table-cell>
          <table:table-cell office:value-type="float" office:value="173.4344512">
            <text:p>173,4344512</text:p>
          </table:table-cell>
          <table:table-cell office:value-type="float" office:value="174.6243188">
            <text:p>174,6243188</text:p>
          </table:table-cell>
          <table:table-cell office:value-type="float" office:value="175.1417653">
            <text:p>175,1417653</text:p>
          </table:table-cell>
          <table:table-cell office:value-type="float" office:value="170.4359277">
            <text:p>170,4359277</text:p>
          </table:table-cell>
          <table:table-cell office:value-type="float" office:value="178.156041">
            <text:p>178,156041</text:p>
          </table:table-cell>
          <table:table-cell office:value-type="float" office:value="173.7885958">
            <text:p>173,7885958</text:p>
          </table:table-cell>
          <table:table-cell office:value-type="float" office:value="168.8811095">
            <text:p>168,8811095</text:p>
          </table:table-cell>
          <table:table-cell office:value-type="float" office:value="166.6255975">
            <text:p>166,6255975</text:p>
          </table:table-cell>
          <table:table-cell office:value-type="float" office:value="170.8797829">
            <text:p>170,8797829</text:p>
          </table:table-cell>
          <table:table-cell office:value-type="float" office:value="173.9143374">
            <text:p>173,9143374</text:p>
          </table:table-cell>
          <table:table-cell office:value-type="float" office:value="176.65036">
            <text:p>176,65036</text:p>
          </table:table-cell>
          <table:table-cell office:value-type="float" office:value="177.5145815">
            <text:p>177,5145815</text:p>
          </table:table-cell>
          <table:table-cell office:value-type="float" office:value="177.4113887">
            <text:p>177,4113887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75.0871794">
            <text:p>175,0871794</text:p>
          </table:table-cell>
          <table:table-cell office:value-type="float" office:value="173.107241">
            <text:p>173,107241</text:p>
          </table:table-cell>
          <table:table-cell office:value-type="float" office:value="173.6099075">
            <text:p>173,6099075</text:p>
          </table:table-cell>
          <table:table-cell office:value-type="float" office:value="174.7434267">
            <text:p>174,7434267</text:p>
          </table:table-cell>
          <table:table-cell office:value-type="float" office:value="175.2905134">
            <text:p>175,2905134</text:p>
          </table:table-cell>
          <table:table-cell office:value-type="float" office:value="170.6063446">
            <text:p>170,6063446</text:p>
          </table:table-cell>
          <table:table-cell office:value-type="float" office:value="178.3248824">
            <text:p>178,3248824</text:p>
          </table:table-cell>
          <table:table-cell office:value-type="float" office:value="173.8930748">
            <text:p>173,8930748</text:p>
          </table:table-cell>
          <table:table-cell office:value-type="float" office:value="169.0800041">
            <text:p>169,0800041</text:p>
          </table:table-cell>
          <table:table-cell office:value-type="float" office:value="166.8040397">
            <text:p>166,8040397</text:p>
          </table:table-cell>
          <table:table-cell office:value-type="float" office:value="171.1090077">
            <text:p>171,1090077</text:p>
          </table:table-cell>
          <table:table-cell office:value-type="float" office:value="174.0668363">
            <text:p>174,0668363</text:p>
          </table:table-cell>
          <table:table-cell office:value-type="float" office:value="176.7645966">
            <text:p>176,7645966</text:p>
          </table:table-cell>
          <table:table-cell office:value-type="float" office:value="177.6402386">
            <text:p>177,6402386</text:p>
          </table:table-cell>
          <table:table-cell office:value-type="float" office:value="177.4685637">
            <text:p>177,4685637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75.2090781">
            <text:p>175,2090781</text:p>
          </table:table-cell>
          <table:table-cell office:value-type="float" office:value="173.2681904">
            <text:p>173,2681904</text:p>
          </table:table-cell>
          <table:table-cell office:value-type="float" office:value="173.7924775">
            <text:p>173,7924775</text:p>
          </table:table-cell>
          <table:table-cell office:value-type="float" office:value="174.8598154">
            <text:p>174,8598154</text:p>
          </table:table-cell>
          <table:table-cell office:value-type="float" office:value="175.4413415">
            <text:p>175,4413415</text:p>
          </table:table-cell>
          <table:table-cell office:value-type="float" office:value="170.7872085">
            <text:p>170,7872085</text:p>
          </table:table-cell>
          <table:table-cell office:value-type="float" office:value="178.5004717">
            <text:p>178,5004717</text:p>
          </table:table-cell>
          <table:table-cell office:value-type="float" office:value="174.0030031">
            <text:p>174,0030031</text:p>
          </table:table-cell>
          <table:table-cell office:value-type="float" office:value="169.2867759">
            <text:p>169,2867759</text:p>
          </table:table-cell>
          <table:table-cell office:value-type="float" office:value="166.9869269">
            <text:p>166,9869269</text:p>
          </table:table-cell>
          <table:table-cell office:value-type="float" office:value="171.3435343">
            <text:p>171,3435343</text:p>
          </table:table-cell>
          <table:table-cell office:value-type="float" office:value="174.2178353">
            <text:p>174,2178353</text:p>
          </table:table-cell>
          <table:table-cell office:value-type="float" office:value="176.8849201">
            <text:p>176,8849201</text:p>
          </table:table-cell>
          <table:table-cell office:value-type="float" office:value="177.768831">
            <text:p>177,768831</text:p>
          </table:table-cell>
          <table:table-cell office:value-type="float" office:value="177.5327458">
            <text:p>177,5327458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75.3349724">
            <text:p>175,3349724</text:p>
          </table:table-cell>
          <table:table-cell office:value-type="float" office:value="173.4329377">
            <text:p>173,4329377</text:p>
          </table:table-cell>
          <table:table-cell office:value-type="float" office:value="173.9815126">
            <text:p>173,9815126</text:p>
          </table:table-cell>
          <table:table-cell office:value-type="float" office:value="174.9725434">
            <text:p>174,9725434</text:p>
          </table:table-cell>
          <table:table-cell office:value-type="float" office:value="175.5950595">
            <text:p>175,5950595</text:p>
          </table:table-cell>
          <table:table-cell office:value-type="float" office:value="170.9770519">
            <text:p>170,9770519</text:p>
          </table:table-cell>
          <table:table-cell office:value-type="float" office:value="178.6824327">
            <text:p>178,6824327</text:p>
          </table:table-cell>
          <table:table-cell office:value-type="float" office:value="174.1183672">
            <text:p>174,1183672</text:p>
          </table:table-cell>
          <table:table-cell office:value-type="float" office:value="169.5002256">
            <text:p>169,5002256</text:p>
          </table:table-cell>
          <table:table-cell office:value-type="float" office:value="167.1730986">
            <text:p>167,1730986</text:p>
          </table:table-cell>
          <table:table-cell office:value-type="float" office:value="171.5823377">
            <text:p>171,5823377</text:p>
          </table:table-cell>
          <table:table-cell office:value-type="float" office:value="174.3666126">
            <text:p>174,3666126</text:p>
          </table:table-cell>
          <table:table-cell office:value-type="float" office:value="177.0114975">
            <text:p>177,0114975</text:p>
          </table:table-cell>
          <table:table-cell office:value-type="float" office:value="177.8997801">
            <text:p>177,8997801</text:p>
          </table:table-cell>
          <table:table-cell office:value-type="float" office:value="177.6048149">
            <text:p>177,6048149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75.4654464">
            <text:p>175,4654464</text:p>
          </table:table-cell>
          <table:table-cell office:value-type="float" office:value="173.6019362">
            <text:p>173,6019362</text:p>
          </table:table-cell>
          <table:table-cell office:value-type="float" office:value="174.1771021">
            <text:p>174,1771021</text:p>
          </table:table-cell>
          <table:table-cell office:value-type="float" office:value="175.0830241">
            <text:p>175,0830241</text:p>
          </table:table-cell>
          <table:table-cell office:value-type="float" office:value="175.7522398">
            <text:p>175,7522398</text:p>
          </table:table-cell>
          <table:table-cell office:value-type="float" office:value="171.1757913">
            <text:p>171,1757913</text:p>
          </table:table-cell>
          <table:table-cell office:value-type="float" office:value="178.8703913">
            <text:p>178,8703913</text:p>
          </table:table-cell>
          <table:table-cell office:value-type="float" office:value="174.2392255">
            <text:p>174,2392255</text:p>
          </table:table-cell>
          <table:table-cell office:value-type="float" office:value="169.7204586">
            <text:p>169,7204586</text:p>
          </table:table-cell>
          <table:table-cell office:value-type="float" office:value="167.3631778">
            <text:p>167,3631778</text:p>
          </table:table-cell>
          <table:table-cell office:value-type="float" office:value="171.8252221">
            <text:p>171,8252221</text:p>
          </table:table-cell>
          <table:table-cell office:value-type="float" office:value="174.5133862">
            <text:p>174,5133862</text:p>
          </table:table-cell>
          <table:table-cell office:value-type="float" office:value="177.1450302">
            <text:p>177,1450302</text:p>
          </table:table-cell>
          <table:table-cell office:value-type="float" office:value="178.0325913">
            <text:p>178,0325913</text:p>
          </table:table-cell>
          <table:table-cell office:value-type="float" office:value="177.6861228">
            <text:p>177,6861228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75.5990289">
            <text:p>175,5990289</text:p>
          </table:table-cell>
          <table:table-cell office:value-type="float" office:value="173.7731395">
            <text:p>173,7731395</text:p>
          </table:table-cell>
          <table:table-cell office:value-type="float" office:value="174.3776748">
            <text:p>174,3776748</text:p>
          </table:table-cell>
          <table:table-cell office:value-type="float" office:value="175.1904528">
            <text:p>175,1904528</text:p>
          </table:table-cell>
          <table:table-cell office:value-type="float" office:value="175.9124024">
            <text:p>175,9124024</text:p>
          </table:table-cell>
          <table:table-cell office:value-type="float" office:value="171.3810389">
            <text:p>171,3810389</text:p>
          </table:table-cell>
          <table:table-cell office:value-type="float" office:value="179.0627201">
            <text:p>179,0627201</text:p>
          </table:table-cell>
          <table:table-cell office:value-type="float" office:value="174.3648856">
            <text:p>174,3648856</text:p>
          </table:table-cell>
          <table:table-cell office:value-type="float" office:value="169.9452249">
            <text:p>169,9452249</text:p>
          </table:table-cell>
          <table:table-cell office:value-type="float" office:value="167.5552957">
            <text:p>167,5552957</text:p>
          </table:table-cell>
          <table:table-cell office:value-type="float" office:value="172.0696414">
            <text:p>172,0696414</text:p>
          </table:table-cell>
          <table:table-cell office:value-type="float" office:value="174.6575039">
            <text:p>174,6575039</text:p>
          </table:table-cell>
          <table:table-cell office:value-type="float" office:value="177.2846508">
            <text:p>177,2846508</text:p>
          </table:table-cell>
          <table:table-cell office:value-type="float" office:value="178.1656132">
            <text:p>178,1656132</text:p>
          </table:table-cell>
          <table:table-cell office:value-type="float" office:value="177.7758235">
            <text:p>177,7758235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75.734956">
            <text:p>175,734956</text:p>
          </table:table-cell>
          <table:table-cell office:value-type="float" office:value="173.9459952">
            <text:p>173,9459952</text:p>
          </table:table-cell>
          <table:table-cell office:value-type="float" office:value="174.5823222">
            <text:p>174,5823222</text:p>
          </table:table-cell>
          <table:table-cell office:value-type="float" office:value="175.2951792">
            <text:p>175,2951792</text:p>
          </table:table-cell>
          <table:table-cell office:value-type="float" office:value="176.0751759">
            <text:p>176,0751759</text:p>
          </table:table-cell>
          <table:table-cell office:value-type="float" office:value="171.5916105">
            <text:p>171,5916105</text:p>
          </table:table-cell>
          <table:table-cell office:value-type="float" office:value="179.2579677">
            <text:p>179,2579677</text:p>
          </table:table-cell>
          <table:table-cell office:value-type="float" office:value="174.4944455">
            <text:p>174,4944455</text:p>
          </table:table-cell>
          <table:table-cell office:value-type="float" office:value="170.1736427">
            <text:p>170,1736427</text:p>
          </table:table-cell>
          <table:table-cell office:value-type="float" office:value="167.7488943">
            <text:p>167,7488943</text:p>
          </table:table-cell>
          <table:table-cell office:value-type="float" office:value="172.314744">
            <text:p>172,314744</text:p>
          </table:table-cell>
          <table:table-cell office:value-type="float" office:value="174.7990402">
            <text:p>174,7990402</text:p>
          </table:table-cell>
          <table:table-cell office:value-type="float" office:value="177.4302281">
            <text:p>177,4302281</text:p>
          </table:table-cell>
          <table:table-cell office:value-type="float" office:value="178.2977629">
            <text:p>178,2977629</text:p>
          </table:table-cell>
          <table:table-cell office:value-type="float" office:value="177.8734496">
            <text:p>177,8734496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75.8714697">
            <text:p>175,8714697</text:p>
          </table:table-cell>
          <table:table-cell office:value-type="float" office:value="174.1179974">
            <text:p>174,1179974</text:p>
          </table:table-cell>
          <table:table-cell office:value-type="float" office:value="174.7890193">
            <text:p>174,7890193</text:p>
          </table:table-cell>
          <table:table-cell office:value-type="float" office:value="175.3965794">
            <text:p>175,3965794</text:p>
          </table:table-cell>
          <table:table-cell office:value-type="float" office:value="176.2388689">
            <text:p>176,2388689</text:p>
          </table:table-cell>
          <table:table-cell office:value-type="float" office:value="171.8051804">
            <text:p>171,8051804</text:p>
          </table:table-cell>
          <table:table-cell office:value-type="float" office:value="179.4536424">
            <text:p>179,4536424</text:p>
          </table:table-cell>
          <table:table-cell office:value-type="float" office:value="174.6258486">
            <text:p>174,6258486</text:p>
          </table:table-cell>
          <table:table-cell office:value-type="float" office:value="170.4035098">
            <text:p>170,4035098</text:p>
          </table:table-cell>
          <table:table-cell office:value-type="float" office:value="167.9416916">
            <text:p>167,9416916</text:p>
          </table:table-cell>
          <table:table-cell office:value-type="float" office:value="172.5580157">
            <text:p>172,5580157</text:p>
          </table:table-cell>
          <table:table-cell office:value-type="float" office:value="174.9367103">
            <text:p>174,9367103</text:p>
          </table:table-cell>
          <table:table-cell office:value-type="float" office:value="177.5797832">
            <text:p>177,5797832</text:p>
          </table:table-cell>
          <table:table-cell office:value-type="float" office:value="178.4272564">
            <text:p>178,4272564</text:p>
          </table:table-cell>
          <table:table-cell office:value-type="float" office:value="177.9769411">
            <text:p>177,976941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76.0082353">
            <text:p>176,0082353</text:p>
          </table:table-cell>
          <table:table-cell office:value-type="float" office:value="174.288394">
            <text:p>174,288394</text:p>
          </table:table-cell>
          <table:table-cell office:value-type="float" office:value="174.9973049">
            <text:p>174,9973049</text:p>
          </table:table-cell>
          <table:table-cell office:value-type="float" office:value="175.4945851">
            <text:p>175,4945851</text:p>
          </table:table-cell>
          <table:table-cell office:value-type="float" office:value="176.4030709">
            <text:p>176,4030709</text:p>
          </table:table-cell>
          <table:table-cell office:value-type="float" office:value="172.0207672">
            <text:p>172,0207672</text:p>
          </table:table-cell>
          <table:table-cell office:value-type="float" office:value="179.6491836">
            <text:p>179,6491836</text:p>
          </table:table-cell>
          <table:table-cell office:value-type="float" office:value="174.758778">
            <text:p>174,758778</text:p>
          </table:table-cell>
          <table:table-cell office:value-type="float" office:value="170.6337655">
            <text:p>170,6337655</text:p>
          </table:table-cell>
          <table:table-cell office:value-type="float" office:value="168.133492">
            <text:p>168,133492</text:p>
          </table:table-cell>
          <table:table-cell office:value-type="float" office:value="172.7982631">
            <text:p>172,7982631</text:p>
          </table:table-cell>
          <table:table-cell office:value-type="float" office:value="175.070516">
            <text:p>175,070516</text:p>
          </table:table-cell>
          <table:table-cell office:value-type="float" office:value="177.7327532">
            <text:p>177,7327532</text:p>
          </table:table-cell>
          <table:table-cell office:value-type="float" office:value="178.5538351">
            <text:p>178,5538351</text:p>
          </table:table-cell>
          <table:table-cell office:value-type="float" office:value="178.0855631">
            <text:p>178,0855631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76.1454523">
            <text:p>176,1454523</text:p>
          </table:table-cell>
          <table:table-cell office:value-type="float" office:value="174.4581598">
            <text:p>174,4581598</text:p>
          </table:table-cell>
          <table:table-cell office:value-type="float" office:value="175.2076046">
            <text:p>175,2076046</text:p>
          </table:table-cell>
          <table:table-cell office:value-type="float" office:value="175.5917509">
            <text:p>175,5917509</text:p>
          </table:table-cell>
          <table:table-cell office:value-type="float" office:value="176.5684597">
            <text:p>176,5684597</text:p>
          </table:table-cell>
          <table:table-cell office:value-type="float" office:value="172.2383203">
            <text:p>172,2383203</text:p>
          </table:table-cell>
          <table:table-cell office:value-type="float" office:value="179.8443825">
            <text:p>179,8443825</text:p>
          </table:table-cell>
          <table:table-cell office:value-type="float" office:value="174.8940063">
            <text:p>174,8940063</text:p>
          </table:table-cell>
          <table:table-cell office:value-type="float" office:value="170.8643469">
            <text:p>170,8643469</text:p>
          </table:table-cell>
          <table:table-cell office:value-type="float" office:value="168.3251401">
            <text:p>168,3251401</text:p>
          </table:table-cell>
          <table:table-cell office:value-type="float" office:value="173.0363216">
            <text:p>173,0363216</text:p>
          </table:table-cell>
          <table:table-cell office:value-type="float" office:value="175.2020179">
            <text:p>175,2020179</text:p>
          </table:table-cell>
          <table:table-cell office:value-type="float" office:value="177.889495">
            <text:p>177,889495</text:p>
          </table:table-cell>
          <table:table-cell office:value-type="float" office:value="178.678418">
            <text:p>178,678418</text:p>
          </table:table-cell>
          <table:table-cell office:value-type="float" office:value="178.1998725">
            <text:p>178,1998725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76.2824884">
            <text:p>176,2824884</text:p>
          </table:table-cell>
          <table:table-cell office:value-type="float" office:value="174.6274649">
            <text:p>174,6274649</text:p>
          </table:table-cell>
          <table:table-cell office:value-type="float" office:value="175.4193245">
            <text:p>175,4193245</text:p>
          </table:table-cell>
          <table:table-cell office:value-type="float" office:value="175.6871513">
            <text:p>175,6871513</text:p>
          </table:table-cell>
          <table:table-cell office:value-type="float" office:value="176.7348962">
            <text:p>176,7348962</text:p>
          </table:table-cell>
          <table:table-cell office:value-type="float" office:value="172.4570375">
            <text:p>172,4570375</text:p>
          </table:table-cell>
          <table:table-cell office:value-type="float" office:value="180.0384944">
            <text:p>180,0384944</text:p>
          </table:table-cell>
          <table:table-cell office:value-type="float" office:value="175.0311302">
            <text:p>175,0311302</text:p>
          </table:table-cell>
          <table:table-cell office:value-type="float" office:value="171.0948385">
            <text:p>171,0948385</text:p>
          </table:table-cell>
          <table:table-cell office:value-type="float" office:value="168.5162963">
            <text:p>168,5162963</text:p>
          </table:table-cell>
          <table:table-cell office:value-type="float" office:value="173.2718702">
            <text:p>173,2718702</text:p>
          </table:table-cell>
          <table:table-cell office:value-type="float" office:value="175.3303058">
            <text:p>175,3303058</text:p>
          </table:table-cell>
          <table:table-cell office:value-type="float" office:value="178.0496541">
            <text:p>178,0496541</text:p>
          </table:table-cell>
          <table:table-cell office:value-type="float" office:value="178.8005685">
            <text:p>178,8005685</text:p>
          </table:table-cell>
          <table:table-cell office:value-type="float" office:value="178.3193994">
            <text:p>178,3193994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76.417971">
            <text:p>176,417971</text:p>
          </table:table-cell>
          <table:table-cell office:value-type="float" office:value="174.7951536">
            <text:p>174,7951536</text:p>
          </table:table-cell>
          <table:table-cell office:value-type="float" office:value="175.6311693">
            <text:p>175,6311693</text:p>
          </table:table-cell>
          <table:table-cell office:value-type="float" office:value="175.7805936">
            <text:p>175,7805936</text:p>
          </table:table-cell>
          <table:table-cell office:value-type="float" office:value="176.9012811">
            <text:p>176,9012811</text:p>
          </table:table-cell>
          <table:table-cell office:value-type="float" office:value="172.6750802">
            <text:p>172,6750802</text:p>
          </table:table-cell>
          <table:table-cell office:value-type="float" office:value="180.2296245">
            <text:p>180,2296245</text:p>
          </table:table-cell>
          <table:table-cell office:value-type="float" office:value="175.1691873">
            <text:p>175,1691873</text:p>
          </table:table-cell>
          <table:table-cell office:value-type="float" office:value="171.3239088">
            <text:p>171,3239088</text:p>
          </table:table-cell>
          <table:table-cell office:value-type="float" office:value="168.7058885">
            <text:p>168,7058885</text:p>
          </table:table-cell>
          <table:table-cell office:value-type="float" office:value="173.5031139">
            <text:p>173,5031139</text:p>
          </table:table-cell>
          <table:table-cell office:value-type="float" office:value="175.4553405">
            <text:p>175,4553405</text:p>
          </table:table-cell>
          <table:table-cell office:value-type="float" office:value="178.2127326">
            <text:p>178,2127326</text:p>
          </table:table-cell>
          <table:table-cell office:value-type="float" office:value="178.9195542">
            <text:p>178,9195542</text:p>
          </table:table-cell>
          <table:table-cell office:value-type="float" office:value="178.4429743">
            <text:p>178,4429743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76.5498969">
            <text:p>176,5498969</text:p>
          </table:table-cell>
          <table:table-cell office:value-type="float" office:value="174.9606055">
            <text:p>174,9606055</text:p>
          </table:table-cell>
          <table:table-cell office:value-type="float" office:value="175.8411886">
            <text:p>175,8411886</text:p>
          </table:table-cell>
          <table:table-cell office:value-type="float" office:value="175.8713567">
            <text:p>175,8713567</text:p>
          </table:table-cell>
          <table:table-cell office:value-type="float" office:value="177.065698">
            <text:p>177,065698</text:p>
          </table:table-cell>
          <table:table-cell office:value-type="float" office:value="172.891422">
            <text:p>172,891422</text:p>
          </table:table-cell>
          <table:table-cell office:value-type="float" office:value="180.4153369">
            <text:p>180,4153369</text:p>
          </table:table-cell>
          <table:table-cell office:value-type="float" office:value="175.3060213">
            <text:p>175,3060213</text:p>
          </table:table-cell>
          <table:table-cell office:value-type="float" office:value="171.5501658">
            <text:p>171,5501658</text:p>
          </table:table-cell>
          <table:table-cell office:value-type="float" office:value="168.8933656">
            <text:p>168,8933656</text:p>
          </table:table-cell>
          <table:table-cell office:value-type="float" office:value="173.7292691">
            <text:p>173,7292691</text:p>
          </table:table-cell>
          <table:table-cell office:value-type="float" office:value="175.5756794">
            <text:p>175,5756794</text:p>
          </table:table-cell>
          <table:table-cell office:value-type="float" office:value="178.3773247">
            <text:p>178,3773247</text:p>
          </table:table-cell>
          <table:table-cell office:value-type="float" office:value="179.0337916">
            <text:p>179,0337916</text:p>
          </table:table-cell>
          <table:table-cell office:value-type="float" office:value="178.5677534">
            <text:p>178,5677534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76.679145">
            <text:p>176,679145</text:p>
          </table:table-cell>
          <table:table-cell office:value-type="float" office:value="175.1254633">
            <text:p>175,1254633</text:p>
          </table:table-cell>
          <table:table-cell office:value-type="float" office:value="176.0502557">
            <text:p>176,0502557</text:p>
          </table:table-cell>
          <table:table-cell office:value-type="float" office:value="175.9608683">
            <text:p>175,9608683</text:p>
          </table:table-cell>
          <table:table-cell office:value-type="float" office:value="177.2289991">
            <text:p>177,2289991</text:p>
          </table:table-cell>
          <table:table-cell office:value-type="float" office:value="173.1072161">
            <text:p>173,1072161</text:p>
          </table:table-cell>
          <table:table-cell office:value-type="float" office:value="180.5964207">
            <text:p>180,5964207</text:p>
          </table:table-cell>
          <table:table-cell office:value-type="float" office:value="175.4424093">
            <text:p>175,4424093</text:p>
          </table:table-cell>
          <table:table-cell office:value-type="float" office:value="171.77467">
            <text:p>171,77467</text:p>
          </table:table-cell>
          <table:table-cell office:value-type="float" office:value="169.0801106">
            <text:p>169,0801106</text:p>
          </table:table-cell>
          <table:table-cell office:value-type="float" office:value="173.9517618">
            <text:p>173,9517618</text:p>
          </table:table-cell>
          <table:table-cell office:value-type="float" office:value="175.6930865">
            <text:p>175,6930865</text:p>
          </table:table-cell>
          <table:table-cell office:value-type="float" office:value="178.5442728">
            <text:p>178,5442728</text:p>
          </table:table-cell>
          <table:table-cell office:value-type="float" office:value="179.1439291">
            <text:p>179,1439291</text:p>
          </table:table-cell>
          <table:table-cell office:value-type="float" office:value="178.6933893">
            <text:p>178,6933893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76.8052835">
            <text:p>176,8052835</text:p>
          </table:table-cell>
          <table:table-cell office:value-type="float" office:value="175.2908831">
            <text:p>175,2908831</text:p>
          </table:table-cell>
          <table:table-cell office:value-type="float" office:value="176.2584346">
            <text:p>176,2584346</text:p>
          </table:table-cell>
          <table:table-cell office:value-type="float" office:value="176.0500693">
            <text:p>176,0500693</text:p>
          </table:table-cell>
          <table:table-cell office:value-type="float" office:value="177.3914669">
            <text:p>177,3914669</text:p>
          </table:table-cell>
          <table:table-cell office:value-type="float" office:value="173.3237192">
            <text:p>173,3237192</text:p>
          </table:table-cell>
          <table:table-cell office:value-type="float" office:value="180.7725687">
            <text:p>180,7725687</text:p>
          </table:table-cell>
          <table:table-cell office:value-type="float" office:value="175.5782114">
            <text:p>175,5782114</text:p>
          </table:table-cell>
          <table:table-cell office:value-type="float" office:value="171.9976868">
            <text:p>171,9976868</text:p>
          </table:table-cell>
          <table:table-cell office:value-type="float" office:value="169.2670743">
            <text:p>169,2670743</text:p>
          </table:table-cell>
          <table:table-cell office:value-type="float" office:value="174.171271">
            <text:p>174,171271</text:p>
          </table:table-cell>
          <table:table-cell office:value-type="float" office:value="175.8085887">
            <text:p>175,8085887</text:p>
          </table:table-cell>
          <table:table-cell office:value-type="float" office:value="178.7133722">
            <text:p>178,7133722</text:p>
          </table:table-cell>
          <table:table-cell office:value-type="float" office:value="179.2499477">
            <text:p>179,2499477</text:p>
          </table:table-cell>
          <table:table-cell office:value-type="float" office:value="178.8194898">
            <text:p>178,8194898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76.9272487">
            <text:p>176,9272487</text:p>
          </table:table-cell>
          <table:table-cell office:value-type="float" office:value="175.4556052">
            <text:p>175,4556052</text:p>
          </table:table-cell>
          <table:table-cell office:value-type="float" office:value="176.4651749">
            <text:p>176,4651749</text:p>
          </table:table-cell>
          <table:table-cell office:value-type="float" office:value="176.1390513">
            <text:p>176,1390513</text:p>
          </table:table-cell>
          <table:table-cell office:value-type="float" office:value="177.551625">
            <text:p>177,551625</text:p>
          </table:table-cell>
          <table:table-cell office:value-type="float" office:value="173.5397358">
            <text:p>173,5397358</text:p>
          </table:table-cell>
          <table:table-cell office:value-type="float" office:value="180.9426875">
            <text:p>180,9426875</text:p>
          </table:table-cell>
          <table:table-cell office:value-type="float" office:value="175.7123199">
            <text:p>175,7123199</text:p>
          </table:table-cell>
          <table:table-cell office:value-type="float" office:value="172.2179495">
            <text:p>172,2179495</text:p>
          </table:table-cell>
          <table:table-cell office:value-type="float" office:value="169.4529493">
            <text:p>169,4529493</text:p>
          </table:table-cell>
          <table:table-cell office:value-type="float" office:value="174.3867509">
            <text:p>174,3867509</text:p>
          </table:table-cell>
          <table:table-cell office:value-type="float" office:value="175.9225102">
            <text:p>175,9225102</text:p>
          </table:table-cell>
          <table:table-cell office:value-type="float" office:value="178.883002">
            <text:p>178,883002</text:p>
          </table:table-cell>
          <table:table-cell office:value-type="float" office:value="179.3507273">
            <text:p>179,3507273</text:p>
          </table:table-cell>
          <table:table-cell office:value-type="float" office:value="178.9443452">
            <text:p>178,9443452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77.044053">
            <text:p>177,044053</text:p>
          </table:table-cell>
          <table:table-cell office:value-type="float" office:value="175.6196117">
            <text:p>175,6196117</text:p>
          </table:table-cell>
          <table:table-cell office:value-type="float" office:value="176.6703686">
            <text:p>176,6703686</text:p>
          </table:table-cell>
          <table:table-cell office:value-type="float" office:value="176.2285432">
            <text:p>176,2285432</text:p>
          </table:table-cell>
          <table:table-cell office:value-type="float" office:value="177.7085377">
            <text:p>177,7085377</text:p>
          </table:table-cell>
          <table:table-cell office:value-type="float" office:value="173.7539073">
            <text:p>173,7539073</text:p>
          </table:table-cell>
          <table:table-cell office:value-type="float" office:value="181.1060846">
            <text:p>181,1060846</text:p>
          </table:table-cell>
          <table:table-cell office:value-type="float" office:value="175.8444854">
            <text:p>175,8444854</text:p>
          </table:table-cell>
          <table:table-cell office:value-type="float" office:value="172.4342402">
            <text:p>172,4342402</text:p>
          </table:table-cell>
          <table:table-cell office:value-type="float" office:value="169.6377697">
            <text:p>169,6377697</text:p>
          </table:table-cell>
          <table:table-cell office:value-type="float" office:value="174.5973274">
            <text:p>174,5973274</text:p>
          </table:table-cell>
          <table:table-cell office:value-type="float" office:value="176.036246">
            <text:p>176,036246</text:p>
          </table:table-cell>
          <table:table-cell office:value-type="float" office:value="179.0518365">
            <text:p>179,0518365</text:p>
          </table:table-cell>
          <table:table-cell office:value-type="float" office:value="179.4458243">
            <text:p>179,4458243</text:p>
          </table:table-cell>
          <table:table-cell office:value-type="float" office:value="179.0658689">
            <text:p>179,0658689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77.1549892">
            <text:p>177,1549892</text:p>
          </table:table-cell>
          <table:table-cell office:value-type="float" office:value="175.7834245">
            <text:p>175,7834245</text:p>
          </table:table-cell>
          <table:table-cell office:value-type="float" office:value="176.873567">
            <text:p>176,873567</text:p>
          </table:table-cell>
          <table:table-cell office:value-type="float" office:value="176.3188172">
            <text:p>176,3188172</text:p>
          </table:table-cell>
          <table:table-cell office:value-type="float" office:value="177.8609176">
            <text:p>177,8609176</text:p>
          </table:table-cell>
          <table:table-cell office:value-type="float" office:value="173.9657949">
            <text:p>173,9657949</text:p>
          </table:table-cell>
          <table:table-cell office:value-type="float" office:value="181.2624299">
            <text:p>181,2624299</text:p>
          </table:table-cell>
          <table:table-cell office:value-type="float" office:value="175.9740874">
            <text:p>175,9740874</text:p>
          </table:table-cell>
          <table:table-cell office:value-type="float" office:value="172.646601">
            <text:p>172,646601</text:p>
          </table:table-cell>
          <table:table-cell office:value-type="float" office:value="169.8215963">
            <text:p>169,8215963</text:p>
          </table:table-cell>
          <table:table-cell office:value-type="float" office:value="174.8031931">
            <text:p>174,8031931</text:p>
          </table:table-cell>
          <table:table-cell office:value-type="float" office:value="176.1504578">
            <text:p>176,1504578</text:p>
          </table:table-cell>
          <table:table-cell office:value-type="float" office:value="179.2181727">
            <text:p>179,2181727</text:p>
          </table:table-cell>
          <table:table-cell office:value-type="float" office:value="179.5345755">
            <text:p>179,5345755</text:p>
          </table:table-cell>
          <table:table-cell office:value-type="float" office:value="179.1830392">
            <text:p>179,1830392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77.2582041">
            <text:p>177,2582041</text:p>
          </table:table-cell>
          <table:table-cell office:value-type="float" office:value="175.9468041">
            <text:p>175,9468041</text:p>
          </table:table-cell>
          <table:table-cell office:value-type="float" office:value="177.0732933">
            <text:p>177,0732933</text:p>
          </table:table-cell>
          <table:table-cell office:value-type="float" office:value="176.4090638">
            <text:p>176,4090638</text:p>
          </table:table-cell>
          <table:table-cell office:value-type="float" office:value="178.007376">
            <text:p>178,007376</text:p>
          </table:table-cell>
          <table:table-cell office:value-type="float" office:value="174.1746833">
            <text:p>174,1746833</text:p>
          </table:table-cell>
          <table:table-cell office:value-type="float" office:value="181.4094265">
            <text:p>181,4094265</text:p>
          </table:table-cell>
          <table:table-cell office:value-type="float" office:value="176.0993405">
            <text:p>176,0993405</text:p>
          </table:table-cell>
          <table:table-cell office:value-type="float" office:value="172.854729">
            <text:p>172,854729</text:p>
          </table:table-cell>
          <table:table-cell office:value-type="float" office:value="170.0041766">
            <text:p>170,0041766</text:p>
          </table:table-cell>
          <table:table-cell office:value-type="float" office:value="175.0031">
            <text:p>175,0031</text:p>
          </table:table-cell>
          <table:table-cell office:value-type="float" office:value="176.26488">
            <text:p>176,26488</text:p>
          </table:table-cell>
          <table:table-cell office:value-type="float" office:value="179.3793229">
            <text:p>179,3793229</text:p>
          </table:table-cell>
          <table:table-cell office:value-type="float" office:value="179.6153564">
            <text:p>179,6153564</text:p>
          </table:table-cell>
          <table:table-cell office:value-type="float" office:value="179.2935812">
            <text:p>179,2935812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.3513465">
            <text:p>177,3513465</text:p>
          </table:table-cell>
          <table:table-cell office:value-type="float" office:value="176.1079783">
            <text:p>176,1079783</text:p>
          </table:table-cell>
          <table:table-cell office:value-type="float" office:value="177.2676627">
            <text:p>177,2676627</text:p>
          </table:table-cell>
          <table:table-cell office:value-type="float" office:value="176.4981227">
            <text:p>176,4981227</text:p>
          </table:table-cell>
          <table:table-cell office:value-type="float" office:value="178.1452934">
            <text:p>178,1452934</text:p>
          </table:table-cell>
          <table:table-cell office:value-type="float" office:value="174.3781937">
            <text:p>174,3781937</text:p>
          </table:table-cell>
          <table:table-cell office:value-type="float" office:value="181.5452083">
            <text:p>181,5452083</text:p>
          </table:table-cell>
          <table:table-cell office:value-type="float" office:value="176.2182102">
            <text:p>176,2182102</text:p>
          </table:table-cell>
          <table:table-cell office:value-type="float" office:value="173.0569086">
            <text:p>173,0569086</text:p>
          </table:table-cell>
          <table:table-cell office:value-type="float" office:value="170.1831145">
            <text:p>170,1831145</text:p>
          </table:table-cell>
          <table:table-cell office:value-type="float" office:value="175.1957175">
            <text:p>175,1957175</text:p>
          </table:table-cell>
          <table:table-cell office:value-type="float" office:value="176.3785632">
            <text:p>176,3785632</text:p>
          </table:table-cell>
          <table:table-cell office:value-type="float" office:value="179.532563">
            <text:p>179,532563</text:p>
          </table:table-cell>
          <table:table-cell office:value-type="float" office:value="179.6859275">
            <text:p>179,6859275</text:p>
          </table:table-cell>
          <table:table-cell office:value-type="float" office:value="179.3945377">
            <text:p>179,3945377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77.4314829">
            <text:p>177,4314829</text:p>
          </table:table-cell>
          <table:table-cell office:value-type="float" office:value="176.2636875">
            <text:p>176,2636875</text:p>
          </table:table-cell>
          <table:table-cell office:value-type="float" office:value="177.4530509">
            <text:p>177,4530509</text:p>
          </table:table-cell>
          <table:table-cell office:value-type="float" office:value="176.5832617">
            <text:p>176,5832617</text:p>
          </table:table-cell>
          <table:table-cell office:value-type="float" office:value="178.2715072">
            <text:p>178,2715072</text:p>
          </table:table-cell>
          <table:table-cell office:value-type="float" office:value="174.5723197">
            <text:p>174,5723197</text:p>
          </table:table-cell>
          <table:table-cell office:value-type="float" office:value="181.6664688">
            <text:p>181,6664688</text:p>
          </table:table-cell>
          <table:table-cell office:value-type="float" office:value="176.3275261">
            <text:p>176,3275261</text:p>
          </table:table-cell>
          <table:table-cell office:value-type="float" office:value="173.2500245">
            <text:p>173,2500245</text:p>
          </table:table-cell>
          <table:table-cell office:value-type="float" office:value="170.3559818">
            <text:p>170,3559818</text:p>
          </table:table-cell>
          <table:table-cell office:value-type="float" office:value="175.3777999">
            <text:p>175,3777999</text:p>
          </table:table-cell>
          <table:table-cell office:value-type="float" office:value="176.4890715">
            <text:p>176,4890715</text:p>
          </table:table-cell>
          <table:table-cell office:value-type="float" office:value="179.6737979">
            <text:p>179,6737979</text:p>
          </table:table-cell>
          <table:table-cell office:value-type="float" office:value="179.7438673">
            <text:p>179,7438673</text:p>
          </table:table-cell>
          <table:table-cell office:value-type="float" office:value="179.482912">
            <text:p>179,482912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77.4995447">
            <text:p>177,4995447</text:p>
          </table:table-cell>
          <table:table-cell office:value-type="float" office:value="176.4142748">
            <text:p>176,4142748</text:p>
          </table:table-cell>
          <table:table-cell office:value-type="float" office:value="177.6303224">
            <text:p>177,6303224</text:p>
          </table:table-cell>
          <table:table-cell office:value-type="float" office:value="176.6648876">
            <text:p>176,6648876</text:p>
          </table:table-cell>
          <table:table-cell office:value-type="float" office:value="178.38694">
            <text:p>178,38694</text:p>
          </table:table-cell>
          <table:table-cell office:value-type="float" office:value="174.756497">
            <text:p>174,756497</text:p>
          </table:table-cell>
          <table:table-cell office:value-type="float" office:value="181.7738923">
            <text:p>181,7738923</text:p>
          </table:table-cell>
          <table:table-cell office:value-type="float" office:value="176.4281476">
            <text:p>176,4281476</text:p>
          </table:table-cell>
          <table:table-cell office:value-type="float" office:value="173.4342061">
            <text:p>173,4342061</text:p>
          </table:table-cell>
          <table:table-cell office:value-type="float" office:value="170.5227412">
            <text:p>170,5227412</text:p>
          </table:table-cell>
          <table:table-cell office:value-type="float" office:value="175.5494504">
            <text:p>175,5494504</text:p>
          </table:table-cell>
          <table:table-cell office:value-type="float" office:value="176.5970666">
            <text:p>176,5970666</text:p>
          </table:table-cell>
          <table:table-cell office:value-type="float" office:value="179.8035177">
            <text:p>179,8035177</text:p>
          </table:table-cell>
          <table:table-cell office:value-type="float" office:value="179.7902157">
            <text:p>179,7902157</text:p>
          </table:table-cell>
          <table:table-cell office:value-type="float" office:value="179.5595311">
            <text:p>179,5595311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77.5574309">
            <text:p>177,5574309</text:p>
          </table:table-cell>
          <table:table-cell office:value-type="float" office:value="176.5611389">
            <text:p>176,5611389</text:p>
          </table:table-cell>
          <table:table-cell office:value-type="float" office:value="177.8010003">
            <text:p>177,8010003</text:p>
          </table:table-cell>
          <table:table-cell office:value-type="float" office:value="176.7432375">
            <text:p>176,7432375</text:p>
          </table:table-cell>
          <table:table-cell office:value-type="float" office:value="178.4934212">
            <text:p>178,4934212</text:p>
          </table:table-cell>
          <table:table-cell office:value-type="float" office:value="174.9318122">
            <text:p>174,9318122</text:p>
          </table:table-cell>
          <table:table-cell office:value-type="float" office:value="181.8693722">
            <text:p>181,8693722</text:p>
          </table:table-cell>
          <table:table-cell office:value-type="float" office:value="176.5216671">
            <text:p>176,5216671</text:p>
          </table:table-cell>
          <table:table-cell office:value-type="float" office:value="173.6114563">
            <text:p>173,6114563</text:p>
          </table:table-cell>
          <table:table-cell office:value-type="float" office:value="170.6850961">
            <text:p>170,6850961</text:p>
          </table:table-cell>
          <table:table-cell office:value-type="float" office:value="175.7119689">
            <text:p>175,7119689</text:p>
          </table:table-cell>
          <table:table-cell office:value-type="float" office:value="176.7028691">
            <text:p>176,7028691</text:p>
          </table:table-cell>
          <table:table-cell office:value-type="float" office:value="179.9232651">
            <text:p>179,9232651</text:p>
          </table:table-cell>
          <table:table-cell office:value-type="float" office:value="179.8276758">
            <text:p>179,8276758</text:p>
          </table:table-cell>
          <table:table-cell office:value-type="float" office:value="179.626319">
            <text:p>179,626319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77.6083681">
            <text:p>177,6083681</text:p>
          </table:table-cell>
          <table:table-cell office:value-type="float" office:value="176.7064704">
            <text:p>176,7064704</text:p>
          </table:table-cell>
          <table:table-cell office:value-type="float" office:value="177.9675697">
            <text:p>177,9675697</text:p>
          </table:table-cell>
          <table:table-cell office:value-type="float" office:value="176.8194354">
            <text:p>176,8194354</text:p>
          </table:table-cell>
          <table:table-cell office:value-type="float" office:value="178.5937876">
            <text:p>178,5937876</text:p>
          </table:table-cell>
          <table:table-cell office:value-type="float" office:value="175.1013061">
            <text:p>175,1013061</text:p>
          </table:table-cell>
          <table:table-cell office:value-type="float" office:value="181.9559459">
            <text:p>181,9559459</text:p>
          </table:table-cell>
          <table:table-cell office:value-type="float" office:value="176.6116422">
            <text:p>176,6116422</text:p>
          </table:table-cell>
          <table:table-cell office:value-type="float" office:value="173.7836344">
            <text:p>173,7836344</text:p>
          </table:table-cell>
          <table:table-cell office:value-type="float" office:value="170.8454772">
            <text:p>170,8454772</text:p>
          </table:table-cell>
          <table:table-cell office:value-type="float" office:value="175.8675939">
            <text:p>175,8675939</text:p>
          </table:table-cell>
          <table:table-cell office:value-type="float" office:value="176.8080998">
            <text:p>176,8080998</text:p>
          </table:table-cell>
          <table:table-cell office:value-type="float" office:value="180.0358703">
            <text:p>180,0358703</text:p>
          </table:table-cell>
          <table:table-cell office:value-type="float" office:value="179.8595123">
            <text:p>179,8595123</text:p>
          </table:table-cell>
          <table:table-cell office:value-type="float" office:value="179.6863753">
            <text:p>179,6863753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77.6542627">
            <text:p>177,6542627</text:p>
          </table:table-cell>
          <table:table-cell office:value-type="float" office:value="176.8522856">
            <text:p>176,8522856</text:p>
          </table:table-cell>
          <table:table-cell office:value-type="float" office:value="178.1315149">
            <text:p>178,1315149</text:p>
          </table:table-cell>
          <table:table-cell office:value-type="float" office:value="176.8945527">
            <text:p>176,8945527</text:p>
          </table:table-cell>
          <table:table-cell office:value-type="float" office:value="178.6899689">
            <text:p>178,6899689</text:p>
          </table:table-cell>
          <table:table-cell office:value-type="float" office:value="175.2666032">
            <text:p>175,2666032</text:p>
          </table:table-cell>
          <table:table-cell office:value-type="float" office:value="182.0356697">
            <text:p>182,0356697</text:p>
          </table:table-cell>
          <table:table-cell office:value-type="float" office:value="176.6997416">
            <text:p>176,6997416</text:p>
          </table:table-cell>
          <table:table-cell office:value-type="float" office:value="173.952673">
            <text:p>173,952673</text:p>
          </table:table-cell>
          <table:table-cell office:value-type="float" office:value="171.0056762">
            <text:p>171,0056762</text:p>
          </table:table-cell>
          <table:table-cell office:value-type="float" office:value="176.0183034">
            <text:p>176,0183034</text:p>
          </table:table-cell>
          <table:table-cell office:value-type="float" office:value="176.913804">
            <text:p>176,913804</text:p>
          </table:table-cell>
          <table:table-cell office:value-type="float" office:value="180.14337">
            <text:p>180,14337</text:p>
          </table:table-cell>
          <table:table-cell office:value-type="float" office:value="179.8881645">
            <text:p>179,8881645</text:p>
          </table:table-cell>
          <table:table-cell office:value-type="float" office:value="179.7413213">
            <text:p>179,7413213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77.6963515">
            <text:p>177,6963515</text:p>
          </table:table-cell>
          <table:table-cell office:value-type="float" office:value="177.0010275">
            <text:p>177,0010275</text:p>
          </table:table-cell>
          <table:table-cell office:value-type="float" office:value="178.2937896">
            <text:p>178,2937896</text:p>
          </table:table-cell>
          <table:table-cell office:value-type="float" office:value="176.9697486">
            <text:p>176,9697486</text:p>
          </table:table-cell>
          <table:table-cell office:value-type="float" office:value="178.7833267">
            <text:p>178,7833267</text:p>
          </table:table-cell>
          <table:table-cell office:value-type="float" office:value="175.4307201">
            <text:p>175,4307201</text:p>
          </table:table-cell>
          <table:table-cell office:value-type="float" office:value="182.1099604">
            <text:p>182,1099604</text:p>
          </table:table-cell>
          <table:table-cell office:value-type="float" office:value="176.7871826">
            <text:p>176,7871826</text:p>
          </table:table-cell>
          <table:table-cell office:value-type="float" office:value="174.1209539">
            <text:p>174,1209539</text:p>
          </table:table-cell>
          <table:table-cell office:value-type="float" office:value="171.1678573">
            <text:p>171,1678573</text:p>
          </table:table-cell>
          <table:table-cell office:value-type="float" office:value="176.1663228">
            <text:p>176,1663228</text:p>
          </table:table-cell>
          <table:table-cell office:value-type="float" office:value="177.0212245">
            <text:p>177,0212245</text:p>
          </table:table-cell>
          <table:table-cell office:value-type="float" office:value="180.247078">
            <text:p>180,247078</text:p>
          </table:table-cell>
          <table:table-cell office:value-type="float" office:value="179.9147789">
            <text:p>179,9147789</text:p>
          </table:table-cell>
          <table:table-cell office:value-type="float" office:value="179.7929885">
            <text:p>179,792988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77.7352994">
            <text:p>177,7352994</text:p>
          </table:table-cell>
          <table:table-cell office:value-type="float" office:value="177.1529294">
            <text:p>177,1529294</text:p>
          </table:table-cell>
          <table:table-cell office:value-type="float" office:value="178.455065">
            <text:p>178,455065</text:p>
          </table:table-cell>
          <table:table-cell office:value-type="float" office:value="177.044723">
            <text:p>177,044723</text:p>
          </table:table-cell>
          <table:table-cell office:value-type="float" office:value="178.8743159">
            <text:p>178,8743159</text:p>
          </table:table-cell>
          <table:table-cell office:value-type="float" office:value="175.5938574">
            <text:p>175,5938574</text:p>
          </table:table-cell>
          <table:table-cell office:value-type="float" office:value="182.1797291">
            <text:p>182,1797291</text:p>
          </table:table-cell>
          <table:table-cell office:value-type="float" office:value="176.8743001">
            <text:p>176,8743001</text:p>
          </table:table-cell>
          <table:table-cell office:value-type="float" office:value="174.2887801">
            <text:p>174,2887801</text:p>
          </table:table-cell>
          <table:table-cell office:value-type="float" office:value="171.3316828">
            <text:p>171,3316828</text:p>
          </table:table-cell>
          <table:table-cell office:value-type="float" office:value="176.3117325">
            <text:p>176,3117325</text:p>
          </table:table-cell>
          <table:table-cell office:value-type="float" office:value="177.1306161">
            <text:p>177,1306161</text:p>
          </table:table-cell>
          <table:table-cell office:value-type="float" office:value="180.3472984">
            <text:p>180,3472984</text:p>
          </table:table-cell>
          <table:table-cell office:value-type="float" office:value="179.9396874">
            <text:p>179,9396874</text:p>
          </table:table-cell>
          <table:table-cell office:value-type="float" office:value="179.8419333">
            <text:p>179,8419333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77.7710197">
            <text:p>177,7710197</text:p>
          </table:table-cell>
          <table:table-cell office:value-type="float" office:value="177.3064957">
            <text:p>177,3064957</text:p>
          </table:table-cell>
          <table:table-cell office:value-type="float" office:value="178.6150571">
            <text:p>178,6150571</text:p>
          </table:table-cell>
          <table:table-cell office:value-type="float" office:value="177.1190041">
            <text:p>177,1190041</text:p>
          </table:table-cell>
          <table:table-cell office:value-type="float" office:value="178.9619477">
            <text:p>178,9619477</text:p>
          </table:table-cell>
          <table:table-cell office:value-type="float" office:value="175.7550285">
            <text:p>175,7550285</text:p>
          </table:table-cell>
          <table:table-cell office:value-type="float" office:value="182.244994">
            <text:p>182,244994</text:p>
          </table:table-cell>
          <table:table-cell office:value-type="float" office:value="176.9611825">
            <text:p>176,9611825</text:p>
          </table:table-cell>
          <table:table-cell office:value-type="float" office:value="174.4555349">
            <text:p>174,4555349</text:p>
          </table:table-cell>
          <table:table-cell office:value-type="float" office:value="171.4948184">
            <text:p>171,4948184</text:p>
          </table:table-cell>
          <table:table-cell office:value-type="float" office:value="176.4532232">
            <text:p>176,4532232</text:p>
          </table:table-cell>
          <table:table-cell office:value-type="float" office:value="177.2414606">
            <text:p>177,2414606</text:p>
          </table:table-cell>
          <table:table-cell office:value-type="float" office:value="180.4436056">
            <text:p>180,4436056</text:p>
          </table:table-cell>
          <table:table-cell office:value-type="float" office:value="179.9631204">
            <text:p>179,9631204</text:p>
          </table:table-cell>
          <table:table-cell office:value-type="float" office:value="179.8876409">
            <text:p>179,8876409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77.8029217">
            <text:p>177,8029217</text:p>
          </table:table-cell>
          <table:table-cell office:value-type="float" office:value="177.4601843">
            <text:p>177,4601843</text:p>
          </table:table-cell>
          <table:table-cell office:value-type="float" office:value="178.773048">
            <text:p>178,773048</text:p>
          </table:table-cell>
          <table:table-cell office:value-type="float" office:value="177.1925166">
            <text:p>177,1925166</text:p>
          </table:table-cell>
          <table:table-cell office:value-type="float" office:value="179.0457399">
            <text:p>179,0457399</text:p>
          </table:table-cell>
          <table:table-cell office:value-type="float" office:value="175.91287">
            <text:p>175,91287</text:p>
          </table:table-cell>
          <table:table-cell office:value-type="float" office:value="182.3055826">
            <text:p>182,3055826</text:p>
          </table:table-cell>
          <table:table-cell office:value-type="float" office:value="177.0467684">
            <text:p>177,0467684</text:p>
          </table:table-cell>
          <table:table-cell office:value-type="float" office:value="174.619745">
            <text:p>174,619745</text:p>
          </table:table-cell>
          <table:table-cell office:value-type="float" office:value="171.6538931">
            <text:p>171,6538931</text:p>
          </table:table-cell>
          <table:table-cell office:value-type="float" office:value="176.5892236">
            <text:p>176,5892236</text:p>
          </table:table-cell>
          <table:table-cell office:value-type="float" office:value="177.3534252">
            <text:p>177,3534252</text:p>
          </table:table-cell>
          <table:table-cell office:value-type="float" office:value="180.5351775">
            <text:p>180,5351775</text:p>
          </table:table-cell>
          <table:table-cell office:value-type="float" office:value="179.9844993">
            <text:p>179,9844993</text:p>
          </table:table-cell>
          <table:table-cell office:value-type="float" office:value="179.92948">
            <text:p>179,92948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77.8299418">
            <text:p>177,8299418</text:p>
          </table:table-cell>
          <table:table-cell office:value-type="float" office:value="177.6121395">
            <text:p>177,6121395</text:p>
          </table:table-cell>
          <table:table-cell office:value-type="float" office:value="178.9278886">
            <text:p>178,9278886</text:p>
          </table:table-cell>
          <table:table-cell office:value-type="float" office:value="177.2645137">
            <text:p>177,2645137</text:p>
          </table:table-cell>
          <table:table-cell office:value-type="float" office:value="179.1243509">
            <text:p>179,1243509</text:p>
          </table:table-cell>
          <table:table-cell office:value-type="float" office:value="176.0657528">
            <text:p>176,0657528</text:p>
          </table:table-cell>
          <table:table-cell office:value-type="float" office:value="182.3605231">
            <text:p>182,3605231</text:p>
          </table:table-cell>
          <table:table-cell office:value-type="float" office:value="177.1300637">
            <text:p>177,1300637</text:p>
          </table:table-cell>
          <table:table-cell office:value-type="float" office:value="174.7796997">
            <text:p>174,7796997</text:p>
          </table:table-cell>
          <table:table-cell office:value-type="float" office:value="171.8063933">
            <text:p>171,8063933</text:p>
          </table:table-cell>
          <table:table-cell office:value-type="float" office:value="176.7178953">
            <text:p>176,7178953</text:p>
          </table:table-cell>
          <table:table-cell office:value-type="float" office:value="177.4657706">
            <text:p>177,4657706</text:p>
          </table:table-cell>
          <table:table-cell office:value-type="float" office:value="180.6209133">
            <text:p>180,6209133</text:p>
          </table:table-cell>
          <table:table-cell office:value-type="float" office:value="180.003022">
            <text:p>180,003022</text:p>
          </table:table-cell>
          <table:table-cell office:value-type="float" office:value="179.966267">
            <text:p>179,966267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77.8508375">
            <text:p>177,8508375</text:p>
          </table:table-cell>
          <table:table-cell office:value-type="float" office:value="177.7605037">
            <text:p>177,7605037</text:p>
          </table:table-cell>
          <table:table-cell office:value-type="float" office:value="179.07867">
            <text:p>179,07867</text:p>
          </table:table-cell>
          <table:table-cell office:value-type="float" office:value="177.3328557">
            <text:p>177,3328557</text:p>
          </table:table-cell>
          <table:table-cell office:value-type="float" office:value="179.1966958">
            <text:p>179,1966958</text:p>
          </table:table-cell>
          <table:table-cell office:value-type="float" office:value="176.2121946">
            <text:p>176,2121946</text:p>
          </table:table-cell>
          <table:table-cell office:value-type="float" office:value="182.4084548">
            <text:p>182,4084548</text:p>
          </table:table-cell>
          <table:table-cell office:value-type="float" office:value="177.2099068">
            <text:p>177,2099068</text:p>
          </table:table-cell>
          <table:table-cell office:value-type="float" office:value="174.9338546">
            <text:p>174,9338546</text:p>
          </table:table-cell>
          <table:table-cell office:value-type="float" office:value="171.9494896">
            <text:p>171,9494896</text:p>
          </table:table-cell>
          <table:table-cell office:value-type="float" office:value="176.8380024">
            <text:p>176,8380024</text:p>
          </table:table-cell>
          <table:table-cell office:value-type="float" office:value="177.5765093">
            <text:p>177,5765093</text:p>
          </table:table-cell>
          <table:table-cell office:value-type="float" office:value="180.6991991">
            <text:p>180,6991991</text:p>
          </table:table-cell>
          <table:table-cell office:value-type="float" office:value="180.0176035">
            <text:p>180,0176035</text:p>
          </table:table-cell>
          <table:table-cell office:value-type="float" office:value="179.9962293">
            <text:p>179,9962293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77.8646683">
            <text:p>177,8646683</text:p>
          </table:table-cell>
          <table:table-cell office:value-type="float" office:value="177.9032096">
            <text:p>177,9032096</text:p>
          </table:table-cell>
          <table:table-cell office:value-type="float" office:value="179.2239962">
            <text:p>179,2239962</text:p>
          </table:table-cell>
          <table:table-cell office:value-type="float" office:value="177.3961632">
            <text:p>177,3961632</text:p>
          </table:table-cell>
          <table:table-cell office:value-type="float" office:value="179.2616717">
            <text:p>179,2616717</text:p>
          </table:table-cell>
          <table:table-cell office:value-type="float" office:value="176.3497451">
            <text:p>176,3497451</text:p>
          </table:table-cell>
          <table:table-cell office:value-type="float" office:value="182.4488884">
            <text:p>182,4488884</text:p>
          </table:table-cell>
          <table:table-cell office:value-type="float" office:value="177.2849865">
            <text:p>177,2849865</text:p>
          </table:table-cell>
          <table:table-cell office:value-type="float" office:value="175.0798771">
            <text:p>175,0798771</text:p>
          </table:table-cell>
          <table:table-cell office:value-type="float" office:value="172.0801737">
            <text:p>172,0801737</text:p>
          </table:table-cell>
          <table:table-cell office:value-type="float" office:value="176.9470799">
            <text:p>176,9470799</text:p>
          </table:table-cell>
          <table:table-cell office:value-type="float" office:value="177.6837488">
            <text:p>177,6837488</text:p>
          </table:table-cell>
          <table:table-cell office:value-type="float" office:value="180.7695221">
            <text:p>180,7695221</text:p>
          </table:table-cell>
          <table:table-cell office:value-type="float" office:value="180.0277314">
            <text:p>180,0277314</text:p>
          </table:table-cell>
          <table:table-cell office:value-type="float" office:value="180.0187616">
            <text:p>180,0187616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77.8713446">
            <text:p>177,8713446</text:p>
          </table:table-cell>
          <table:table-cell office:value-type="float" office:value="178.0383826">
            <text:p>178,0383826</text:p>
          </table:table-cell>
          <table:table-cell office:value-type="float" office:value="179.3638345">
            <text:p>179,3638345</text:p>
          </table:table-cell>
          <table:table-cell office:value-type="float" office:value="177.4536396">
            <text:p>177,4536396</text:p>
          </table:table-cell>
          <table:table-cell office:value-type="float" office:value="179.3190943">
            <text:p>179,3190943</text:p>
          </table:table-cell>
          <table:table-cell office:value-type="float" office:value="176.4770467">
            <text:p>176,4770467</text:p>
          </table:table-cell>
          <table:table-cell office:value-type="float" office:value="182.4821343">
            <text:p>182,4821343</text:p>
          </table:table-cell>
          <table:table-cell office:value-type="float" office:value="177.3553965">
            <text:p>177,3553965</text:p>
          </table:table-cell>
          <table:table-cell office:value-type="float" office:value="175.215857">
            <text:p>175,215857</text:p>
          </table:table-cell>
          <table:table-cell office:value-type="float" office:value="172.195858">
            <text:p>172,195858</text:p>
          </table:table-cell>
          <table:table-cell office:value-type="float" office:value="177.0439138">
            <text:p>177,0439138</text:p>
          </table:table-cell>
          <table:table-cell office:value-type="float" office:value="177.7864762">
            <text:p>177,7864762</text:p>
          </table:table-cell>
          <table:table-cell office:value-type="float" office:value="180.8316913">
            <text:p>180,8316913</text:p>
          </table:table-cell>
          <table:table-cell office:value-type="float" office:value="180.0333945">
            <text:p>180,0333945</text:p>
          </table:table-cell>
          <table:table-cell office:value-type="float" office:value="180.0333705">
            <text:p>180,0333705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77.8707685">
            <text:p>177,8707685</text:p>
          </table:table-cell>
          <table:table-cell office:value-type="float" office:value="178.1643188">
            <text:p>178,1643188</text:p>
          </table:table-cell>
          <table:table-cell office:value-type="float" office:value="179.4977569">
            <text:p>179,4977569</text:p>
          </table:table-cell>
          <table:table-cell office:value-type="float" office:value="177.5035596">
            <text:p>177,5035596</text:p>
          </table:table-cell>
          <table:table-cell office:value-type="float" office:value="179.3688627">
            <text:p>179,3688627</text:p>
          </table:table-cell>
          <table:table-cell office:value-type="float" office:value="176.5930542">
            <text:p>176,5930542</text:p>
          </table:table-cell>
          <table:table-cell office:value-type="float" office:value="182.5078314">
            <text:p>182,5078314</text:p>
          </table:table-cell>
          <table:table-cell office:value-type="float" office:value="177.4209782">
            <text:p>177,4209782</text:p>
          </table:table-cell>
          <table:table-cell office:value-type="float" office:value="175.3406437">
            <text:p>175,3406437</text:p>
          </table:table-cell>
          <table:table-cell office:value-type="float" office:value="172.295371">
            <text:p>172,295371</text:p>
          </table:table-cell>
          <table:table-cell office:value-type="float" office:value="177.1271368">
            <text:p>177,1271368</text:p>
          </table:table-cell>
          <table:table-cell office:value-type="float" office:value="177.8830249">
            <text:p>177,8830249</text:p>
          </table:table-cell>
          <table:table-cell office:value-type="float" office:value="180.8855085">
            <text:p>180,8855085</text:p>
          </table:table-cell>
          <table:table-cell office:value-type="float" office:value="180.0340798">
            <text:p>180,0340798</text:p>
          </table:table-cell>
          <table:table-cell office:value-type="float" office:value="180.040321">
            <text:p>180,040321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77.8629093">
            <text:p>177,8629093</text:p>
          </table:table-cell>
          <table:table-cell office:value-type="float" office:value="178.2817871">
            <text:p>178,2817871</text:p>
          </table:table-cell>
          <table:table-cell office:value-type="float" office:value="179.6262204">
            <text:p>179,6262204</text:p>
          </table:table-cell>
          <table:table-cell office:value-type="float" office:value="177.5448974">
            <text:p>177,5448974</text:p>
          </table:table-cell>
          <table:table-cell office:value-type="float" office:value="179.4109153">
            <text:p>179,4109153</text:p>
          </table:table-cell>
          <table:table-cell office:value-type="float" office:value="176.697876">
            <text:p>176,697876</text:p>
          </table:table-cell>
          <table:table-cell office:value-type="float" office:value="182.5259788">
            <text:p>182,5259788</text:p>
          </table:table-cell>
          <table:table-cell office:value-type="float" office:value="177.4810247">
            <text:p>177,4810247</text:p>
          </table:table-cell>
          <table:table-cell office:value-type="float" office:value="175.4542426">
            <text:p>175,4542426</text:p>
          </table:table-cell>
          <table:table-cell office:value-type="float" office:value="172.3795437">
            <text:p>172,3795437</text:p>
          </table:table-cell>
          <table:table-cell office:value-type="float" office:value="177.1965682">
            <text:p>177,1965682</text:p>
          </table:table-cell>
          <table:table-cell office:value-type="float" office:value="177.9727495">
            <text:p>177,9727495</text:p>
          </table:table-cell>
          <table:table-cell office:value-type="float" office:value="180.9312669">
            <text:p>180,9312669</text:p>
          </table:table-cell>
          <table:table-cell office:value-type="float" office:value="180.0299095">
            <text:p>180,0299095</text:p>
          </table:table-cell>
          <table:table-cell office:value-type="float" office:value="180.0399135">
            <text:p>180,0399135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77.8497169">
            <text:p>177,8497169</text:p>
          </table:table-cell>
          <table:table-cell office:value-type="float" office:value="178.3906108">
            <text:p>178,3906108</text:p>
          </table:table-cell>
          <table:table-cell office:value-type="float" office:value="179.7500969">
            <text:p>179,7500969</text:p>
          </table:table-cell>
          <table:table-cell office:value-type="float" office:value="177.5780108">
            <text:p>177,5780108</text:p>
          </table:table-cell>
          <table:table-cell office:value-type="float" office:value="179.4476381">
            <text:p>179,4476381</text:p>
          </table:table-cell>
          <table:table-cell office:value-type="float" office:value="176.7926177">
            <text:p>176,7926177</text:p>
          </table:table-cell>
          <table:table-cell office:value-type="float" office:value="182.5379434">
            <text:p>182,5379434</text:p>
          </table:table-cell>
          <table:table-cell office:value-type="float" office:value="177.5375287">
            <text:p>177,5375287</text:p>
          </table:table-cell>
          <table:table-cell office:value-type="float" office:value="175.5572995">
            <text:p>175,5572995</text:p>
          </table:table-cell>
          <table:table-cell office:value-type="float" office:value="172.4503873">
            <text:p>172,4503873</text:p>
          </table:table-cell>
          <table:table-cell office:value-type="float" office:value="177.2534814">
            <text:p>177,2534814</text:p>
          </table:table-cell>
          <table:table-cell office:value-type="float" office:value="178.0558822">
            <text:p>178,0558822</text:p>
          </table:table-cell>
          <table:table-cell office:value-type="float" office:value="180.9708375">
            <text:p>180,9708375</text:p>
          </table:table-cell>
          <table:table-cell office:value-type="float" office:value="180.0219201">
            <text:p>180,0219201</text:p>
          </table:table-cell>
          <table:table-cell office:value-type="float" office:value="180.0341078">
            <text:p>180,0341078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77.8332362">
            <text:p>177,8332362</text:p>
          </table:table-cell>
          <table:table-cell office:value-type="float" office:value="178.4930513">
            <text:p>178,4930513</text:p>
          </table:table-cell>
          <table:table-cell office:value-type="float" office:value="179.871592">
            <text:p>179,871592</text:p>
          </table:table-cell>
          <table:table-cell office:value-type="float" office:value="177.6049462">
            <text:p>177,6049462</text:p>
          </table:table-cell>
          <table:table-cell office:value-type="float" office:value="179.480995">
            <text:p>179,480995</text:p>
          </table:table-cell>
          <table:table-cell office:value-type="float" office:value="176.8790491">
            <text:p>176,8790491</text:p>
          </table:table-cell>
          <table:table-cell office:value-type="float" office:value="182.5461596">
            <text:p>182,5461596</text:p>
          </table:table-cell>
          <table:table-cell office:value-type="float" office:value="177.5922921">
            <text:p>177,5922921</text:p>
          </table:table-cell>
          <table:table-cell office:value-type="float" office:value="175.6515022">
            <text:p>175,6515022</text:p>
          </table:table-cell>
          <table:table-cell office:value-type="float" office:value="172.5107117">
            <text:p>172,5107117</text:p>
          </table:table-cell>
          <table:table-cell office:value-type="float" office:value="177.3000344">
            <text:p>177,3000344</text:p>
          </table:table-cell>
          <table:table-cell office:value-type="float" office:value="178.1335538">
            <text:p>178,1335538</text:p>
          </table:table-cell>
          <table:table-cell office:value-type="float" office:value="181.0061598">
            <text:p>181,0061598</text:p>
          </table:table-cell>
          <table:table-cell office:value-type="float" office:value="180.0118158">
            <text:p>180,0118158</text:p>
          </table:table-cell>
          <table:table-cell office:value-type="float" office:value="180.0249891">
            <text:p>180,0249891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77.8156317">
            <text:p>177,8156317</text:p>
          </table:table-cell>
          <table:table-cell office:value-type="float" office:value="178.5923261">
            <text:p>178,5923261</text:p>
          </table:table-cell>
          <table:table-cell office:value-type="float" office:value="179.9927554">
            <text:p>179,9927554</text:p>
          </table:table-cell>
          <table:table-cell office:value-type="float" office:value="177.6274374">
            <text:p>177,6274374</text:p>
          </table:table-cell>
          <table:table-cell office:value-type="float" office:value="179.5133287">
            <text:p>179,5133287</text:p>
          </table:table-cell>
          <table:table-cell office:value-type="float" office:value="176.9604376">
            <text:p>176,9604376</text:p>
          </table:table-cell>
          <table:table-cell office:value-type="float" office:value="182.5529775">
            <text:p>182,5529775</text:p>
          </table:table-cell>
          <table:table-cell office:value-type="float" office:value="177.6471639">
            <text:p>177,6471639</text:p>
          </table:table-cell>
          <table:table-cell office:value-type="float" office:value="175.7402326">
            <text:p>175,7402326</text:p>
          </table:table-cell>
          <table:table-cell office:value-type="float" office:value="172.5650409">
            <text:p>172,5650409</text:p>
          </table:table-cell>
          <table:table-cell office:value-type="float" office:value="177.3398435">
            <text:p>177,3398435</text:p>
          </table:table-cell>
          <table:table-cell office:value-type="float" office:value="178.2072908">
            <text:p>178,2072908</text:p>
          </table:table-cell>
          <table:table-cell office:value-type="float" office:value="181.0394215">
            <text:p>181,0394215</text:p>
          </table:table-cell>
          <table:table-cell office:value-type="float" office:value="180.0015365">
            <text:p>180,0015365</text:p>
          </table:table-cell>
          <table:table-cell office:value-type="float" office:value="180.0147801">
            <text:p>180,0147801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77.7974356">
            <text:p>177,7974356</text:p>
          </table:table-cell>
          <table:table-cell office:value-type="float" office:value="178.6902994">
            <text:p>178,6902994</text:p>
          </table:table-cell>
          <table:table-cell office:value-type="float" office:value="180.1141103">
            <text:p>180,1141103</text:p>
          </table:table-cell>
          <table:table-cell office:value-type="float" office:value="177.6457127">
            <text:p>177,6457127</text:p>
          </table:table-cell>
          <table:table-cell office:value-type="float" office:value="179.5452226">
            <text:p>179,5452226</text:p>
          </table:table-cell>
          <table:table-cell office:value-type="float" office:value="177.0388938">
            <text:p>177,0388938</text:p>
          </table:table-cell>
          <table:table-cell office:value-type="float" office:value="182.5590746">
            <text:p>182,5590746</text:p>
          </table:table-cell>
          <table:table-cell office:value-type="float" office:value="177.7027418">
            <text:p>177,7027418</text:p>
          </table:table-cell>
          <table:table-cell office:value-type="float" office:value="175.8250681">
            <text:p>175,8250681</text:p>
          </table:table-cell>
          <table:table-cell office:value-type="float" office:value="172.6166975">
            <text:p>172,6166975</text:p>
          </table:table-cell>
          <table:table-cell office:value-type="float" office:value="177.3745008">
            <text:p>177,3745008</text:p>
          </table:table-cell>
          <table:table-cell office:value-type="float" office:value="178.2779727">
            <text:p>178,2779727</text:p>
          </table:table-cell>
          <table:table-cell office:value-type="float" office:value="181.0717483">
            <text:p>181,0717483</text:p>
          </table:table-cell>
          <table:table-cell office:value-type="float" office:value="179.9916243">
            <text:p>179,9916243</text:p>
          </table:table-cell>
          <table:table-cell office:value-type="float" office:value="180.0042833">
            <text:p>180,0042833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77.7781558">
            <text:p>177,7781558</text:p>
          </table:table-cell>
          <table:table-cell office:value-type="float" office:value="178.7857806">
            <text:p>178,7857806</text:p>
          </table:table-cell>
          <table:table-cell office:value-type="float" office:value="180.2350172">
            <text:p>180,2350172</text:p>
          </table:table-cell>
          <table:table-cell office:value-type="float" office:value="177.6585029">
            <text:p>177,6585029</text:p>
          </table:table-cell>
          <table:table-cell office:value-type="float" office:value="179.5762243">
            <text:p>179,5762243</text:p>
          </table:table-cell>
          <table:table-cell office:value-type="float" office:value="177.1136032">
            <text:p>177,1136032</text:p>
          </table:table-cell>
          <table:table-cell office:value-type="float" office:value="182.5638499">
            <text:p>182,5638499</text:p>
          </table:table-cell>
          <table:table-cell office:value-type="float" office:value="177.758559">
            <text:p>177,758559</text:p>
          </table:table-cell>
          <table:table-cell office:value-type="float" office:value="175.9055926">
            <text:p>175,9055926</text:p>
          </table:table-cell>
          <table:table-cell office:value-type="float" office:value="172.6646813">
            <text:p>172,6646813</text:p>
          </table:table-cell>
          <table:table-cell office:value-type="float" office:value="177.4027067">
            <text:p>177,4027067</text:p>
          </table:table-cell>
          <table:table-cell office:value-type="float" office:value="178.3442125">
            <text:p>178,3442125</text:p>
          </table:table-cell>
          <table:table-cell office:value-type="float" office:value="181.102544">
            <text:p>181,102544</text:p>
          </table:table-cell>
          <table:table-cell office:value-type="float" office:value="179.9809693">
            <text:p>179,9809693</text:p>
          </table:table-cell>
          <table:table-cell office:value-type="float" office:value="179.9927835">
            <text:p>179,992783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77.7567014">
            <text:p>177,7567014</text:p>
          </table:table-cell>
          <table:table-cell office:value-type="float" office:value="178.8772087">
            <text:p>178,8772087</text:p>
          </table:table-cell>
          <table:table-cell office:value-type="float" office:value="180.3543542">
            <text:p>180,3543542</text:p>
          </table:table-cell>
          <table:table-cell office:value-type="float" office:value="177.6649803">
            <text:p>177,6649803</text:p>
          </table:table-cell>
          <table:table-cell office:value-type="float" office:value="179.6054807">
            <text:p>179,6054807</text:p>
          </table:table-cell>
          <table:table-cell office:value-type="float" office:value="177.1833687">
            <text:p>177,1833687</text:p>
          </table:table-cell>
          <table:table-cell office:value-type="float" office:value="182.5668188">
            <text:p>182,5668188</text:p>
          </table:table-cell>
          <table:table-cell office:value-type="float" office:value="177.813354">
            <text:p>177,813354</text:p>
          </table:table-cell>
          <table:table-cell office:value-type="float" office:value="175.9804407">
            <text:p>175,9804407</text:p>
          </table:table-cell>
          <table:table-cell office:value-type="float" office:value="172.7073532">
            <text:p>172,7073532</text:p>
          </table:table-cell>
          <table:table-cell office:value-type="float" office:value="177.4234628">
            <text:p>177,4234628</text:p>
          </table:table-cell>
          <table:table-cell office:value-type="float" office:value="178.4055117">
            <text:p>178,4055117</text:p>
          </table:table-cell>
          <table:table-cell office:value-type="float" office:value="181.1313453">
            <text:p>181,1313453</text:p>
          </table:table-cell>
          <table:table-cell office:value-type="float" office:value="179.9686187">
            <text:p>179,9686187</text:p>
          </table:table-cell>
          <table:table-cell office:value-type="float" office:value="179.9792621">
            <text:p>179,9792621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77.7323642">
            <text:p>177,7323642</text:p>
          </table:table-cell>
          <table:table-cell office:value-type="float" office:value="178.9635396">
            <text:p>178,9635396</text:p>
          </table:table-cell>
          <table:table-cell office:value-type="float" office:value="180.4710825">
            <text:p>180,4710825</text:p>
          </table:table-cell>
          <table:table-cell office:value-type="float" office:value="177.6642649">
            <text:p>177,6642649</text:p>
          </table:table-cell>
          <table:table-cell office:value-type="float" office:value="179.6323078">
            <text:p>179,6323078</text:p>
          </table:table-cell>
          <table:table-cell office:value-type="float" office:value="177.2473389">
            <text:p>177,2473389</text:p>
          </table:table-cell>
          <table:table-cell office:value-type="float" office:value="182.5673089">
            <text:p>182,5673089</text:p>
          </table:table-cell>
          <table:table-cell office:value-type="float" office:value="177.8664009">
            <text:p>177,8664009</text:p>
          </table:table-cell>
          <table:table-cell office:value-type="float" office:value="176.0485017">
            <text:p>176,0485017</text:p>
          </table:table-cell>
          <table:table-cell office:value-type="float" office:value="172.7435542">
            <text:p>172,7435542</text:p>
          </table:table-cell>
          <table:table-cell office:value-type="float" office:value="177.4362182">
            <text:p>177,4362182</text:p>
          </table:table-cell>
          <table:table-cell office:value-type="float" office:value="178.4608228">
            <text:p>178,4608228</text:p>
          </table:table-cell>
          <table:table-cell office:value-type="float" office:value="181.1570049">
            <text:p>181,1570049</text:p>
          </table:table-cell>
          <table:table-cell office:value-type="float" office:value="179.9536005">
            <text:p>179,9536005</text:p>
          </table:table-cell>
          <table:table-cell office:value-type="float" office:value="179.9631407">
            <text:p>179,9631407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77.7053022">
            <text:p>177,7053022</text:p>
          </table:table-cell>
          <table:table-cell office:value-type="float" office:value="179.044761">
            <text:p>179,044761</text:p>
          </table:table-cell>
          <table:table-cell office:value-type="float" office:value="180.5853202">
            <text:p>180,5853202</text:p>
          </table:table-cell>
          <table:table-cell office:value-type="float" office:value="177.6571189">
            <text:p>177,6571189</text:p>
          </table:table-cell>
          <table:table-cell office:value-type="float" office:value="179.6568455">
            <text:p>179,6568455</text:p>
          </table:table-cell>
          <table:table-cell office:value-type="float" office:value="177.3056498">
            <text:p>177,3056498</text:p>
          </table:table-cell>
          <table:table-cell office:value-type="float" office:value="182.5656225">
            <text:p>182,5656225</text:p>
          </table:table-cell>
          <table:table-cell office:value-type="float" office:value="177.9179348">
            <text:p>177,9179348</text:p>
          </table:table-cell>
          <table:table-cell office:value-type="float" office:value="176.110101">
            <text:p>176,110101</text:p>
          </table:table-cell>
          <table:table-cell office:value-type="float" office:value="172.7735635">
            <text:p>172,7735635</text:p>
          </table:table-cell>
          <table:table-cell office:value-type="float" office:value="177.4412832">
            <text:p>177,4412832</text:p>
          </table:table-cell>
          <table:table-cell office:value-type="float" office:value="178.5108006">
            <text:p>178,5108006</text:p>
          </table:table-cell>
          <table:table-cell office:value-type="float" office:value="181.1802702">
            <text:p>181,1802702</text:p>
          </table:table-cell>
          <table:table-cell office:value-type="float" office:value="179.9361172">
            <text:p>179,9361172</text:p>
          </table:table-cell>
          <table:table-cell office:value-type="float" office:value="179.9447267">
            <text:p>179,9447267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77.675925">
            <text:p>177,675925</text:p>
          </table:table-cell>
          <table:table-cell office:value-type="float" office:value="179.1210771">
            <text:p>179,1210771</text:p>
          </table:table-cell>
          <table:table-cell office:value-type="float" office:value="180.696856">
            <text:p>180,696856</text:p>
          </table:table-cell>
          <table:table-cell office:value-type="float" office:value="177.6445007">
            <text:p>177,6445007</text:p>
          </table:table-cell>
          <table:table-cell office:value-type="float" office:value="179.6791791">
            <text:p>179,6791791</text:p>
          </table:table-cell>
          <table:table-cell office:value-type="float" office:value="177.3587805">
            <text:p>177,3587805</text:p>
          </table:table-cell>
          <table:table-cell office:value-type="float" office:value="182.5617825">
            <text:p>182,5617825</text:p>
          </table:table-cell>
          <table:table-cell office:value-type="float" office:value="177.967724">
            <text:p>177,967724</text:p>
          </table:table-cell>
          <table:table-cell office:value-type="float" office:value="176.1660381">
            <text:p>176,1660381</text:p>
          </table:table-cell>
          <table:table-cell office:value-type="float" office:value="172.7979581">
            <text:p>172,7979581</text:p>
          </table:table-cell>
          <table:table-cell office:value-type="float" office:value="177.4393785">
            <text:p>177,4393785</text:p>
          </table:table-cell>
          <table:table-cell office:value-type="float" office:value="178.5562954">
            <text:p>178,5562954</text:p>
          </table:table-cell>
          <table:table-cell office:value-type="float" office:value="181.2011708">
            <text:p>181,2011708</text:p>
          </table:table-cell>
          <table:table-cell office:value-type="float" office:value="179.9161686">
            <text:p>179,9161686</text:p>
          </table:table-cell>
          <table:table-cell office:value-type="float" office:value="179.9244583">
            <text:p>179,9244583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77.6452381">
            <text:p>177,6452381</text:p>
          </table:table-cell>
          <table:table-cell office:value-type="float" office:value="179.1934119">
            <text:p>179,1934119</text:p>
          </table:table-cell>
          <table:table-cell office:value-type="float" office:value="180.8068724">
            <text:p>180,8068724</text:p>
          </table:table-cell>
          <table:table-cell office:value-type="float" office:value="177.6280341">
            <text:p>177,6280341</text:p>
          </table:table-cell>
          <table:table-cell office:value-type="float" office:value="179.7004992">
            <text:p>179,7004992</text:p>
          </table:table-cell>
          <table:table-cell office:value-type="float" office:value="177.4079672">
            <text:p>177,4079672</text:p>
          </table:table-cell>
          <table:table-cell office:value-type="float" office:value="182.5568032">
            <text:p>182,5568032</text:p>
          </table:table-cell>
          <table:table-cell office:value-type="float" office:value="178.0166711">
            <text:p>178,0166711</text:p>
          </table:table-cell>
          <table:table-cell office:value-type="float" office:value="176.2177905">
            <text:p>176,2177905</text:p>
          </table:table-cell>
          <table:table-cell office:value-type="float" office:value="172.8176748">
            <text:p>172,8176748</text:p>
          </table:table-cell>
          <table:table-cell office:value-type="float" office:value="177.4319715">
            <text:p>177,4319715</text:p>
          </table:table-cell>
          <table:table-cell office:value-type="float" office:value="178.5987155">
            <text:p>178,5987155</text:p>
          </table:table-cell>
          <table:table-cell office:value-type="float" office:value="181.2208632">
            <text:p>181,2208632</text:p>
          </table:table-cell>
          <table:table-cell office:value-type="float" office:value="179.8948924">
            <text:p>179,8948924</text:p>
          </table:table-cell>
          <table:table-cell office:value-type="float" office:value="179.9030914">
            <text:p>179,9030914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77.6143945">
            <text:p>177,6143945</text:p>
          </table:table-cell>
          <table:table-cell office:value-type="float" office:value="179.2635752">
            <text:p>179,2635752</text:p>
          </table:table-cell>
          <table:table-cell office:value-type="float" office:value="180.9166799">
            <text:p>180,9166799</text:p>
          </table:table-cell>
          <table:table-cell office:value-type="float" office:value="177.6099487">
            <text:p>177,6099487</text:p>
          </table:table-cell>
          <table:table-cell office:value-type="float" office:value="179.7215956">
            <text:p>179,7215956</text:p>
          </table:table-cell>
          <table:table-cell office:value-type="float" office:value="177.4546931">
            <text:p>177,4546931</text:p>
          </table:table-cell>
          <table:table-cell office:value-type="float" office:value="182.5520976">
            <text:p>182,5520976</text:p>
          </table:table-cell>
          <table:table-cell office:value-type="float" office:value="178.0657581">
            <text:p>178,0657581</text:p>
          </table:table-cell>
          <table:table-cell office:value-type="float" office:value="176.2671077">
            <text:p>176,2671077</text:p>
          </table:table-cell>
          <table:table-cell office:value-type="float" office:value="172.8346068">
            <text:p>172,8346068</text:p>
          </table:table-cell>
          <table:table-cell office:value-type="float" office:value="177.4211838">
            <text:p>177,4211838</text:p>
          </table:table-cell>
          <table:table-cell office:value-type="float" office:value="178.639599">
            <text:p>178,639599</text:p>
          </table:table-cell>
          <table:table-cell office:value-type="float" office:value="181.2404634">
            <text:p>181,2404634</text:p>
          </table:table-cell>
          <table:table-cell office:value-type="float" office:value="179.8734877">
            <text:p>179,8734877</text:p>
          </table:table-cell>
          <table:table-cell office:value-type="float" office:value="179.8820711">
            <text:p>179,882071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77.5833994">
            <text:p>177,5833994</text:p>
          </table:table-cell>
          <table:table-cell office:value-type="float" office:value="179.3316545">
            <text:p>179,3316545</text:p>
          </table:table-cell>
          <table:table-cell office:value-type="float" office:value="181.0264971">
            <text:p>181,0264971</text:p>
          </table:table-cell>
          <table:table-cell office:value-type="float" office:value="177.590589">
            <text:p>177,590589</text:p>
          </table:table-cell>
          <table:table-cell office:value-type="float" office:value="179.7426337">
            <text:p>179,7426337</text:p>
          </table:table-cell>
          <table:table-cell office:value-type="float" office:value="177.4995803">
            <text:p>177,4995803</text:p>
          </table:table-cell>
          <table:table-cell office:value-type="float" office:value="182.5473681">
            <text:p>182,5473681</text:p>
          </table:table-cell>
          <table:table-cell office:value-type="float" office:value="178.1146">
            <text:p>178,1146</text:p>
          </table:table-cell>
          <table:table-cell office:value-type="float" office:value="176.3143434">
            <text:p>176,3143434</text:p>
          </table:table-cell>
          <table:table-cell office:value-type="float" office:value="172.8491913">
            <text:p>172,8491913</text:p>
          </table:table-cell>
          <table:table-cell office:value-type="float" office:value="177.4076051">
            <text:p>177,4076051</text:p>
          </table:table-cell>
          <table:table-cell office:value-type="float" office:value="178.6794729">
            <text:p>178,6794729</text:p>
          </table:table-cell>
          <table:table-cell office:value-type="float" office:value="181.259843">
            <text:p>181,259843</text:p>
          </table:table-cell>
          <table:table-cell office:value-type="float" office:value="179.8519072">
            <text:p>179,8519072</text:p>
          </table:table-cell>
          <table:table-cell office:value-type="float" office:value="179.8606128">
            <text:p>179,8606128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77.5527684">
            <text:p>177,5527684</text:p>
          </table:table-cell>
          <table:table-cell office:value-type="float" office:value="179.398853">
            <text:p>179,398853</text:p>
          </table:table-cell>
          <table:table-cell office:value-type="float" office:value="181.136911">
            <text:p>181,136911</text:p>
          </table:table-cell>
          <table:table-cell office:value-type="float" office:value="177.5717212">
            <text:p>177,5717212</text:p>
          </table:table-cell>
          <table:table-cell office:value-type="float" office:value="179.7643754">
            <text:p>179,7643754</text:p>
          </table:table-cell>
          <table:table-cell office:value-type="float" office:value="177.543999">
            <text:p>177,543999</text:p>
          </table:table-cell>
          <table:table-cell office:value-type="float" office:value="182.5435729">
            <text:p>182,5435729</text:p>
          </table:table-cell>
          <table:table-cell office:value-type="float" office:value="178.1642425">
            <text:p>178,1642425</text:p>
          </table:table-cell>
          <table:table-cell office:value-type="float" office:value="176.3607917">
            <text:p>176,3607917</text:p>
          </table:table-cell>
          <table:table-cell office:value-type="float" office:value="172.8630018">
            <text:p>172,8630018</text:p>
          </table:table-cell>
          <table:table-cell office:value-type="float" office:value="177.3926912">
            <text:p>177,3926912</text:p>
          </table:table-cell>
          <table:table-cell office:value-type="float" office:value="178.7195943">
            <text:p>178,7195943</text:p>
          </table:table-cell>
          <table:table-cell office:value-type="float" office:value="181.2793905">
            <text:p>181,2793905</text:p>
          </table:table-cell>
          <table:table-cell office:value-type="float" office:value="179.8306453">
            <text:p>179,8306453</text:p>
          </table:table-cell>
          <table:table-cell office:value-type="float" office:value="179.8399742">
            <text:p>179,8399742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77.523211">
            <text:p>177,523211</text:p>
          </table:table-cell>
          <table:table-cell office:value-type="float" office:value="179.4660546">
            <text:p>179,4660546</text:p>
          </table:table-cell>
          <table:table-cell office:value-type="float" office:value="181.248447">
            <text:p>181,248447</text:p>
          </table:table-cell>
          <table:table-cell office:value-type="float" office:value="177.5542158">
            <text:p>177,5542158</text:p>
          </table:table-cell>
          <table:table-cell office:value-type="float" office:value="179.7871678">
            <text:p>179,7871678</text:p>
          </table:table-cell>
          <table:table-cell office:value-type="float" office:value="177.5883487">
            <text:p>177,5883487</text:p>
          </table:table-cell>
          <table:table-cell office:value-type="float" office:value="182.5411272">
            <text:p>182,5411272</text:p>
          </table:table-cell>
          <table:table-cell office:value-type="float" office:value="178.2152231">
            <text:p>178,2152231</text:p>
          </table:table-cell>
          <table:table-cell office:value-type="float" office:value="176.4074264">
            <text:p>176,4074264</text:p>
          </table:table-cell>
          <table:table-cell office:value-type="float" office:value="172.8767824">
            <text:p>172,8767824</text:p>
          </table:table-cell>
          <table:table-cell office:value-type="float" office:value="177.3771998">
            <text:p>177,3771998</text:p>
          </table:table-cell>
          <table:table-cell office:value-type="float" office:value="178.7603726">
            <text:p>178,7603726</text:p>
          </table:table-cell>
          <table:table-cell office:value-type="float" office:value="181.299871">
            <text:p>181,299871</text:p>
          </table:table-cell>
          <table:table-cell office:value-type="float" office:value="179.8107319">
            <text:p>179,8107319</text:p>
          </table:table-cell>
          <table:table-cell office:value-type="float" office:value="179.8201535">
            <text:p>179,8201535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77.4943908">
            <text:p>177,4943908</text:p>
          </table:table-cell>
          <table:table-cell office:value-type="float" office:value="179.5334038">
            <text:p>179,5334038</text:p>
          </table:table-cell>
          <table:table-cell office:value-type="float" office:value="181.3609775">
            <text:p>181,3609775</text:p>
          </table:table-cell>
          <table:table-cell office:value-type="float" office:value="177.5379858">
            <text:p>177,5379858</text:p>
          </table:table-cell>
          <table:table-cell office:value-type="float" office:value="179.810659">
            <text:p>179,810659</text:p>
          </table:table-cell>
          <table:table-cell office:value-type="float" office:value="177.6328607">
            <text:p>177,6328607</text:p>
          </table:table-cell>
          <table:table-cell office:value-type="float" office:value="182.5395791">
            <text:p>182,5395791</text:p>
          </table:table-cell>
          <table:table-cell office:value-type="float" office:value="178.2673755">
            <text:p>178,2673755</text:p>
          </table:table-cell>
          <table:table-cell office:value-type="float" office:value="176.4542004">
            <text:p>176,4542004</text:p>
          </table:table-cell>
          <table:table-cell office:value-type="float" office:value="172.8906939">
            <text:p>172,8906939</text:p>
          </table:table-cell>
          <table:table-cell office:value-type="float" office:value="177.3618037">
            <text:p>177,3618037</text:p>
          </table:table-cell>
          <table:table-cell office:value-type="float" office:value="178.8016994">
            <text:p>178,8016994</text:p>
          </table:table-cell>
          <table:table-cell office:value-type="float" office:value="181.3209659">
            <text:p>181,3209659</text:p>
          </table:table-cell>
          <table:table-cell office:value-type="float" office:value="179.79218">
            <text:p>179,79218</text:p>
          </table:table-cell>
          <table:table-cell office:value-type="float" office:value="179.8013309">
            <text:p>179,8013309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77.4655077">
            <text:p>177,4655077</text:p>
          </table:table-cell>
          <table:table-cell office:value-type="float" office:value="179.6012731">
            <text:p>179,6012731</text:p>
          </table:table-cell>
          <table:table-cell office:value-type="float" office:value="181.4734049">
            <text:p>181,4734049</text:p>
          </table:table-cell>
          <table:table-cell office:value-type="float" office:value="177.5219971">
            <text:p>177,5219971</text:p>
          </table:table-cell>
          <table:table-cell office:value-type="float" office:value="179.8340093">
            <text:p>179,8340093</text:p>
          </table:table-cell>
          <table:table-cell office:value-type="float" office:value="177.6777128">
            <text:p>177,6777128</text:p>
          </table:table-cell>
          <table:table-cell office:value-type="float" office:value="182.538079">
            <text:p>182,538079</text:p>
          </table:table-cell>
          <table:table-cell office:value-type="float" office:value="178.3194867">
            <text:p>178,3194867</text:p>
          </table:table-cell>
          <table:table-cell office:value-type="float" office:value="176.5008117">
            <text:p>176,5008117</text:p>
          </table:table-cell>
          <table:table-cell office:value-type="float" office:value="172.9047741">
            <text:p>172,9047741</text:p>
          </table:table-cell>
          <table:table-cell office:value-type="float" office:value="177.3463873">
            <text:p>177,3463873</text:p>
          </table:table-cell>
          <table:table-cell office:value-type="float" office:value="178.8428432">
            <text:p>178,8428432</text:p>
          </table:table-cell>
          <table:table-cell office:value-type="float" office:value="181.342213">
            <text:p>181,342213</text:p>
          </table:table-cell>
          <table:table-cell office:value-type="float" office:value="179.7737811">
            <text:p>179,7737811</text:p>
          </table:table-cell>
          <table:table-cell office:value-type="float" office:value="179.7824974">
            <text:p>179,7824974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77.4365234">
            <text:p>177,4365234</text:p>
          </table:table-cell>
          <table:table-cell office:value-type="float" office:value="179.6695034">
            <text:p>179,6695034</text:p>
          </table:table-cell>
          <table:table-cell office:value-type="float" office:value="181.5861054">
            <text:p>181,5861054</text:p>
          </table:table-cell>
          <table:table-cell office:value-type="float" office:value="177.5063676">
            <text:p>177,5063676</text:p>
          </table:table-cell>
          <table:table-cell office:value-type="float" office:value="179.8575895">
            <text:p>179,8575895</text:p>
          </table:table-cell>
          <table:table-cell office:value-type="float" office:value="177.7227248">
            <text:p>177,7227248</text:p>
          </table:table-cell>
          <table:table-cell office:value-type="float" office:value="182.5367685">
            <text:p>182,5367685</text:p>
          </table:table-cell>
          <table:table-cell office:value-type="float" office:value="178.371826">
            <text:p>178,371826</text:p>
          </table:table-cell>
          <table:table-cell office:value-type="float" office:value="176.5473603">
            <text:p>176,5473603</text:p>
          </table:table-cell>
          <table:table-cell office:value-type="float" office:value="172.9188729">
            <text:p>172,9188729</text:p>
          </table:table-cell>
          <table:table-cell office:value-type="float" office:value="177.3311674">
            <text:p>177,3311674</text:p>
          </table:table-cell>
          <table:table-cell office:value-type="float" office:value="178.8840801">
            <text:p>178,8840801</text:p>
          </table:table-cell>
          <table:table-cell office:value-type="float" office:value="181.3637978">
            <text:p>181,3637978</text:p>
          </table:table-cell>
          <table:table-cell office:value-type="float" office:value="179.7553137">
            <text:p>179,7553137</text:p>
          </table:table-cell>
          <table:table-cell office:value-type="float" office:value="179.7637247">
            <text:p>179,7637247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77.4077047">
            <text:p>177,4077047</text:p>
          </table:table-cell>
          <table:table-cell office:value-type="float" office:value="179.7379129">
            <text:p>179,7379129</text:p>
          </table:table-cell>
          <table:table-cell office:value-type="float" office:value="181.698803">
            <text:p>181,698803</text:p>
          </table:table-cell>
          <table:table-cell office:value-type="float" office:value="177.4901885">
            <text:p>177,4901885</text:p>
          </table:table-cell>
          <table:table-cell office:value-type="float" office:value="179.8811774">
            <text:p>179,8811774</text:p>
          </table:table-cell>
          <table:table-cell office:value-type="float" office:value="177.7676279">
            <text:p>177,7676279</text:p>
          </table:table-cell>
          <table:table-cell office:value-type="float" office:value="182.5353792">
            <text:p>182,5353792</text:p>
          </table:table-cell>
          <table:table-cell office:value-type="float" office:value="178.42409">
            <text:p>178,42409</text:p>
          </table:table-cell>
          <table:table-cell office:value-type="float" office:value="176.5938671">
            <text:p>176,5938671</text:p>
          </table:table-cell>
          <table:table-cell office:value-type="float" office:value="172.9328818">
            <text:p>172,9328818</text:p>
          </table:table-cell>
          <table:table-cell office:value-type="float" office:value="177.3160349">
            <text:p>177,3160349</text:p>
          </table:table-cell>
          <table:table-cell office:value-type="float" office:value="178.9251638">
            <text:p>178,9251638</text:p>
          </table:table-cell>
          <table:table-cell office:value-type="float" office:value="181.3850802">
            <text:p>181,3850802</text:p>
          </table:table-cell>
          <table:table-cell office:value-type="float" office:value="179.7370423">
            <text:p>179,7370423</text:p>
          </table:table-cell>
          <table:table-cell office:value-type="float" office:value="179.7451045">
            <text:p>179,7451045</text:p>
          </table:table-cell>
        </table:table-row>
      </table:table>
      <table:table table:name="Women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Austria</text:p>
          </table:table-cell>
          <table:table-cell office:value-type="string">
            <text:p>France</text:p>
          </table:table-cell>
          <table:table-cell office:value-type="string">
            <text:p>Belgium</text:p>
          </table:table-cell>
          <table:table-cell office:value-type="string">
            <text:p>United Kingdom</text:p>
          </table:table-cell>
          <table:table-cell office:value-type="string">
            <text:p>Germany</text:p>
          </table:table-cell>
          <table:table-cell office:value-type="string">
            <text:p>Italy</text:p>
          </table:table-cell>
          <table:table-cell office:value-type="string">
            <text:p>Netherland</text:p>
          </table:table-cell>
          <table:table-cell office:value-type="string">
            <text:p>Swizterland</text:p>
          </table:table-cell>
          <table:table-cell office:value-type="string">
            <text:p>Spain</text:p>
          </table:table-cell>
          <table:table-cell office:value-type="string">
            <text:p>Portugal</text:p>
          </table:table-cell>
          <table:table-cell office:value-type="string">
            <text:p>Greece</text:p>
          </table:table-cell>
          <table:table-cell office:value-type="string">
            <text:p>Ireland</text:p>
          </table:table-cell>
          <table:table-cell office:value-type="string">
            <text:p>Denmark</text:p>
          </table:table-cell>
          <table:table-cell office:value-type="string">
            <text:p>Sweden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float" office:value="8.8">
            <text:p>8,8</text:p>
          </table:table-cell>
          <table:table-cell office:value-type="float" office:value="67">
            <text:p>67</text:p>
          </table:table-cell>
          <table:table-cell office:value-type="float" office:value="11.4">
            <text:p>11,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5">
            <text:p>5</text:p>
          </table:table-cell>
          <table:table-cell office:value-type="float" office:value="5.8">
            <text:p>5,8</text:p>
          </table:table-cell>
          <table:table-cell office:value-type="float" office:value="10.2">
            <text:p>10,2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157.5529094">
            <text:p>157,5529094</text:p>
          </table:table-cell>
          <table:table-cell office:value-type="float" office:value="155.3419373">
            <text:p>155,3419373</text:p>
          </table:table-cell>
          <table:table-cell office:value-type="float" office:value="155.4215595">
            <text:p>155,4215595</text:p>
          </table:table-cell>
          <table:table-cell office:value-type="float" office:value="153.3825074">
            <text:p>153,3825074</text:p>
          </table:table-cell>
          <table:table-cell office:value-type="float" office:value="155.9932746">
            <text:p>155,9932746</text:p>
          </table:table-cell>
          <table:table-cell office:value-type="float" office:value="153.5036757">
            <text:p>153,5036757</text:p>
          </table:table-cell>
          <table:table-cell office:value-type="float" office:value="154.8244089">
            <text:p>154,8244089</text:p>
          </table:table-cell>
          <table:table-cell office:value-type="float" office:value="157.5345007">
            <text:p>157,5345007</text:p>
          </table:table-cell>
          <table:table-cell office:value-type="float" office:value="151.1089341">
            <text:p>151,1089341</text:p>
          </table:table-cell>
          <table:table-cell office:value-type="float" office:value="150.4601817">
            <text:p>150,4601817</text:p>
          </table:table-cell>
          <table:table-cell office:value-type="float" office:value="150.5700312">
            <text:p>150,5700312</text:p>
          </table:table-cell>
          <table:table-cell office:value-type="float" office:value="153.9522376">
            <text:p>153,9522376</text:p>
          </table:table-cell>
          <table:table-cell office:value-type="float" office:value="157.1216086">
            <text:p>157,1216086</text:p>
          </table:table-cell>
          <table:table-cell office:value-type="float" office:value="160.2885432">
            <text:p>160,2885432</text:p>
          </table:table-cell>
          <table:table-cell office:value-type="float" office:value="159.2222603">
            <text:p>159,2222603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157.6698096">
            <text:p>157,6698096</text:p>
          </table:table-cell>
          <table:table-cell office:value-type="float" office:value="155.4282538">
            <text:p>155,4282538</text:p>
          </table:table-cell>
          <table:table-cell office:value-type="float" office:value="155.54613">
            <text:p>155,54613</text:p>
          </table:table-cell>
          <table:table-cell office:value-type="float" office:value="153.5385136">
            <text:p>153,5385136</text:p>
          </table:table-cell>
          <table:table-cell office:value-type="float" office:value="156.1364217">
            <text:p>156,1364217</text:p>
          </table:table-cell>
          <table:table-cell office:value-type="float" office:value="153.5592917">
            <text:p>153,5592917</text:p>
          </table:table-cell>
          <table:table-cell office:value-type="float" office:value="155.0730403">
            <text:p>155,0730403</text:p>
          </table:table-cell>
          <table:table-cell office:value-type="float" office:value="157.6297038">
            <text:p>157,6297038</text:p>
          </table:table-cell>
          <table:table-cell office:value-type="float" office:value="151.1867574">
            <text:p>151,1867574</text:p>
          </table:table-cell>
          <table:table-cell office:value-type="float" office:value="150.5779282">
            <text:p>150,5779282</text:p>
          </table:table-cell>
          <table:table-cell office:value-type="float" office:value="150.6862882">
            <text:p>150,6862882</text:p>
          </table:table-cell>
          <table:table-cell office:value-type="float" office:value="154.073935">
            <text:p>154,073935</text:p>
          </table:table-cell>
          <table:table-cell office:value-type="float" office:value="157.2804089">
            <text:p>157,2804089</text:p>
          </table:table-cell>
          <table:table-cell office:value-type="float" office:value="160.3694662">
            <text:p>160,3694662</text:p>
          </table:table-cell>
          <table:table-cell office:value-type="float" office:value="159.3410731">
            <text:p>159,3410731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157.7868538">
            <text:p>157,7868538</text:p>
          </table:table-cell>
          <table:table-cell office:value-type="float" office:value="155.5146964">
            <text:p>155,5146964</text:p>
          </table:table-cell>
          <table:table-cell office:value-type="float" office:value="155.6711245">
            <text:p>155,6711245</text:p>
          </table:table-cell>
          <table:table-cell office:value-type="float" office:value="153.6948023">
            <text:p>153,6948023</text:p>
          </table:table-cell>
          <table:table-cell office:value-type="float" office:value="156.2798526">
            <text:p>156,2798526</text:p>
          </table:table-cell>
          <table:table-cell office:value-type="float" office:value="153.6154102">
            <text:p>153,6154102</text:p>
          </table:table-cell>
          <table:table-cell office:value-type="float" office:value="155.3217254">
            <text:p>155,3217254</text:p>
          </table:table-cell>
          <table:table-cell office:value-type="float" office:value="157.725303">
            <text:p>157,725303</text:p>
          </table:table-cell>
          <table:table-cell office:value-type="float" office:value="151.2648009">
            <text:p>151,2648009</text:p>
          </table:table-cell>
          <table:table-cell office:value-type="float" office:value="150.6958757">
            <text:p>150,6958757</text:p>
          </table:table-cell>
          <table:table-cell office:value-type="float" office:value="150.8028581">
            <text:p>150,8028581</text:p>
          </table:table-cell>
          <table:table-cell office:value-type="float" office:value="154.1958372">
            <text:p>154,1958372</text:p>
          </table:table-cell>
          <table:table-cell office:value-type="float" office:value="157.4394506">
            <text:p>157,4394506</text:p>
          </table:table-cell>
          <table:table-cell office:value-type="float" office:value="160.4505368">
            <text:p>160,4505368</text:p>
          </table:table-cell>
          <table:table-cell office:value-type="float" office:value="159.4600008">
            <text:p>159,4600008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157.9038708">
            <text:p>157,9038708</text:p>
          </table:table-cell>
          <table:table-cell office:value-type="float" office:value="155.6011667">
            <text:p>155,6011667</text:p>
          </table:table-cell>
          <table:table-cell office:value-type="float" office:value="155.7962293">
            <text:p>155,7962293</text:p>
          </table:table-cell>
          <table:table-cell office:value-type="float" office:value="153.851085">
            <text:p>153,851085</text:p>
          </table:table-cell>
          <table:table-cell office:value-type="float" office:value="156.4234504">
            <text:p>156,4234504</text:p>
          </table:table-cell>
          <table:table-cell office:value-type="float" office:value="153.6716324">
            <text:p>153,6716324</text:p>
          </table:table-cell>
          <table:table-cell office:value-type="float" office:value="155.5706178">
            <text:p>155,5706178</text:p>
          </table:table-cell>
          <table:table-cell office:value-type="float" office:value="157.8208181">
            <text:p>157,8208181</text:p>
          </table:table-cell>
          <table:table-cell office:value-type="float" office:value="151.3429404">
            <text:p>151,3429404</text:p>
          </table:table-cell>
          <table:table-cell office:value-type="float" office:value="150.8139103">
            <text:p>150,8139103</text:p>
          </table:table-cell>
          <table:table-cell office:value-type="float" office:value="150.9195425">
            <text:p>150,9195425</text:p>
          </table:table-cell>
          <table:table-cell office:value-type="float" office:value="154.317889">
            <text:p>154,317889</text:p>
          </table:table-cell>
          <table:table-cell office:value-type="float" office:value="157.5983894">
            <text:p>157,5983894</text:p>
          </table:table-cell>
          <table:table-cell office:value-type="float" office:value="160.5316655">
            <text:p>160,5316655</text:p>
          </table:table-cell>
          <table:table-cell office:value-type="float" office:value="159.578978">
            <text:p>159,578978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58.021106">
            <text:p>158,021106</text:p>
          </table:table-cell>
          <table:table-cell office:value-type="float" office:value="155.6877357">
            <text:p>155,6877357</text:p>
          </table:table-cell>
          <table:table-cell office:value-type="float" office:value="155.9214835">
            <text:p>155,9214835</text:p>
          </table:table-cell>
          <table:table-cell office:value-type="float" office:value="154.0074689">
            <text:p>154,0074689</text:p>
          </table:table-cell>
          <table:table-cell office:value-type="float" office:value="156.5670377">
            <text:p>156,5670377</text:p>
          </table:table-cell>
          <table:table-cell office:value-type="float" office:value="153.7282805">
            <text:p>153,7282805</text:p>
          </table:table-cell>
          <table:table-cell office:value-type="float" office:value="155.8198618">
            <text:p>155,8198618</text:p>
          </table:table-cell>
          <table:table-cell office:value-type="float" office:value="157.916473">
            <text:p>157,916473</text:p>
          </table:table-cell>
          <table:table-cell office:value-type="float" office:value="151.4209403">
            <text:p>151,4209403</text:p>
          </table:table-cell>
          <table:table-cell office:value-type="float" office:value="150.9322859">
            <text:p>150,9322859</text:p>
          </table:table-cell>
          <table:table-cell office:value-type="float" office:value="151.0367515">
            <text:p>151,0367515</text:p>
          </table:table-cell>
          <table:table-cell office:value-type="float" office:value="154.4400836">
            <text:p>154,4400836</text:p>
          </table:table-cell>
          <table:table-cell office:value-type="float" office:value="157.7576068">
            <text:p>157,7576068</text:p>
          </table:table-cell>
          <table:table-cell office:value-type="float" office:value="160.6127281">
            <text:p>160,6127281</text:p>
          </table:table-cell>
          <table:table-cell office:value-type="float" office:value="159.6979406">
            <text:p>159,6979406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58.1384551">
            <text:p>158,1384551</text:p>
          </table:table-cell>
          <table:table-cell office:value-type="float" office:value="155.7743466">
            <text:p>155,7743466</text:p>
          </table:table-cell>
          <table:table-cell office:value-type="float" office:value="156.0467984">
            <text:p>156,0467984</text:p>
          </table:table-cell>
          <table:table-cell office:value-type="float" office:value="154.1638684">
            <text:p>154,1638684</text:p>
          </table:table-cell>
          <table:table-cell office:value-type="float" office:value="156.710836">
            <text:p>156,710836</text:p>
          </table:table-cell>
          <table:table-cell office:value-type="float" office:value="153.7851417">
            <text:p>153,7851417</text:p>
          </table:table-cell>
          <table:table-cell office:value-type="float" office:value="156.0692324">
            <text:p>156,0692324</text:p>
          </table:table-cell>
          <table:table-cell office:value-type="float" office:value="158.0119755">
            <text:p>158,0119755</text:p>
          </table:table-cell>
          <table:table-cell office:value-type="float" office:value="151.4992208">
            <text:p>151,4992208</text:p>
          </table:table-cell>
          <table:table-cell office:value-type="float" office:value="151.0510463">
            <text:p>151,0510463</text:p>
          </table:table-cell>
          <table:table-cell office:value-type="float" office:value="151.1543307">
            <text:p>151,1543307</text:p>
          </table:table-cell>
          <table:table-cell office:value-type="float" office:value="154.5623486">
            <text:p>154,5623486</text:p>
          </table:table-cell>
          <table:table-cell office:value-type="float" office:value="157.9169877">
            <text:p>157,9169877</text:p>
          </table:table-cell>
          <table:table-cell office:value-type="float" office:value="160.6938507">
            <text:p>160,6938507</text:p>
          </table:table-cell>
          <table:table-cell office:value-type="float" office:value="159.8168293">
            <text:p>159,8168293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58.2559738">
            <text:p>158,2559738</text:p>
          </table:table-cell>
          <table:table-cell office:value-type="float" office:value="155.8612243">
            <text:p>155,8612243</text:p>
          </table:table-cell>
          <table:table-cell office:value-type="float" office:value="156.1721453">
            <text:p>156,1721453</text:p>
          </table:table-cell>
          <table:table-cell office:value-type="float" office:value="154.3206616">
            <text:p>154,3206616</text:p>
          </table:table-cell>
          <table:table-cell office:value-type="float" office:value="156.8547384">
            <text:p>156,8547384</text:p>
          </table:table-cell>
          <table:table-cell office:value-type="float" office:value="153.8423186">
            <text:p>153,8423186</text:p>
          </table:table-cell>
          <table:table-cell office:value-type="float" office:value="156.3188759">
            <text:p>156,3188759</text:p>
          </table:table-cell>
          <table:table-cell office:value-type="float" office:value="158.1077274">
            <text:p>158,1077274</text:p>
          </table:table-cell>
          <table:table-cell office:value-type="float" office:value="151.577607">
            <text:p>151,577607</text:p>
          </table:table-cell>
          <table:table-cell office:value-type="float" office:value="151.1699415">
            <text:p>151,1699415</text:p>
          </table:table-cell>
          <table:table-cell office:value-type="float" office:value="151.2719371">
            <text:p>151,2719371</text:p>
          </table:table-cell>
          <table:table-cell office:value-type="float" office:value="154.6848861">
            <text:p>154,6848861</text:p>
          </table:table-cell>
          <table:table-cell office:value-type="float" office:value="158.0768241">
            <text:p>158,0768241</text:p>
          </table:table-cell>
          <table:table-cell office:value-type="float" office:value="160.7749016">
            <text:p>160,7749016</text:p>
          </table:table-cell>
          <table:table-cell office:value-type="float" office:value="159.9359332">
            <text:p>159,9359332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58.3725888">
            <text:p>158,3725888</text:p>
          </table:table-cell>
          <table:table-cell office:value-type="float" office:value="155.947717">
            <text:p>155,947717</text:p>
          </table:table-cell>
          <table:table-cell office:value-type="float" office:value="156.2969141">
            <text:p>156,2969141</text:p>
          </table:table-cell>
          <table:table-cell office:value-type="float" office:value="154.4775133">
            <text:p>154,4775133</text:p>
          </table:table-cell>
          <table:table-cell office:value-type="float" office:value="156.998017">
            <text:p>156,998017</text:p>
          </table:table-cell>
          <table:table-cell office:value-type="float" office:value="153.8991264">
            <text:p>153,8991264</text:p>
          </table:table-cell>
          <table:table-cell office:value-type="float" office:value="156.5679418">
            <text:p>156,5679418</text:p>
          </table:table-cell>
          <table:table-cell office:value-type="float" office:value="158.2027977">
            <text:p>158,2027977</text:p>
          </table:table-cell>
          <table:table-cell office:value-type="float" office:value="151.656084">
            <text:p>151,656084</text:p>
          </table:table-cell>
          <table:table-cell office:value-type="float" office:value="151.2887991">
            <text:p>151,2887991</text:p>
          </table:table-cell>
          <table:table-cell office:value-type="float" office:value="151.3895297">
            <text:p>151,3895297</text:p>
          </table:table-cell>
          <table:table-cell office:value-type="float" office:value="154.8075646">
            <text:p>154,8075646</text:p>
          </table:table-cell>
          <table:table-cell office:value-type="float" office:value="158.2358476">
            <text:p>158,2358476</text:p>
          </table:table-cell>
          <table:table-cell office:value-type="float" office:value="160.8553679">
            <text:p>160,8553679</text:p>
          </table:table-cell>
          <table:table-cell office:value-type="float" office:value="160.0541224">
            <text:p>160,0541224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58.4880325">
            <text:p>158,4880325</text:p>
          </table:table-cell>
          <table:table-cell office:value-type="float" office:value="156.0336071">
            <text:p>156,0336071</text:p>
          </table:table-cell>
          <table:table-cell office:value-type="float" office:value="156.4210825">
            <text:p>156,4210825</text:p>
          </table:table-cell>
          <table:table-cell office:value-type="float" office:value="154.6342536">
            <text:p>154,6342536</text:p>
          </table:table-cell>
          <table:table-cell office:value-type="float" office:value="157.1404748">
            <text:p>157,1404748</text:p>
          </table:table-cell>
          <table:table-cell office:value-type="float" office:value="153.9558199">
            <text:p>153,9558199</text:p>
          </table:table-cell>
          <table:table-cell office:value-type="float" office:value="156.8159809">
            <text:p>156,8159809</text:p>
          </table:table-cell>
          <table:table-cell office:value-type="float" office:value="158.2970201">
            <text:p>158,2970201</text:p>
          </table:table-cell>
          <table:table-cell office:value-type="float" office:value="151.734375">
            <text:p>151,734375</text:p>
          </table:table-cell>
          <table:table-cell office:value-type="float" office:value="151.4074252">
            <text:p>151,4074252</text:p>
          </table:table-cell>
          <table:table-cell office:value-type="float" office:value="151.5067335">
            <text:p>151,5067335</text:p>
          </table:table-cell>
          <table:table-cell office:value-type="float" office:value="154.929815">
            <text:p>154,929815</text:p>
          </table:table-cell>
          <table:table-cell office:value-type="float" office:value="158.3938253">
            <text:p>158,3938253</text:p>
          </table:table-cell>
          <table:table-cell office:value-type="float" office:value="160.9350797">
            <text:p>160,9350797</text:p>
          </table:table-cell>
          <table:table-cell office:value-type="float" office:value="160.171332">
            <text:p>160,171332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58.6029272">
            <text:p>158,6029272</text:p>
          </table:table-cell>
          <table:table-cell office:value-type="float" office:value="156.1198725">
            <text:p>156,1198725</text:p>
          </table:table-cell>
          <table:table-cell office:value-type="float" office:value="156.5445584">
            <text:p>156,5445584</text:p>
          </table:table-cell>
          <table:table-cell office:value-type="float" office:value="154.7910074">
            <text:p>154,7910074</text:p>
          </table:table-cell>
          <table:table-cell office:value-type="float" office:value="157.282202">
            <text:p>157,282202</text:p>
          </table:table-cell>
          <table:table-cell office:value-type="float" office:value="154.0132677">
            <text:p>154,0132677</text:p>
          </table:table-cell>
          <table:table-cell office:value-type="float" office:value="157.0638227">
            <text:p>157,0638227</text:p>
          </table:table-cell>
          <table:table-cell office:value-type="float" office:value="158.3906615">
            <text:p>158,3906615</text:p>
          </table:table-cell>
          <table:table-cell office:value-type="float" office:value="151.8126216">
            <text:p>151,8126216</text:p>
          </table:table-cell>
          <table:table-cell office:value-type="float" office:value="151.526153">
            <text:p>151,526153</text:p>
          </table:table-cell>
          <table:table-cell office:value-type="float" office:value="151.6241847">
            <text:p>151,6241847</text:p>
          </table:table-cell>
          <table:table-cell office:value-type="float" office:value="155.052008">
            <text:p>155,052008</text:p>
          </table:table-cell>
          <table:table-cell office:value-type="float" office:value="158.551208">
            <text:p>158,551208</text:p>
          </table:table-cell>
          <table:table-cell office:value-type="float" office:value="161.0141425">
            <text:p>161,0141425</text:p>
          </table:table-cell>
          <table:table-cell office:value-type="float" office:value="160.2877661">
            <text:p>160,2877661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58.7175308">
            <text:p>158,7175308</text:p>
          </table:table-cell>
          <table:table-cell office:value-type="float" office:value="156.2064749">
            <text:p>156,2064749</text:p>
          </table:table-cell>
          <table:table-cell office:value-type="float" office:value="156.6678416">
            <text:p>156,6678416</text:p>
          </table:table-cell>
          <table:table-cell office:value-type="float" office:value="154.948308">
            <text:p>154,948308</text:p>
          </table:table-cell>
          <table:table-cell office:value-type="float" office:value="157.4237313">
            <text:p>157,4237313</text:p>
          </table:table-cell>
          <table:table-cell office:value-type="float" office:value="154.0724202">
            <text:p>154,0724202</text:p>
          </table:table-cell>
          <table:table-cell office:value-type="float" office:value="157.3116903">
            <text:p>157,3116903</text:p>
          </table:table-cell>
          <table:table-cell office:value-type="float" office:value="158.4837241">
            <text:p>158,4837241</text:p>
          </table:table-cell>
          <table:table-cell office:value-type="float" office:value="151.8916829">
            <text:p>151,8916829</text:p>
          </table:table-cell>
          <table:table-cell office:value-type="float" office:value="151.6460648">
            <text:p>151,6460648</text:p>
          </table:table-cell>
          <table:table-cell office:value-type="float" office:value="151.7421915">
            <text:p>151,7421915</text:p>
          </table:table-cell>
          <table:table-cell office:value-type="float" office:value="155.1747901">
            <text:p>155,1747901</text:p>
          </table:table-cell>
          <table:table-cell office:value-type="float" office:value="158.7085889">
            <text:p>158,7085889</text:p>
          </table:table-cell>
          <table:table-cell office:value-type="float" office:value="161.0927501">
            <text:p>161,0927501</text:p>
          </table:table-cell>
          <table:table-cell office:value-type="float" office:value="160.403683">
            <text:p>160,403683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58.8319814">
            <text:p>158,8319814</text:p>
          </table:table-cell>
          <table:table-cell office:value-type="float" office:value="156.2944925">
            <text:p>156,2944925</text:p>
          </table:table-cell>
          <table:table-cell office:value-type="float" office:value="156.790872">
            <text:p>156,790872</text:p>
          </table:table-cell>
          <table:table-cell office:value-type="float" office:value="155.1065651">
            <text:p>155,1065651</text:p>
          </table:table-cell>
          <table:table-cell office:value-type="float" office:value="157.5652195">
            <text:p>157,5652195</text:p>
          </table:table-cell>
          <table:table-cell office:value-type="float" office:value="154.1339852">
            <text:p>154,1339852</text:p>
          </table:table-cell>
          <table:table-cell office:value-type="float" office:value="157.5596784">
            <text:p>157,5596784</text:p>
          </table:table-cell>
          <table:table-cell office:value-type="float" office:value="158.5767251">
            <text:p>158,5767251</text:p>
          </table:table-cell>
          <table:table-cell office:value-type="float" office:value="151.9721722">
            <text:p>151,9721722</text:p>
          </table:table-cell>
          <table:table-cell office:value-type="float" office:value="151.7673798">
            <text:p>151,7673798</text:p>
          </table:table-cell>
          <table:table-cell office:value-type="float" office:value="151.8616193">
            <text:p>151,8616193</text:p>
          </table:table-cell>
          <table:table-cell office:value-type="float" office:value="155.2984411">
            <text:p>155,2984411</text:p>
          </table:table-cell>
          <table:table-cell office:value-type="float" office:value="158.8659281">
            <text:p>158,8659281</text:p>
          </table:table-cell>
          <table:table-cell office:value-type="float" office:value="161.1710712">
            <text:p>161,1710712</text:p>
          </table:table-cell>
          <table:table-cell office:value-type="float" office:value="160.5196058">
            <text:p>160,5196058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58.9463937">
            <text:p>158,9463937</text:p>
          </table:table-cell>
          <table:table-cell office:value-type="float" office:value="156.38418">
            <text:p>156,38418</text:p>
          </table:table-cell>
          <table:table-cell office:value-type="float" office:value="156.914065">
            <text:p>156,914065</text:p>
          </table:table-cell>
          <table:table-cell office:value-type="float" office:value="155.2657038">
            <text:p>155,2657038</text:p>
          </table:table-cell>
          <table:table-cell office:value-type="float" office:value="157.7067264">
            <text:p>157,7067264</text:p>
          </table:table-cell>
          <table:table-cell office:value-type="float" office:value="154.1988454">
            <text:p>154,1988454</text:p>
          </table:table-cell>
          <table:table-cell office:value-type="float" office:value="157.8079681">
            <text:p>157,8079681</text:p>
          </table:table-cell>
          <table:table-cell office:value-type="float" office:value="158.6698634">
            <text:p>158,6698634</text:p>
          </table:table-cell>
          <table:table-cell office:value-type="float" office:value="152.0545963">
            <text:p>152,0545963</text:p>
          </table:table-cell>
          <table:table-cell office:value-type="float" office:value="151.8905054">
            <text:p>151,8905054</text:p>
          </table:table-cell>
          <table:table-cell office:value-type="float" office:value="151.9829806">
            <text:p>151,9829806</text:p>
          </table:table-cell>
          <table:table-cell office:value-type="float" office:value="155.4229126">
            <text:p>155,4229126</text:p>
          </table:table-cell>
          <table:table-cell office:value-type="float" office:value="159.0235551">
            <text:p>159,0235551</text:p>
          </table:table-cell>
          <table:table-cell office:value-type="float" office:value="161.2495263">
            <text:p>161,2495263</text:p>
          </table:table-cell>
          <table:table-cell office:value-type="float" office:value="160.6356282">
            <text:p>160,6356282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59.0612413">
            <text:p>159,0612413</text:p>
          </table:table-cell>
          <table:table-cell office:value-type="float" office:value="156.4766245">
            <text:p>156,4766245</text:p>
          </table:table-cell>
          <table:table-cell office:value-type="float" office:value="157.0375526">
            <text:p>157,0375526</text:p>
          </table:table-cell>
          <table:table-cell office:value-type="float" office:value="155.4258732">
            <text:p>155,4258732</text:p>
          </table:table-cell>
          <table:table-cell office:value-type="float" office:value="157.849008">
            <text:p>157,849008</text:p>
          </table:table-cell>
          <table:table-cell office:value-type="float" office:value="154.2680935">
            <text:p>154,2680935</text:p>
          </table:table-cell>
          <table:table-cell office:value-type="float" office:value="158.0570364">
            <text:p>158,0570364</text:p>
          </table:table-cell>
          <table:table-cell office:value-type="float" office:value="158.7636001">
            <text:p>158,7636001</text:p>
          </table:table-cell>
          <table:table-cell office:value-type="float" office:value="152.140536">
            <text:p>152,140536</text:p>
          </table:table-cell>
          <table:table-cell office:value-type="float" office:value="152.0164608">
            <text:p>152,0164608</text:p>
          </table:table-cell>
          <table:table-cell office:value-type="float" office:value="152.1072367">
            <text:p>152,1072367</text:p>
          </table:table-cell>
          <table:table-cell office:value-type="float" office:value="155.5485339">
            <text:p>155,5485339</text:p>
          </table:table-cell>
          <table:table-cell office:value-type="float" office:value="159.1816697">
            <text:p>159,1816697</text:p>
          </table:table-cell>
          <table:table-cell office:value-type="float" office:value="161.32831">
            <text:p>161,32831</text:p>
          </table:table-cell>
          <table:table-cell office:value-type="float" office:value="160.7524557">
            <text:p>160,7524557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59.1782603">
            <text:p>159,1782603</text:p>
          </table:table-cell>
          <table:table-cell office:value-type="float" office:value="156.5733935">
            <text:p>156,5733935</text:p>
          </table:table-cell>
          <table:table-cell office:value-type="float" office:value="157.1631244">
            <text:p>157,1631244</text:p>
          </table:table-cell>
          <table:table-cell office:value-type="float" office:value="155.5900527">
            <text:p>155,5900527</text:p>
          </table:table-cell>
          <table:table-cell office:value-type="float" office:value="157.9936886">
            <text:p>157,9936886</text:p>
          </table:table-cell>
          <table:table-cell office:value-type="float" office:value="154.3438859">
            <text:p>154,3438859</text:p>
          </table:table-cell>
          <table:table-cell office:value-type="float" office:value="158.3085268">
            <text:p>158,3085268</text:p>
          </table:table-cell>
          <table:table-cell office:value-type="float" office:value="158.8595181">
            <text:p>158,8595181</text:p>
          </table:table-cell>
          <table:table-cell office:value-type="float" office:value="152.2314089">
            <text:p>152,2314089</text:p>
          </table:table-cell>
          <table:table-cell office:value-type="float" office:value="152.146888">
            <text:p>152,146888</text:p>
          </table:table-cell>
          <table:table-cell office:value-type="float" office:value="152.2361138">
            <text:p>152,2361138</text:p>
          </table:table-cell>
          <table:table-cell office:value-type="float" office:value="155.6774254">
            <text:p>155,6774254</text:p>
          </table:table-cell>
          <table:table-cell office:value-type="float" office:value="159.3420993">
            <text:p>159,3420993</text:p>
          </table:table-cell>
          <table:table-cell office:value-type="float" office:value="161.409136">
            <text:p>161,409136</text:p>
          </table:table-cell>
          <table:table-cell office:value-type="float" office:value="160.8716555">
            <text:p>160,8716555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59.299327">
            <text:p>159,299327</text:p>
          </table:table-cell>
          <table:table-cell office:value-type="float" office:value="156.676427">
            <text:p>156,676427</text:p>
          </table:table-cell>
          <table:table-cell office:value-type="float" office:value="157.2929691">
            <text:p>157,2929691</text:p>
          </table:table-cell>
          <table:table-cell office:value-type="float" office:value="155.760144">
            <text:p>155,760144</text:p>
          </table:table-cell>
          <table:table-cell office:value-type="float" office:value="158.1425612">
            <text:p>158,1425612</text:p>
          </table:table-cell>
          <table:table-cell office:value-type="float" office:value="154.4285387">
            <text:p>154,4285387</text:p>
          </table:table-cell>
          <table:table-cell office:value-type="float" office:value="158.5646516">
            <text:p>158,5646516</text:p>
          </table:table-cell>
          <table:table-cell office:value-type="float" office:value="158.9593359">
            <text:p>158,9593359</text:p>
          </table:table-cell>
          <table:table-cell office:value-type="float" office:value="152.3289819">
            <text:p>152,3289819</text:p>
          </table:table-cell>
          <table:table-cell office:value-type="float" office:value="152.283536">
            <text:p>152,283536</text:p>
          </table:table-cell>
          <table:table-cell office:value-type="float" office:value="152.3716283">
            <text:p>152,3716283</text:p>
          </table:table-cell>
          <table:table-cell office:value-type="float" office:value="155.8112767">
            <text:p>155,8112767</text:p>
          </table:table-cell>
          <table:table-cell office:value-type="float" office:value="159.5069334">
            <text:p>159,5069334</text:p>
          </table:table-cell>
          <table:table-cell office:value-type="float" office:value="161.4938884">
            <text:p>161,4938884</text:p>
          </table:table-cell>
          <table:table-cell office:value-type="float" office:value="160.9955405">
            <text:p>160,9955405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59.4255042">
            <text:p>159,4255042</text:p>
          </table:table-cell>
          <table:table-cell office:value-type="float" office:value="156.7864904">
            <text:p>156,7864904</text:p>
          </table:table-cell>
          <table:table-cell office:value-type="float" office:value="157.4283047">
            <text:p>157,4283047</text:p>
          </table:table-cell>
          <table:table-cell office:value-type="float" office:value="155.9377831">
            <text:p>155,9377831</text:p>
          </table:table-cell>
          <table:table-cell office:value-type="float" office:value="158.296376">
            <text:p>158,296376</text:p>
          </table:table-cell>
          <table:table-cell office:value-type="float" office:value="154.523198">
            <text:p>154,523198</text:p>
          </table:table-cell>
          <table:table-cell office:value-type="float" office:value="158.8259754">
            <text:p>158,8259754</text:p>
          </table:table-cell>
          <table:table-cell office:value-type="float" office:value="159.063834">
            <text:p>159,063834</text:p>
          </table:table-cell>
          <table:table-cell office:value-type="float" office:value="152.4343213">
            <text:p>152,4343213</text:p>
          </table:table-cell>
          <table:table-cell office:value-type="float" office:value="152.4275162">
            <text:p>152,4275162</text:p>
          </table:table-cell>
          <table:table-cell office:value-type="float" office:value="152.5145172">
            <text:p>152,5145172</text:p>
          </table:table-cell>
          <table:table-cell office:value-type="float" office:value="155.9509624">
            <text:p>155,9509624</text:p>
          </table:table-cell>
          <table:table-cell office:value-type="float" office:value="159.6767079">
            <text:p>159,6767079</text:p>
          </table:table-cell>
          <table:table-cell office:value-type="float" office:value="161.583372">
            <text:p>161,583372</text:p>
          </table:table-cell>
          <table:table-cell office:value-type="float" office:value="161.1250787">
            <text:p>161,1250787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59.556721">
            <text:p>159,556721</text:p>
          </table:table-cell>
          <table:table-cell office:value-type="float" office:value="156.9036695">
            <text:p>156,9036695</text:p>
          </table:table-cell>
          <table:table-cell office:value-type="float" office:value="157.5691419">
            <text:p>157,5691419</text:p>
          </table:table-cell>
          <table:table-cell office:value-type="float" office:value="156.1232072">
            <text:p>156,1232072</text:p>
          </table:table-cell>
          <table:table-cell office:value-type="float" office:value="158.4550959">
            <text:p>158,4550959</text:p>
          </table:table-cell>
          <table:table-cell office:value-type="float" office:value="154.6276701">
            <text:p>154,6276701</text:p>
          </table:table-cell>
          <table:table-cell office:value-type="float" office:value="159.0921688">
            <text:p>159,0921688</text:p>
          </table:table-cell>
          <table:table-cell office:value-type="float" office:value="159.1729752">
            <text:p>159,1729752</text:p>
          </table:table-cell>
          <table:table-cell office:value-type="float" office:value="152.5479278">
            <text:p>152,5479278</text:p>
          </table:table-cell>
          <table:table-cell office:value-type="float" office:value="152.5787261">
            <text:p>152,5787261</text:p>
          </table:table-cell>
          <table:table-cell office:value-type="float" office:value="152.6650383">
            <text:p>152,6650383</text:p>
          </table:table-cell>
          <table:table-cell office:value-type="float" office:value="156.096884">
            <text:p>156,096884</text:p>
          </table:table-cell>
          <table:table-cell office:value-type="float" office:value="159.8515642">
            <text:p>159,8515642</text:p>
          </table:table-cell>
          <table:table-cell office:value-type="float" office:value="161.6777215">
            <text:p>161,6777215</text:p>
          </table:table-cell>
          <table:table-cell office:value-type="float" office:value="161.2603222">
            <text:p>161,2603222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59.6930222">
            <text:p>159,6930222</text:p>
          </table:table-cell>
          <table:table-cell office:value-type="float" office:value="157.0285919">
            <text:p>157,0285919</text:p>
          </table:table-cell>
          <table:table-cell office:value-type="float" office:value="157.7157018">
            <text:p>157,7157018</text:p>
          </table:table-cell>
          <table:table-cell office:value-type="float" office:value="156.3161202">
            <text:p>156,3161202</text:p>
          </table:table-cell>
          <table:table-cell office:value-type="float" office:value="158.6187757">
            <text:p>158,6187757</text:p>
          </table:table-cell>
          <table:table-cell office:value-type="float" office:value="154.7431879">
            <text:p>154,7431879</text:p>
          </table:table-cell>
          <table:table-cell office:value-type="float" office:value="159.3625099">
            <text:p>159,3625099</text:p>
          </table:table-cell>
          <table:table-cell office:value-type="float" office:value="159.2865472">
            <text:p>159,2865472</text:p>
          </table:table-cell>
          <table:table-cell office:value-type="float" office:value="152.6706817">
            <text:p>152,6706817</text:p>
          </table:table-cell>
          <table:table-cell office:value-type="float" office:value="152.738316">
            <text:p>152,738316</text:p>
          </table:table-cell>
          <table:table-cell office:value-type="float" office:value="152.8243057">
            <text:p>152,8243057</text:p>
          </table:table-cell>
          <table:table-cell office:value-type="float" office:value="156.2490114">
            <text:p>156,2490114</text:p>
          </table:table-cell>
          <table:table-cell office:value-type="float" office:value="160.0311836">
            <text:p>160,0311836</text:p>
          </table:table-cell>
          <table:table-cell office:value-type="float" office:value="161.7764981">
            <text:p>161,7764981</text:p>
          </table:table-cell>
          <table:table-cell office:value-type="float" office:value="161.4001132">
            <text:p>161,4001132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59.8338595">
            <text:p>159,8338595</text:p>
          </table:table-cell>
          <table:table-cell office:value-type="float" office:value="157.1611434">
            <text:p>157,1611434</text:p>
          </table:table-cell>
          <table:table-cell office:value-type="float" office:value="157.8671345">
            <text:p>157,8671345</text:p>
          </table:table-cell>
          <table:table-cell office:value-type="float" office:value="156.515847">
            <text:p>156,515847</text:p>
          </table:table-cell>
          <table:table-cell office:value-type="float" office:value="158.7866708">
            <text:p>158,7866708</text:p>
          </table:table-cell>
          <table:table-cell office:value-type="float" office:value="154.86934">
            <text:p>154,86934</text:p>
          </table:table-cell>
          <table:table-cell office:value-type="float" office:value="159.6365593">
            <text:p>159,6365593</text:p>
          </table:table-cell>
          <table:table-cell office:value-type="float" office:value="159.4044247">
            <text:p>159,4044247</text:p>
          </table:table-cell>
          <table:table-cell office:value-type="float" office:value="152.8026407">
            <text:p>152,8026407</text:p>
          </table:table-cell>
          <table:table-cell office:value-type="float" office:value="152.9063343">
            <text:p>152,9063343</text:p>
          </table:table-cell>
          <table:table-cell office:value-type="float" office:value="152.9920939">
            <text:p>152,9920939</text:p>
          </table:table-cell>
          <table:table-cell office:value-type="float" office:value="156.4068052">
            <text:p>156,4068052</text:p>
          </table:table-cell>
          <table:table-cell office:value-type="float" office:value="160.2150365">
            <text:p>160,2150365</text:p>
          </table:table-cell>
          <table:table-cell office:value-type="float" office:value="161.8791834">
            <text:p>161,8791834</text:p>
          </table:table-cell>
          <table:table-cell office:value-type="float" office:value="161.543441">
            <text:p>161,543441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59.9773057">
            <text:p>159,9773057</text:p>
          </table:table-cell>
          <table:table-cell office:value-type="float" office:value="157.3008802">
            <text:p>157,3008802</text:p>
          </table:table-cell>
          <table:table-cell office:value-type="float" office:value="158.0218339">
            <text:p>158,0218339</text:p>
          </table:table-cell>
          <table:table-cell office:value-type="float" office:value="156.7213262">
            <text:p>156,7213262</text:p>
          </table:table-cell>
          <table:table-cell office:value-type="float" office:value="158.9575897">
            <text:p>158,9575897</text:p>
          </table:table-cell>
          <table:table-cell office:value-type="float" office:value="155.0051699">
            <text:p>155,0051699</text:p>
          </table:table-cell>
          <table:table-cell office:value-type="float" office:value="159.9124416">
            <text:p>159,9124416</text:p>
          </table:table-cell>
          <table:table-cell office:value-type="float" office:value="159.5245221">
            <text:p>159,5245221</text:p>
          </table:table-cell>
          <table:table-cell office:value-type="float" office:value="152.9431262">
            <text:p>152,9431262</text:p>
          </table:table-cell>
          <table:table-cell office:value-type="float" office:value="153.0820413">
            <text:p>153,0820413</text:p>
          </table:table-cell>
          <table:table-cell office:value-type="float" office:value="153.1675033">
            <text:p>153,1675033</text:p>
          </table:table-cell>
          <table:table-cell office:value-type="float" office:value="156.5694189">
            <text:p>156,5694189</text:p>
          </table:table-cell>
          <table:table-cell office:value-type="float" office:value="160.4018023">
            <text:p>160,4018023</text:p>
          </table:table-cell>
          <table:table-cell office:value-type="float" office:value="161.9844121">
            <text:p>161,9844121</text:p>
          </table:table-cell>
          <table:table-cell office:value-type="float" office:value="161.6882272">
            <text:p>161,6882272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60.1223832">
            <text:p>160,1223832</text:p>
          </table:table-cell>
          <table:table-cell office:value-type="float" office:value="157.4462949">
            <text:p>157,4462949</text:p>
          </table:table-cell>
          <table:table-cell office:value-type="float" office:value="158.1785006">
            <text:p>158,1785006</text:p>
          </table:table-cell>
          <table:table-cell office:value-type="float" office:value="156.9313527">
            <text:p>156,9313527</text:p>
          </table:table-cell>
          <table:table-cell office:value-type="float" office:value="159.1301533">
            <text:p>159,1301533</text:p>
          </table:table-cell>
          <table:table-cell office:value-type="float" office:value="155.1492987">
            <text:p>155,1492987</text:p>
          </table:table-cell>
          <table:table-cell office:value-type="float" office:value="160.1881968">
            <text:p>160,1881968</text:p>
          </table:table-cell>
          <table:table-cell office:value-type="float" office:value="159.645897">
            <text:p>159,645897</text:p>
          </table:table-cell>
          <table:table-cell office:value-type="float" office:value="153.0913481">
            <text:p>153,0913481</text:p>
          </table:table-cell>
          <table:table-cell office:value-type="float" office:value="153.2642204">
            <text:p>153,2642204</text:p>
          </table:table-cell>
          <table:table-cell office:value-type="float" office:value="153.3497315">
            <text:p>153,3497315</text:p>
          </table:table-cell>
          <table:table-cell office:value-type="float" office:value="156.7359152">
            <text:p>156,7359152</text:p>
          </table:table-cell>
          <table:table-cell office:value-type="float" office:value="160.5903343">
            <text:p>160,5903343</text:p>
          </table:table-cell>
          <table:table-cell office:value-type="float" office:value="162.0911165">
            <text:p>162,0911165</text:p>
          </table:table-cell>
          <table:table-cell office:value-type="float" office:value="161.8331946">
            <text:p>161,8331946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60.2672198">
            <text:p>160,2672198</text:p>
          </table:table-cell>
          <table:table-cell office:value-type="float" office:value="157.5961854">
            <text:p>157,5961854</text:p>
          </table:table-cell>
          <table:table-cell office:value-type="float" office:value="158.3354111">
            <text:p>158,3354111</text:p>
          </table:table-cell>
          <table:table-cell office:value-type="float" office:value="157.1435017">
            <text:p>157,1435017</text:p>
          </table:table-cell>
          <table:table-cell office:value-type="float" office:value="159.3024973">
            <text:p>159,3024973</text:p>
          </table:table-cell>
          <table:table-cell office:value-type="float" office:value="155.2999326">
            <text:p>155,2999326</text:p>
          </table:table-cell>
          <table:table-cell office:value-type="float" office:value="160.4617508">
            <text:p>160,4617508</text:p>
          </table:table-cell>
          <table:table-cell office:value-type="float" office:value="159.7667919">
            <text:p>159,7667919</text:p>
          </table:table-cell>
          <table:table-cell office:value-type="float" office:value="153.2460501">
            <text:p>153,2460501</text:p>
          </table:table-cell>
          <table:table-cell office:value-type="float" office:value="153.4514632">
            <text:p>153,4514632</text:p>
          </table:table-cell>
          <table:table-cell office:value-type="float" office:value="153.5377314">
            <text:p>153,5377314</text:p>
          </table:table-cell>
          <table:table-cell office:value-type="float" office:value="156.9049631">
            <text:p>156,9049631</text:p>
          </table:table-cell>
          <table:table-cell office:value-type="float" office:value="160.7787111">
            <text:p>160,7787111</text:p>
          </table:table-cell>
          <table:table-cell office:value-type="float" office:value="162.1978534">
            <text:p>162,1978534</text:p>
          </table:table-cell>
          <table:table-cell office:value-type="float" office:value="161.9761172">
            <text:p>161,9761172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60.4100803">
            <text:p>160,4100803</text:p>
          </table:table-cell>
          <table:table-cell office:value-type="float" office:value="157.7491582">
            <text:p>157,7491582</text:p>
          </table:table-cell>
          <table:table-cell office:value-type="float" office:value="158.4901642">
            <text:p>158,4901642</text:p>
          </table:table-cell>
          <table:table-cell office:value-type="float" office:value="157.3557952">
            <text:p>157,3557952</text:p>
          </table:table-cell>
          <table:table-cell office:value-type="float" office:value="159.4727854">
            <text:p>159,4727854</text:p>
          </table:table-cell>
          <table:table-cell office:value-type="float" office:value="155.4557517">
            <text:p>155,4557517</text:p>
          </table:table-cell>
          <table:table-cell office:value-type="float" office:value="160.7304978">
            <text:p>160,7304978</text:p>
          </table:table-cell>
          <table:table-cell office:value-type="float" office:value="159.8852584">
            <text:p>159,8852584</text:p>
          </table:table-cell>
          <table:table-cell office:value-type="float" office:value="153.4059205">
            <text:p>153,4059205</text:p>
          </table:table-cell>
          <table:table-cell office:value-type="float" office:value="153.6425767">
            <text:p>153,6425767</text:p>
          </table:table-cell>
          <table:table-cell office:value-type="float" office:value="153.7297485">
            <text:p>153,7297485</text:p>
          </table:table-cell>
          <table:table-cell office:value-type="float" office:value="157.0748068">
            <text:p>157,0748068</text:p>
          </table:table-cell>
          <table:table-cell office:value-type="float" office:value="160.9649029">
            <text:p>160,9649029</text:p>
          </table:table-cell>
          <table:table-cell office:value-type="float" office:value="162.3025492">
            <text:p>162,3025492</text:p>
          </table:table-cell>
          <table:table-cell office:value-type="float" office:value="162.1145461">
            <text:p>162,114546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60.5503762">
            <text:p>160,5503762</text:p>
          </table:table-cell>
          <table:table-cell office:value-type="float" office:value="157.9045976">
            <text:p>157,9045976</text:p>
          </table:table-cell>
          <table:table-cell office:value-type="float" office:value="158.6419893">
            <text:p>158,6419893</text:p>
          </table:table-cell>
          <table:table-cell office:value-type="float" office:value="157.5681123">
            <text:p>157,5681123</text:p>
          </table:table-cell>
          <table:table-cell office:value-type="float" office:value="159.6405039">
            <text:p>159,6405039</text:p>
          </table:table-cell>
          <table:table-cell office:value-type="float" office:value="155.6151347">
            <text:p>155,6151347</text:p>
          </table:table-cell>
          <table:table-cell office:value-type="float" office:value="160.9934405">
            <text:p>160,9934405</text:p>
          </table:table-cell>
          <table:table-cell office:value-type="float" office:value="160.0005174">
            <text:p>160,0005174</text:p>
          </table:table-cell>
          <table:table-cell office:value-type="float" office:value="153.570318">
            <text:p>153,570318</text:p>
          </table:table-cell>
          <table:table-cell office:value-type="float" office:value="153.8367756">
            <text:p>153,8367756</text:p>
          </table:table-cell>
          <table:table-cell office:value-type="float" office:value="153.925524">
            <text:p>153,925524</text:p>
          </table:table-cell>
          <table:table-cell office:value-type="float" office:value="157.2458209">
            <text:p>157,2458209</text:p>
          </table:table-cell>
          <table:table-cell office:value-type="float" office:value="161.1483006">
            <text:p>161,1483006</text:p>
          </table:table-cell>
          <table:table-cell office:value-type="float" office:value="162.404725">
            <text:p>162,404725</text:p>
          </table:table-cell>
          <table:table-cell office:value-type="float" office:value="162.2481553">
            <text:p>162,2481553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60.6881788">
            <text:p>160,6881788</text:p>
          </table:table-cell>
          <table:table-cell office:value-type="float" office:value="158.0610867">
            <text:p>158,0610867</text:p>
          </table:table-cell>
          <table:table-cell office:value-type="float" office:value="158.7903918">
            <text:p>158,7903918</text:p>
          </table:table-cell>
          <table:table-cell office:value-type="float" office:value="157.7795876">
            <text:p>157,7795876</text:p>
          </table:table-cell>
          <table:table-cell office:value-type="float" office:value="159.8053341">
            <text:p>159,8053341</text:p>
          </table:table-cell>
          <table:table-cell office:value-type="float" office:value="155.7765019">
            <text:p>155,7765019</text:p>
          </table:table-cell>
          <table:table-cell office:value-type="float" office:value="161.2498706">
            <text:p>161,2498706</text:p>
          </table:table-cell>
          <table:table-cell office:value-type="float" office:value="160.1121764">
            <text:p>160,1121764</text:p>
          </table:table-cell>
          <table:table-cell office:value-type="float" office:value="153.7381494">
            <text:p>153,7381494</text:p>
          </table:table-cell>
          <table:table-cell office:value-type="float" office:value="154.0329534">
            <text:p>154,0329534</text:p>
          </table:table-cell>
          <table:table-cell office:value-type="float" office:value="154.1237957">
            <text:p>154,1237957</text:p>
          </table:table-cell>
          <table:table-cell office:value-type="float" office:value="157.4174614">
            <text:p>157,4174614</text:p>
          </table:table-cell>
          <table:table-cell office:value-type="float" office:value="161.3285864">
            <text:p>161,3285864</text:p>
          </table:table-cell>
          <table:table-cell office:value-type="float" office:value="162.5047279">
            <text:p>162,5047279</text:p>
          </table:table-cell>
          <table:table-cell office:value-type="float" office:value="162.3772493">
            <text:p>162,3772493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60.8231661">
            <text:p>160,8231661</text:p>
          </table:table-cell>
          <table:table-cell office:value-type="float" office:value="158.2177649">
            <text:p>158,2177649</text:p>
          </table:table-cell>
          <table:table-cell office:value-type="float" office:value="158.9349396">
            <text:p>158,9349396</text:p>
          </table:table-cell>
          <table:table-cell office:value-type="float" office:value="157.9906341">
            <text:p>157,9906341</text:p>
          </table:table-cell>
          <table:table-cell office:value-type="float" office:value="159.9676819">
            <text:p>159,9676819</text:p>
          </table:table-cell>
          <table:table-cell office:value-type="float" office:value="155.9381517">
            <text:p>155,9381517</text:p>
          </table:table-cell>
          <table:table-cell office:value-type="float" office:value="161.4995414">
            <text:p>161,4995414</text:p>
          </table:table-cell>
          <table:table-cell office:value-type="float" office:value="160.220468">
            <text:p>160,220468</text:p>
          </table:table-cell>
          <table:table-cell office:value-type="float" office:value="153.9085818">
            <text:p>153,9085818</text:p>
          </table:table-cell>
          <table:table-cell office:value-type="float" office:value="154.2304072">
            <text:p>154,2304072</text:p>
          </table:table-cell>
          <table:table-cell office:value-type="float" office:value="154.3237843">
            <text:p>154,3237843</text:p>
          </table:table-cell>
          <table:table-cell office:value-type="float" office:value="157.5899611">
            <text:p>157,5899611</text:p>
          </table:table-cell>
          <table:table-cell office:value-type="float" office:value="161.5060898">
            <text:p>161,5060898</text:p>
          </table:table-cell>
          <table:table-cell office:value-type="float" office:value="162.6030447">
            <text:p>162,6030447</text:p>
          </table:table-cell>
          <table:table-cell office:value-type="float" office:value="162.5019478">
            <text:p>162,5019478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60.9542815">
            <text:p>160,9542815</text:p>
          </table:table-cell>
          <table:table-cell office:value-type="float" office:value="158.3723558">
            <text:p>158,3723558</text:p>
          </table:table-cell>
          <table:table-cell office:value-type="float" office:value="159.0742984">
            <text:p>159,0742984</text:p>
          </table:table-cell>
          <table:table-cell office:value-type="float" office:value="158.2000347">
            <text:p>158,2000347</text:p>
          </table:table-cell>
          <table:table-cell office:value-type="float" office:value="160.1266711">
            <text:p>160,1266711</text:p>
          </table:table-cell>
          <table:table-cell office:value-type="float" office:value="156.0973808">
            <text:p>156,0973808</text:p>
          </table:table-cell>
          <table:table-cell office:value-type="float" office:value="161.7411227">
            <text:p>161,7411227</text:p>
          </table:table-cell>
          <table:table-cell office:value-type="float" office:value="160.3244284">
            <text:p>160,3244284</text:p>
          </table:table-cell>
          <table:table-cell office:value-type="float" office:value="154.0794492">
            <text:p>154,0794492</text:p>
          </table:table-cell>
          <table:table-cell office:value-type="float" office:value="154.4270072">
            <text:p>154,4270072</text:p>
          </table:table-cell>
          <table:table-cell office:value-type="float" office:value="154.5236066">
            <text:p>154,5236066</text:p>
          </table:table-cell>
          <table:table-cell office:value-type="float" office:value="157.7622356">
            <text:p>157,7622356</text:p>
          </table:table-cell>
          <table:table-cell office:value-type="float" office:value="161.6797988">
            <text:p>161,6797988</text:p>
          </table:table-cell>
          <table:table-cell office:value-type="float" office:value="162.6986126">
            <text:p>162,6986126</text:p>
          </table:table-cell>
          <table:table-cell office:value-type="float" office:value="162.6217232">
            <text:p>162,6217232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61.0821943">
            <text:p>161,0821943</text:p>
          </table:table-cell>
          <table:table-cell office:value-type="float" office:value="158.5249906">
            <text:p>158,5249906</text:p>
          </table:table-cell>
          <table:table-cell office:value-type="float" office:value="159.2091082">
            <text:p>159,2091082</text:p>
          </table:table-cell>
          <table:table-cell office:value-type="float" office:value="158.4082525">
            <text:p>158,4082525</text:p>
          </table:table-cell>
          <table:table-cell office:value-type="float" office:value="160.2830686">
            <text:p>160,2830686</text:p>
          </table:table-cell>
          <table:table-cell office:value-type="float" office:value="156.2539632">
            <text:p>156,2539632</text:p>
          </table:table-cell>
          <table:table-cell office:value-type="float" office:value="161.9751683">
            <text:p>161,9751683</text:p>
          </table:table-cell>
          <table:table-cell office:value-type="float" office:value="160.4248252">
            <text:p>160,4248252</text:p>
          </table:table-cell>
          <table:table-cell office:value-type="float" office:value="154.2509617">
            <text:p>154,2509617</text:p>
          </table:table-cell>
          <table:table-cell office:value-type="float" office:value="154.623175">
            <text:p>154,623175</text:p>
          </table:table-cell>
          <table:table-cell office:value-type="float" office:value="154.7233138">
            <text:p>154,7233138</text:p>
          </table:table-cell>
          <table:table-cell office:value-type="float" office:value="157.934942">
            <text:p>157,934942</text:p>
          </table:table-cell>
          <table:table-cell office:value-type="float" office:value="161.8504002">
            <text:p>161,8504002</text:p>
          </table:table-cell>
          <table:table-cell office:value-type="float" office:value="162.7922475">
            <text:p>162,7922475</text:p>
          </table:table-cell>
          <table:table-cell office:value-type="float" office:value="162.7379618">
            <text:p>162,7379618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61.2090827">
            <text:p>161,2090827</text:p>
          </table:table-cell>
          <table:table-cell office:value-type="float" office:value="158.6766028">
            <text:p>158,6766028</text:p>
          </table:table-cell>
          <table:table-cell office:value-type="float" office:value="159.3413841">
            <text:p>159,3413841</text:p>
          </table:table-cell>
          <table:table-cell office:value-type="float" office:value="158.6183042">
            <text:p>158,6183042</text:p>
          </table:table-cell>
          <table:table-cell office:value-type="float" office:value="160.4397507">
            <text:p>160,4397507</text:p>
          </table:table-cell>
          <table:table-cell office:value-type="float" office:value="156.4086219">
            <text:p>156,4086219</text:p>
          </table:table-cell>
          <table:table-cell office:value-type="float" office:value="162.2041432">
            <text:p>162,2041432</text:p>
          </table:table-cell>
          <table:table-cell office:value-type="float" office:value="160.5243085">
            <text:p>160,5243085</text:p>
          </table:table-cell>
          <table:table-cell office:value-type="float" office:value="154.424509">
            <text:p>154,424509</text:p>
          </table:table-cell>
          <table:table-cell office:value-type="float" office:value="154.8199198">
            <text:p>154,8199198</text:p>
          </table:table-cell>
          <table:table-cell office:value-type="float" office:value="154.9244134">
            <text:p>154,9244134</text:p>
          </table:table-cell>
          <table:table-cell office:value-type="float" office:value="158.1102502">
            <text:p>158,1102502</text:p>
          </table:table-cell>
          <table:table-cell office:value-type="float" office:value="162.0204842">
            <text:p>162,0204842</text:p>
          </table:table-cell>
          <table:table-cell office:value-type="float" office:value="162.8867893">
            <text:p>162,8867893</text:p>
          </table:table-cell>
          <table:table-cell office:value-type="float" office:value="162.8530563">
            <text:p>162,8530563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61.3352331">
            <text:p>161,3352331</text:p>
          </table:table-cell>
          <table:table-cell office:value-type="float" office:value="158.8266906">
            <text:p>158,8266906</text:p>
          </table:table-cell>
          <table:table-cell office:value-type="float" office:value="159.4714055">
            <text:p>159,4714055</text:p>
          </table:table-cell>
          <table:table-cell office:value-type="float" office:value="158.8301666">
            <text:p>158,8301666</text:p>
          </table:table-cell>
          <table:table-cell office:value-type="float" office:value="160.5969186">
            <text:p>160,5969186</text:p>
          </table:table-cell>
          <table:table-cell office:value-type="float" office:value="156.5602225">
            <text:p>156,5602225</text:p>
          </table:table-cell>
          <table:table-cell office:value-type="float" office:value="162.4278887">
            <text:p>162,4278887</text:p>
          </table:table-cell>
          <table:table-cell office:value-type="float" office:value="160.6231241">
            <text:p>160,6231241</text:p>
          </table:table-cell>
          <table:table-cell office:value-type="float" office:value="154.5995871">
            <text:p>154,5995871</text:p>
          </table:table-cell>
          <table:table-cell office:value-type="float" office:value="155.0165662">
            <text:p>155,0165662</text:p>
          </table:table-cell>
          <table:table-cell office:value-type="float" office:value="155.1262377">
            <text:p>155,1262377</text:p>
          </table:table-cell>
          <table:table-cell office:value-type="float" office:value="158.2881924">
            <text:p>158,2881924</text:p>
          </table:table-cell>
          <table:table-cell office:value-type="float" office:value="162.1899321">
            <text:p>162,1899321</text:p>
          </table:table-cell>
          <table:table-cell office:value-type="float" office:value="162.982704">
            <text:p>162,982704</text:p>
          </table:table-cell>
          <table:table-cell office:value-type="float" office:value="162.9670511">
            <text:p>162,9670511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61.4612299">
            <text:p>161,4612299</text:p>
          </table:table-cell>
          <table:table-cell office:value-type="float" office:value="158.9749281">
            <text:p>158,9749281</text:p>
          </table:table-cell>
          <table:table-cell office:value-type="float" office:value="159.5995722">
            <text:p>159,5995722</text:p>
          </table:table-cell>
          <table:table-cell office:value-type="float" office:value="159.0433955">
            <text:p>159,0433955</text:p>
          </table:table-cell>
          <table:table-cell office:value-type="float" office:value="160.7552765">
            <text:p>160,7552765</text:p>
          </table:table-cell>
          <table:table-cell office:value-type="float" office:value="156.7070623">
            <text:p>156,7070623</text:p>
          </table:table-cell>
          <table:table-cell office:value-type="float" office:value="162.6470777">
            <text:p>162,6470777</text:p>
          </table:table-cell>
          <table:table-cell office:value-type="float" office:value="160.7218512">
            <text:p>160,7218512</text:p>
          </table:table-cell>
          <table:table-cell office:value-type="float" office:value="154.7754372">
            <text:p>154,7754372</text:p>
          </table:table-cell>
          <table:table-cell office:value-type="float" office:value="155.2122756">
            <text:p>155,2122756</text:p>
          </table:table-cell>
          <table:table-cell office:value-type="float" office:value="155.3280342">
            <text:p>155,3280342</text:p>
          </table:table-cell>
          <table:table-cell office:value-type="float" office:value="158.4684975">
            <text:p>158,4684975</text:p>
          </table:table-cell>
          <table:table-cell office:value-type="float" office:value="162.3587284">
            <text:p>162,3587284</text:p>
          </table:table-cell>
          <table:table-cell office:value-type="float" office:value="163.0803099">
            <text:p>163,0803099</text:p>
          </table:table-cell>
          <table:table-cell office:value-type="float" office:value="163.0805994">
            <text:p>163,0805994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61.587418">
            <text:p>161,587418</text:p>
          </table:table-cell>
          <table:table-cell office:value-type="float" office:value="159.1205913">
            <text:p>159,1205913</text:p>
          </table:table-cell>
          <table:table-cell office:value-type="float" office:value="159.726505">
            <text:p>159,726505</text:p>
          </table:table-cell>
          <table:table-cell office:value-type="float" office:value="159.2579169">
            <text:p>159,2579169</text:p>
          </table:table-cell>
          <table:table-cell office:value-type="float" office:value="160.9150174">
            <text:p>160,9150174</text:p>
          </table:table-cell>
          <table:table-cell office:value-type="float" office:value="156.8481138">
            <text:p>156,8481138</text:p>
          </table:table-cell>
          <table:table-cell office:value-type="float" office:value="162.8624096">
            <text:p>162,8624096</text:p>
          </table:table-cell>
          <table:table-cell office:value-type="float" office:value="160.821271">
            <text:p>160,821271</text:p>
          </table:table-cell>
          <table:table-cell office:value-type="float" office:value="154.9517388">
            <text:p>154,9517388</text:p>
          </table:table-cell>
          <table:table-cell office:value-type="float" office:value="155.40672">
            <text:p>155,40672</text:p>
          </table:table-cell>
          <table:table-cell office:value-type="float" office:value="155.5295457">
            <text:p>155,5295457</text:p>
          </table:table-cell>
          <table:table-cell office:value-type="float" office:value="158.6508852">
            <text:p>158,6508852</text:p>
          </table:table-cell>
          <table:table-cell office:value-type="float" office:value="162.5274849">
            <text:p>162,5274849</text:p>
          </table:table-cell>
          <table:table-cell office:value-type="float" office:value="163.1802918">
            <text:p>163,1802918</text:p>
          </table:table-cell>
          <table:table-cell office:value-type="float" office:value="163.1944227">
            <text:p>163,1944227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61.7137012">
            <text:p>161,7137012</text:p>
          </table:table-cell>
          <table:table-cell office:value-type="float" office:value="159.2636679">
            <text:p>159,2636679</text:p>
          </table:table-cell>
          <table:table-cell office:value-type="float" office:value="159.8523464">
            <text:p>159,8523464</text:p>
          </table:table-cell>
          <table:table-cell office:value-type="float" office:value="159.473191">
            <text:p>159,473191</text:p>
          </table:table-cell>
          <table:table-cell office:value-type="float" office:value="161.0760113">
            <text:p>161,0760113</text:p>
          </table:table-cell>
          <table:table-cell office:value-type="float" office:value="156.9835637">
            <text:p>156,9835637</text:p>
          </table:table-cell>
          <table:table-cell office:value-type="float" office:value="163.0740385">
            <text:p>163,0740385</text:p>
          </table:table-cell>
          <table:table-cell office:value-type="float" office:value="160.9215353">
            <text:p>160,9215353</text:p>
          </table:table-cell>
          <table:table-cell office:value-type="float" office:value="155.1285668">
            <text:p>155,1285668</text:p>
          </table:table-cell>
          <table:table-cell office:value-type="float" office:value="155.5997262">
            <text:p>155,5997262</text:p>
          </table:table-cell>
          <table:table-cell office:value-type="float" office:value="155.730828">
            <text:p>155,730828</text:p>
          </table:table-cell>
          <table:table-cell office:value-type="float" office:value="158.8354051">
            <text:p>158,8354051</text:p>
          </table:table-cell>
          <table:table-cell office:value-type="float" office:value="162.6961837">
            <text:p>162,6961837</text:p>
          </table:table-cell>
          <table:table-cell office:value-type="float" office:value="163.2830166">
            <text:p>163,2830166</text:p>
          </table:table-cell>
          <table:table-cell office:value-type="float" office:value="163.3081288">
            <text:p>163,3081288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61.8399222">
            <text:p>161,8399222</text:p>
          </table:table-cell>
          <table:table-cell office:value-type="float" office:value="159.4037477">
            <text:p>159,4037477</text:p>
          </table:table-cell>
          <table:table-cell office:value-type="float" office:value="159.9771268">
            <text:p>159,9771268</text:p>
          </table:table-cell>
          <table:table-cell office:value-type="float" office:value="159.6869819">
            <text:p>159,6869819</text:p>
          </table:table-cell>
          <table:table-cell office:value-type="float" office:value="161.2376035">
            <text:p>161,2376035</text:p>
          </table:table-cell>
          <table:table-cell office:value-type="float" office:value="157.1128369">
            <text:p>157,1128369</text:p>
          </table:table-cell>
          <table:table-cell office:value-type="float" office:value="163.2818797">
            <text:p>163,2818797</text:p>
          </table:table-cell>
          <table:table-cell office:value-type="float" office:value="161.0227161">
            <text:p>161,0227161</text:p>
          </table:table-cell>
          <table:table-cell office:value-type="float" office:value="155.3054384">
            <text:p>155,3054384</text:p>
          </table:table-cell>
          <table:table-cell office:value-type="float" office:value="155.7906119">
            <text:p>155,7906119</text:p>
          </table:table-cell>
          <table:table-cell office:value-type="float" office:value="155.9314175">
            <text:p>155,9314175</text:p>
          </table:table-cell>
          <table:table-cell office:value-type="float" office:value="159.0205244">
            <text:p>159,0205244</text:p>
          </table:table-cell>
          <table:table-cell office:value-type="float" office:value="162.8645748">
            <text:p>162,8645748</text:p>
          </table:table-cell>
          <table:table-cell office:value-type="float" office:value="163.3884301">
            <text:p>163,3884301</text:p>
          </table:table-cell>
          <table:table-cell office:value-type="float" office:value="163.4215243">
            <text:p>163,4215243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61.9638272">
            <text:p>161,9638272</text:p>
          </table:table-cell>
          <table:table-cell office:value-type="float" office:value="159.5391664">
            <text:p>159,5391664</text:p>
          </table:table-cell>
          <table:table-cell office:value-type="float" office:value="160.0987439">
            <text:p>160,0987439</text:p>
          </table:table-cell>
          <table:table-cell office:value-type="float" office:value="159.8949247">
            <text:p>159,8949247</text:p>
          </table:table-cell>
          <table:table-cell office:value-type="float" office:value="161.3977076">
            <text:p>161,3977076</text:p>
          </table:table-cell>
          <table:table-cell office:value-type="float" office:value="157.2344858">
            <text:p>157,2344858</text:p>
          </table:table-cell>
          <table:table-cell office:value-type="float" office:value="163.4846779">
            <text:p>163,4846779</text:p>
          </table:table-cell>
          <table:table-cell office:value-type="float" office:value="161.1231424">
            <text:p>161,1231424</text:p>
          </table:table-cell>
          <table:table-cell office:value-type="float" office:value="155.4800947">
            <text:p>155,4800947</text:p>
          </table:table-cell>
          <table:table-cell office:value-type="float" office:value="155.9772167">
            <text:p>155,9772167</text:p>
          </table:table-cell>
          <table:table-cell office:value-type="float" office:value="156.1295078">
            <text:p>156,1295078</text:p>
          </table:table-cell>
          <table:table-cell office:value-type="float" office:value="159.2028163">
            <text:p>159,2028163</text:p>
          </table:table-cell>
          <table:table-cell office:value-type="float" office:value="163.030818">
            <text:p>163,030818</text:p>
          </table:table-cell>
          <table:table-cell office:value-type="float" office:value="163.4950754">
            <text:p>163,4950754</text:p>
          </table:table-cell>
          <table:table-cell office:value-type="float" office:value="163.5328348">
            <text:p>163,5328348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62.0869645">
            <text:p>162,0869645</text:p>
          </table:table-cell>
          <table:table-cell office:value-type="float" office:value="159.6703166">
            <text:p>159,6703166</text:p>
          </table:table-cell>
          <table:table-cell office:value-type="float" office:value="160.2192217">
            <text:p>160,2192217</text:p>
          </table:table-cell>
          <table:table-cell office:value-type="float" office:value="160.0957296">
            <text:p>160,0957296</text:p>
          </table:table-cell>
          <table:table-cell office:value-type="float" office:value="161.5577961">
            <text:p>161,5577961</text:p>
          </table:table-cell>
          <table:table-cell office:value-type="float" office:value="157.3493401">
            <text:p>157,3493401</text:p>
          </table:table-cell>
          <table:table-cell office:value-type="float" office:value="163.683924">
            <text:p>163,683924</text:p>
          </table:table-cell>
          <table:table-cell office:value-type="float" office:value="161.2246948">
            <text:p>161,2246948</text:p>
          </table:table-cell>
          <table:table-cell office:value-type="float" office:value="155.6532513">
            <text:p>155,6532513</text:p>
          </table:table-cell>
          <table:table-cell office:value-type="float" office:value="156.1600606">
            <text:p>156,1600606</text:p>
          </table:table-cell>
          <table:table-cell office:value-type="float" office:value="156.325619">
            <text:p>156,325619</text:p>
          </table:table-cell>
          <table:table-cell office:value-type="float" office:value="159.3812985">
            <text:p>159,3812985</text:p>
          </table:table-cell>
          <table:table-cell office:value-type="float" office:value="163.1965197">
            <text:p>163,1965197</text:p>
          </table:table-cell>
          <table:table-cell office:value-type="float" office:value="163.6045312">
            <text:p>163,6045312</text:p>
          </table:table-cell>
          <table:table-cell office:value-type="float" office:value="163.6434101">
            <text:p>163,6434101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162.2119263">
            <text:p>162,2119263</text:p>
          </table:table-cell>
          <table:table-cell office:value-type="float" office:value="159.7987087">
            <text:p>159,7987087</text:p>
          </table:table-cell>
          <table:table-cell office:value-type="float" office:value="160.3413935">
            <text:p>160,3413935</text:p>
          </table:table-cell>
          <table:table-cell office:value-type="float" office:value="160.2899627">
            <text:p>160,2899627</text:p>
          </table:table-cell>
          <table:table-cell office:value-type="float" office:value="161.720013">
            <text:p>161,720013</text:p>
          </table:table-cell>
          <table:table-cell office:value-type="float" office:value="157.4592765">
            <text:p>157,4592765</text:p>
          </table:table-cell>
          <table:table-cell office:value-type="float" office:value="163.8821424">
            <text:p>163,8821424</text:p>
          </table:table-cell>
          <table:table-cell office:value-type="float" office:value="161.3301366">
            <text:p>161,3301366</text:p>
          </table:table-cell>
          <table:table-cell office:value-type="float" office:value="155.8260993">
            <text:p>155,8260993</text:p>
          </table:table-cell>
          <table:table-cell office:value-type="float" office:value="156.3403188">
            <text:p>156,3403188</text:p>
          </table:table-cell>
          <table:table-cell office:value-type="float" office:value="156.5211029">
            <text:p>156,5211029</text:p>
          </table:table-cell>
          <table:table-cell office:value-type="float" office:value="159.5563564">
            <text:p>159,5563564</text:p>
          </table:table-cell>
          <table:table-cell office:value-type="float" office:value="163.3643392">
            <text:p>163,3643392</text:p>
          </table:table-cell>
          <table:table-cell office:value-type="float" office:value="163.7193792">
            <text:p>163,7193792</text:p>
          </table:table-cell>
          <table:table-cell office:value-type="float" office:value="163.7562043">
            <text:p>163,7562043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62.3396484">
            <text:p>162,3396484</text:p>
          </table:table-cell>
          <table:table-cell office:value-type="float" office:value="159.9263181">
            <text:p>159,9263181</text:p>
          </table:table-cell>
          <table:table-cell office:value-type="float" office:value="160.466662">
            <text:p>160,466662</text:p>
          </table:table-cell>
          <table:table-cell office:value-type="float" office:value="160.478779">
            <text:p>160,478779</text:p>
          </table:table-cell>
          <table:table-cell office:value-type="float" office:value="161.8850163">
            <text:p>161,8850163</text:p>
          </table:table-cell>
          <table:table-cell office:value-type="float" office:value="157.5670077">
            <text:p>157,5670077</text:p>
          </table:table-cell>
          <table:table-cell office:value-type="float" office:value="164.0807278">
            <text:p>164,0807278</text:p>
          </table:table-cell>
          <table:table-cell office:value-type="float" office:value="161.440523">
            <text:p>161,440523</text:p>
          </table:table-cell>
          <table:table-cell office:value-type="float" office:value="156.0004109">
            <text:p>156,0004109</text:p>
          </table:table-cell>
          <table:table-cell office:value-type="float" office:value="156.5196201">
            <text:p>156,5196201</text:p>
          </table:table-cell>
          <table:table-cell office:value-type="float" office:value="156.7173413">
            <text:p>156,7173413</text:p>
          </table:table-cell>
          <table:table-cell office:value-type="float" office:value="159.728952">
            <text:p>159,728952</text:p>
          </table:table-cell>
          <table:table-cell office:value-type="float" office:value="163.5356442">
            <text:p>163,5356442</text:p>
          </table:table-cell>
          <table:table-cell office:value-type="float" office:value="163.8403579">
            <text:p>163,8403579</text:p>
          </table:table-cell>
          <table:table-cell office:value-type="float" office:value="163.8720291">
            <text:p>163,8720291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62.4694968">
            <text:p>162,4694968</text:p>
          </table:table-cell>
          <table:table-cell office:value-type="float" office:value="160.0536633">
            <text:p>160,0536633</text:p>
          </table:table-cell>
          <table:table-cell office:value-type="float" office:value="160.5950843">
            <text:p>160,5950843</text:p>
          </table:table-cell>
          <table:table-cell office:value-type="float" office:value="160.6622413">
            <text:p>160,6622413</text:p>
          </table:table-cell>
          <table:table-cell office:value-type="float" office:value="162.0518087">
            <text:p>162,0518087</text:p>
          </table:table-cell>
          <table:table-cell office:value-type="float" office:value="157.6737148">
            <text:p>157,6737148</text:p>
          </table:table-cell>
          <table:table-cell office:value-type="float" office:value="164.2792707">
            <text:p>164,2792707</text:p>
          </table:table-cell>
          <table:table-cell office:value-type="float" office:value="161.5553839">
            <text:p>161,5553839</text:p>
          </table:table-cell>
          <table:table-cell office:value-type="float" office:value="156.1759129">
            <text:p>156,1759129</text:p>
          </table:table-cell>
          <table:table-cell office:value-type="float" office:value="156.6977114">
            <text:p>156,6977114</text:p>
          </table:table-cell>
          <table:table-cell office:value-type="float" office:value="156.9148187">
            <text:p>156,9148187</text:p>
          </table:table-cell>
          <table:table-cell office:value-type="float" office:value="159.8993275">
            <text:p>159,8993275</text:p>
          </table:table-cell>
          <table:table-cell office:value-type="float" office:value="163.7100746">
            <text:p>163,7100746</text:p>
          </table:table-cell>
          <table:table-cell office:value-type="float" office:value="163.9666486">
            <text:p>163,9666486</text:p>
          </table:table-cell>
          <table:table-cell office:value-type="float" office:value="163.9901906">
            <text:p>163,9901906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62.5997803">
            <text:p>162,5997803</text:p>
          </table:table-cell>
          <table:table-cell office:value-type="float" office:value="160.1805569">
            <text:p>160,1805569</text:p>
          </table:table-cell>
          <table:table-cell office:value-type="float" office:value="160.7256328">
            <text:p>160,7256328</text:p>
          </table:table-cell>
          <table:table-cell office:value-type="float" office:value="160.8406738">
            <text:p>160,8406738</text:p>
          </table:table-cell>
          <table:table-cell office:value-type="float" office:value="162.2182081">
            <text:p>162,2182081</text:p>
          </table:table-cell>
          <table:table-cell office:value-type="float" office:value="157.7797676">
            <text:p>157,7797676</text:p>
          </table:table-cell>
          <table:table-cell office:value-type="float" office:value="164.4766554">
            <text:p>164,4766554</text:p>
          </table:table-cell>
          <table:table-cell office:value-type="float" office:value="161.6732164">
            <text:p>161,6732164</text:p>
          </table:table-cell>
          <table:table-cell office:value-type="float" office:value="156.3519864">
            <text:p>156,3519864</text:p>
          </table:table-cell>
          <table:table-cell office:value-type="float" office:value="156.8747173">
            <text:p>156,8747173</text:p>
          </table:table-cell>
          <table:table-cell office:value-type="float" office:value="157.1132342">
            <text:p>157,1132342</text:p>
          </table:table-cell>
          <table:table-cell office:value-type="float" office:value="160.0672089">
            <text:p>160,0672089</text:p>
          </table:table-cell>
          <table:table-cell office:value-type="float" office:value="163.8859237">
            <text:p>163,8859237</text:p>
          </table:table-cell>
          <table:table-cell office:value-type="float" office:value="164.0966438">
            <text:p>164,0966438</text:p>
          </table:table-cell>
          <table:table-cell office:value-type="float" office:value="164.1089335">
            <text:p>164,1089335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62.727264">
            <text:p>162,727264</text:p>
          </table:table-cell>
          <table:table-cell office:value-type="float" office:value="160.3059853">
            <text:p>160,3059853</text:p>
          </table:table-cell>
          <table:table-cell office:value-type="float" office:value="160.8555065">
            <text:p>160,8555065</text:p>
          </table:table-cell>
          <table:table-cell office:value-type="float" office:value="161.0131468">
            <text:p>161,0131468</text:p>
          </table:table-cell>
          <table:table-cell office:value-type="float" office:value="162.3798708">
            <text:p>162,3798708</text:p>
          </table:table-cell>
          <table:table-cell office:value-type="float" office:value="157.8841825">
            <text:p>157,8841825</text:p>
          </table:table-cell>
          <table:table-cell office:value-type="float" office:value="164.669616">
            <text:p>164,669616</text:p>
          </table:table-cell>
          <table:table-cell office:value-type="float" office:value="161.7906224">
            <text:p>161,7906224</text:p>
          </table:table-cell>
          <table:table-cell office:value-type="float" office:value="156.5273123">
            <text:p>156,5273123</text:p>
          </table:table-cell>
          <table:table-cell office:value-type="float" office:value="157.0487087">
            <text:p>157,0487087</text:p>
          </table:table-cell>
          <table:table-cell office:value-type="float" office:value="157.3108528">
            <text:p>157,3108528</text:p>
          </table:table-cell>
          <table:table-cell office:value-type="float" office:value="160.2313935">
            <text:p>160,2313935</text:p>
          </table:table-cell>
          <table:table-cell office:value-type="float" office:value="164.0602721">
            <text:p>164,0602721</text:p>
          </table:table-cell>
          <table:table-cell office:value-type="float" office:value="164.2262794">
            <text:p>164,2262794</text:p>
          </table:table-cell>
          <table:table-cell office:value-type="float" office:value="164.225109">
            <text:p>164,225109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62.849286">
            <text:p>162,849286</text:p>
          </table:table-cell>
          <table:table-cell office:value-type="float" office:value="160.4283895">
            <text:p>160,4283895</text:p>
          </table:table-cell>
          <table:table-cell office:value-type="float" office:value="160.9825312">
            <text:p>160,9825312</text:p>
          </table:table-cell>
          <table:table-cell office:value-type="float" office:value="161.1776474">
            <text:p>161,1776474</text:p>
          </table:table-cell>
          <table:table-cell office:value-type="float" office:value="162.5328553">
            <text:p>162,5328553</text:p>
          </table:table-cell>
          <table:table-cell office:value-type="float" office:value="157.9852846">
            <text:p>157,9852846</text:p>
          </table:table-cell>
          <table:table-cell office:value-type="float" office:value="164.8557507">
            <text:p>164,8557507</text:p>
          </table:table-cell>
          <table:table-cell office:value-type="float" office:value="161.9045128">
            <text:p>161,9045128</text:p>
          </table:table-cell>
          <table:table-cell office:value-type="float" office:value="156.7000632">
            <text:p>156,7000632</text:p>
          </table:table-cell>
          <table:table-cell office:value-type="float" office:value="157.2180726">
            <text:p>157,2180726</text:p>
          </table:table-cell>
          <table:table-cell office:value-type="float" office:value="157.5059756">
            <text:p>157,5059756</text:p>
          </table:table-cell>
          <table:table-cell office:value-type="float" office:value="160.3897674">
            <text:p>160,3897674</text:p>
          </table:table-cell>
          <table:table-cell office:value-type="float" office:value="164.229965">
            <text:p>164,229965</text:p>
          </table:table-cell>
          <table:table-cell office:value-type="float" office:value="164.3524319">
            <text:p>164,3524319</text:p>
          </table:table-cell>
          <table:table-cell office:value-type="float" office:value="164.3357621">
            <text:p>164,3357621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62.9633245">
            <text:p>162,9633245</text:p>
          </table:table-cell>
          <table:table-cell office:value-type="float" office:value="160.5463007">
            <text:p>160,5463007</text:p>
          </table:table-cell>
          <table:table-cell office:value-type="float" office:value="161.1041348">
            <text:p>161,1041348</text:p>
          </table:table-cell>
          <table:table-cell office:value-type="float" office:value="161.3325801">
            <text:p>161,3325801</text:p>
          </table:table-cell>
          <table:table-cell office:value-type="float" office:value="162.6740451">
            <text:p>162,6740451</text:p>
          </table:table-cell>
          <table:table-cell office:value-type="float" office:value="158.0810259">
            <text:p>158,0810259</text:p>
          </table:table-cell>
          <table:table-cell office:value-type="float" office:value="165.0328834">
            <text:p>165,0328834</text:p>
          </table:table-cell>
          <table:table-cell office:value-type="float" office:value="162.012564">
            <text:p>162,012564</text:p>
          </table:table-cell>
          <table:table-cell office:value-type="float" office:value="156.8684891">
            <text:p>156,8684891</text:p>
          </table:table-cell>
          <table:table-cell office:value-type="float" office:value="157.3808625">
            <text:p>157,3808625</text:p>
          </table:table-cell>
          <table:table-cell office:value-type="float" office:value="157.6967425">
            <text:p>157,6967425</text:p>
          </table:table-cell>
          <table:table-cell office:value-type="float" office:value="160.5405959">
            <text:p>160,5405959</text:p>
          </table:table-cell>
          <table:table-cell office:value-type="float" office:value="164.3921719">
            <text:p>164,3921719</text:p>
          </table:table-cell>
          <table:table-cell office:value-type="float" office:value="164.4718639">
            <text:p>164,4718639</text:p>
          </table:table-cell>
          <table:table-cell office:value-type="float" office:value="164.43819">
            <text:p>164,43819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63.0662991">
            <text:p>163,0662991</text:p>
          </table:table-cell>
          <table:table-cell office:value-type="float" office:value="160.6577956">
            <text:p>160,6577956</text:p>
          </table:table-cell>
          <table:table-cell office:value-type="float" office:value="161.2179628">
            <text:p>161,2179628</text:p>
          </table:table-cell>
          <table:table-cell office:value-type="float" office:value="161.4754127">
            <text:p>161,4754127</text:p>
          </table:table-cell>
          <table:table-cell office:value-type="float" office:value="162.8000438">
            <text:p>162,8000438</text:p>
          </table:table-cell>
          <table:table-cell office:value-type="float" office:value="158.1700319">
            <text:p>158,1700319</text:p>
          </table:table-cell>
          <table:table-cell office:value-type="float" office:value="165.1978184">
            <text:p>165,1978184</text:p>
          </table:table-cell>
          <table:table-cell office:value-type="float" office:value="162.1116623">
            <text:p>162,1116623</text:p>
          </table:table-cell>
          <table:table-cell office:value-type="float" office:value="157.0309618">
            <text:p>157,0309618</text:p>
          </table:table-cell>
          <table:table-cell office:value-type="float" office:value="157.5353461">
            <text:p>157,5353461</text:p>
          </table:table-cell>
          <table:table-cell office:value-type="float" office:value="157.8813472">
            <text:p>157,8813472</text:p>
          </table:table-cell>
          <table:table-cell office:value-type="float" office:value="160.6814612">
            <text:p>160,6814612</text:p>
          </table:table-cell>
          <table:table-cell office:value-type="float" office:value="164.5437094">
            <text:p>164,5437094</text:p>
          </table:table-cell>
          <table:table-cell office:value-type="float" office:value="164.5815334">
            <text:p>164,5815334</text:p>
          </table:table-cell>
          <table:table-cell office:value-type="float" office:value="164.529539">
            <text:p>164,529539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63.1569945">
            <text:p>163,1569945</text:p>
          </table:table-cell>
          <table:table-cell office:value-type="float" office:value="160.7620279">
            <text:p>160,7620279</text:p>
          </table:table-cell>
          <table:table-cell office:value-type="float" office:value="161.3225182">
            <text:p>161,3225182</text:p>
          </table:table-cell>
          <table:table-cell office:value-type="float" office:value="161.6040512">
            <text:p>161,6040512</text:p>
          </table:table-cell>
          <table:table-cell office:value-type="float" office:value="162.9098539">
            <text:p>162,9098539</text:p>
          </table:table-cell>
          <table:table-cell office:value-type="float" office:value="158.2508647">
            <text:p>158,2508647</text:p>
          </table:table-cell>
          <table:table-cell office:value-type="float" office:value="165.3493675">
            <text:p>165,3493675</text:p>
          </table:table-cell>
          <table:table-cell office:value-type="float" office:value="162.2000814">
            <text:p>162,2000814</text:p>
          </table:table-cell>
          <table:table-cell office:value-type="float" office:value="157.1861585">
            <text:p>157,1861585</text:p>
          </table:table-cell>
          <table:table-cell office:value-type="float" office:value="157.6803479">
            <text:p>157,6803479</text:p>
          </table:table-cell>
          <table:table-cell office:value-type="float" office:value="158.0586616">
            <text:p>158,0586616</text:p>
          </table:table-cell>
          <table:table-cell office:value-type="float" office:value="160.8106778">
            <text:p>160,8106778</text:p>
          </table:table-cell>
          <table:table-cell office:value-type="float" office:value="164.683122">
            <text:p>164,683122</text:p>
          </table:table-cell>
          <table:table-cell office:value-type="float" office:value="164.6793009">
            <text:p>164,6793009</text:p>
          </table:table-cell>
          <table:table-cell office:value-type="float" office:value="164.6082872">
            <text:p>164,6082872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63.2365919">
            <text:p>163,2365919</text:p>
          </table:table-cell>
          <table:table-cell office:value-type="float" office:value="160.8603684">
            <text:p>160,8603684</text:p>
          </table:table-cell>
          <table:table-cell office:value-type="float" office:value="161.4193768">
            <text:p>161,4193768</text:p>
          </table:table-cell>
          <table:table-cell office:value-type="float" office:value="161.7193549">
            <text:p>161,7193549</text:p>
          </table:table-cell>
          <table:table-cell office:value-type="float" office:value="163.0050637">
            <text:p>163,0050637</text:p>
          </table:table-cell>
          <table:table-cell office:value-type="float" office:value="158.3256058">
            <text:p>158,3256058</text:p>
          </table:table-cell>
          <table:table-cell office:value-type="float" office:value="165.4890928">
            <text:p>165,4890928</text:p>
          </table:table-cell>
          <table:table-cell office:value-type="float" office:value="162.2791293">
            <text:p>162,2791293</text:p>
          </table:table-cell>
          <table:table-cell office:value-type="float" office:value="157.3352214">
            <text:p>157,3352214</text:p>
          </table:table-cell>
          <table:table-cell office:value-type="float" office:value="157.8169411">
            <text:p>157,8169411</text:p>
          </table:table-cell>
          <table:table-cell office:value-type="float" office:value="158.2294815">
            <text:p>158,2294815</text:p>
          </table:table-cell>
          <table:table-cell office:value-type="float" office:value="160.9288009">
            <text:p>160,9288009</text:p>
          </table:table-cell>
          <table:table-cell office:value-type="float" office:value="164.8114885">
            <text:p>164,8114885</text:p>
          </table:table-cell>
          <table:table-cell office:value-type="float" office:value="164.7660981">
            <text:p>164,7660981</text:p>
          </table:table-cell>
          <table:table-cell office:value-type="float" office:value="164.6756094">
            <text:p>164,6756094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63.3069397">
            <text:p>163,3069397</text:p>
          </table:table-cell>
          <table:table-cell office:value-type="float" office:value="160.9544247">
            <text:p>160,9544247</text:p>
          </table:table-cell>
          <table:table-cell office:value-type="float" office:value="161.510491">
            <text:p>161,510491</text:p>
          </table:table-cell>
          <table:table-cell office:value-type="float" office:value="161.8232694">
            <text:p>161,8232694</text:p>
          </table:table-cell>
          <table:table-cell office:value-type="float" office:value="163.0887132">
            <text:p>163,0887132</text:p>
          </table:table-cell>
          <table:table-cell office:value-type="float" office:value="158.3970321">
            <text:p>158,3970321</text:p>
          </table:table-cell>
          <table:table-cell office:value-type="float" office:value="165.6186521">
            <text:p>165,6186521</text:p>
          </table:table-cell>
          <table:table-cell office:value-type="float" office:value="162.3503015">
            <text:p>162,3503015</text:p>
          </table:table-cell>
          <table:table-cell office:value-type="float" office:value="157.4802179">
            <text:p>157,4802179</text:p>
          </table:table-cell>
          <table:table-cell office:value-type="float" office:value="157.9465654">
            <text:p>157,9465654</text:p>
          </table:table-cell>
          <table:table-cell office:value-type="float" office:value="158.3956802">
            <text:p>158,3956802</text:p>
          </table:table-cell>
          <table:table-cell office:value-type="float" office:value="161.0376926">
            <text:p>161,0376926</text:p>
          </table:table-cell>
          <table:table-cell office:value-type="float" office:value="164.930561">
            <text:p>164,930561</text:p>
          </table:table-cell>
          <table:table-cell office:value-type="float" office:value="164.8437765">
            <text:p>164,8437765</text:p>
          </table:table-cell>
          <table:table-cell office:value-type="float" office:value="164.7333674">
            <text:p>164,7333674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63.3708018">
            <text:p>163,3708018</text:p>
          </table:table-cell>
          <table:table-cell office:value-type="float" office:value="161.0469283">
            <text:p>161,0469283</text:p>
          </table:table-cell>
          <table:table-cell office:value-type="float" office:value="161.5989801">
            <text:p>161,5989801</text:p>
          </table:table-cell>
          <table:table-cell office:value-type="float" office:value="161.9170135">
            <text:p>161,9170135</text:p>
          </table:table-cell>
          <table:table-cell office:value-type="float" office:value="163.1641514">
            <text:p>163,1641514</text:p>
          </table:table-cell>
          <table:table-cell office:value-type="float" office:value="158.4677178">
            <text:p>158,4677178</text:p>
          </table:table-cell>
          <table:table-cell office:value-type="float" office:value="165.7414316">
            <text:p>165,7414316</text:p>
          </table:table-cell>
          <table:table-cell office:value-type="float" office:value="162.4165545">
            <text:p>162,4165545</text:p>
          </table:table-cell>
          <table:table-cell office:value-type="float" office:value="157.6233914">
            <text:p>157,6233914</text:p>
          </table:table-cell>
          <table:table-cell office:value-type="float" office:value="158.0721014">
            <text:p>158,0721014</text:p>
          </table:table-cell>
          <table:table-cell office:value-type="float" office:value="158.559292">
            <text:p>158,559292</text:p>
          </table:table-cell>
          <table:table-cell office:value-type="float" office:value="161.1385595">
            <text:p>161,1385595</text:p>
          </table:table-cell>
          <table:table-cell office:value-type="float" office:value="165.0430316">
            <text:p>165,0430316</text:p>
          </table:table-cell>
          <table:table-cell office:value-type="float" office:value="164.9150134">
            <text:p>164,9150134</text:p>
          </table:table-cell>
          <table:table-cell office:value-type="float" office:value="164.7857005">
            <text:p>164,785700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63.4306328">
            <text:p>163,4306328</text:p>
          </table:table-cell>
          <table:table-cell office:value-type="float" office:value="161.1388997">
            <text:p>161,1388997</text:p>
          </table:table-cell>
          <table:table-cell office:value-type="float" office:value="161.6871452">
            <text:p>161,6871452</text:p>
          </table:table-cell>
          <table:table-cell office:value-type="float" office:value="162.0021827">
            <text:p>162,0021827</text:p>
          </table:table-cell>
          <table:table-cell office:value-type="float" office:value="163.2347695">
            <text:p>163,2347695</text:p>
          </table:table-cell>
          <table:table-cell office:value-type="float" office:value="158.5390622">
            <text:p>158,5390622</text:p>
          </table:table-cell>
          <table:table-cell office:value-type="float" office:value="165.8600942">
            <text:p>165,8600942</text:p>
          </table:table-cell>
          <table:table-cell office:value-type="float" office:value="162.4802045">
            <text:p>162,4802045</text:p>
          </table:table-cell>
          <table:table-cell office:value-type="float" office:value="157.7655251">
            <text:p>157,7655251</text:p>
          </table:table-cell>
          <table:table-cell office:value-type="float" office:value="158.1944665">
            <text:p>158,1944665</text:p>
          </table:table-cell>
          <table:table-cell office:value-type="float" office:value="158.7211422">
            <text:p>158,7211422</text:p>
          </table:table-cell>
          <table:table-cell office:value-type="float" office:value="161.2334533">
            <text:p>161,2334533</text:p>
          </table:table-cell>
          <table:table-cell office:value-type="float" office:value="165.151336">
            <text:p>165,151336</text:p>
          </table:table-cell>
          <table:table-cell office:value-type="float" office:value="164.9818692">
            <text:p>164,9818692</text:p>
          </table:table-cell>
          <table:table-cell office:value-type="float" office:value="164.8361505">
            <text:p>164,8361505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63.4890087">
            <text:p>163,4890087</text:p>
          </table:table-cell>
          <table:table-cell office:value-type="float" office:value="161.2315344">
            <text:p>161,2315344</text:p>
          </table:table-cell>
          <table:table-cell office:value-type="float" office:value="161.7775149">
            <text:p>161,7775149</text:p>
          </table:table-cell>
          <table:table-cell office:value-type="float" office:value="162.0814707">
            <text:p>162,0814707</text:p>
          </table:table-cell>
          <table:table-cell office:value-type="float" office:value="163.3038875">
            <text:p>163,3038875</text:p>
          </table:table-cell>
          <table:table-cell office:value-type="float" office:value="158.6123873">
            <text:p>158,6123873</text:p>
          </table:table-cell>
          <table:table-cell office:value-type="float" office:value="165.9766092">
            <text:p>165,9766092</text:p>
          </table:table-cell>
          <table:table-cell office:value-type="float" office:value="162.543428">
            <text:p>162,543428</text:p>
          </table:table-cell>
          <table:table-cell office:value-type="float" office:value="157.908296">
            <text:p>157,908296</text:p>
          </table:table-cell>
          <table:table-cell office:value-type="float" office:value="158.3150969">
            <text:p>158,3150969</text:p>
          </table:table-cell>
          <table:table-cell office:value-type="float" office:value="158.8824978">
            <text:p>158,8824978</text:p>
          </table:table-cell>
          <table:table-cell office:value-type="float" office:value="161.3248189">
            <text:p>161,3248189</text:p>
          </table:table-cell>
          <table:table-cell office:value-type="float" office:value="165.2575046">
            <text:p>165,2575046</text:p>
          </table:table-cell>
          <table:table-cell office:value-type="float" office:value="165.0463707">
            <text:p>165,0463707</text:p>
          </table:table-cell>
          <table:table-cell office:value-type="float" office:value="164.8875905">
            <text:p>164,8875905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63.5478535">
            <text:p>163,5478535</text:p>
          </table:table-cell>
          <table:table-cell office:value-type="float" office:value="161.3263897">
            <text:p>161,3263897</text:p>
          </table:table-cell>
          <table:table-cell office:value-type="float" office:value="161.8711909">
            <text:p>161,8711909</text:p>
          </table:table-cell>
          <table:table-cell office:value-type="float" office:value="162.1557123">
            <text:p>162,1557123</text:p>
          </table:table-cell>
          <table:table-cell office:value-type="float" office:value="163.3743214">
            <text:p>163,3743214</text:p>
          </table:table-cell>
          <table:table-cell office:value-type="float" office:value="158.6898419">
            <text:p>158,6898419</text:p>
          </table:table-cell>
          <table:table-cell office:value-type="float" office:value="166.0931144">
            <text:p>166,0931144</text:p>
          </table:table-cell>
          <table:table-cell office:value-type="float" office:value="162.6078296">
            <text:p>162,6078296</text:p>
          </table:table-cell>
          <table:table-cell office:value-type="float" office:value="158.0531321">
            <text:p>158,0531321</text:p>
          </table:table-cell>
          <table:table-cell office:value-type="float" office:value="158.4360691">
            <text:p>158,4360691</text:p>
          </table:table-cell>
          <table:table-cell office:value-type="float" office:value="159.0447015">
            <text:p>159,0447015</text:p>
          </table:table-cell>
          <table:table-cell office:value-type="float" office:value="161.4133669">
            <text:p>161,4133669</text:p>
          </table:table-cell>
          <table:table-cell office:value-type="float" office:value="165.3630609">
            <text:p>165,3630609</text:p>
          </table:table-cell>
          <table:table-cell office:value-type="float" office:value="165.1099545">
            <text:p>165,1099545</text:p>
          </table:table-cell>
          <table:table-cell office:value-type="float" office:value="164.942489">
            <text:p>164,942489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63.6085186">
            <text:p>163,6085186</text:p>
          </table:table-cell>
          <table:table-cell office:value-type="float" office:value="161.4238418">
            <text:p>161,4238418</text:p>
          </table:table-cell>
          <table:table-cell office:value-type="float" office:value="161.9695808">
            <text:p>161,9695808</text:p>
          </table:table-cell>
          <table:table-cell office:value-type="float" office:value="162.2260533">
            <text:p>162,2260533</text:p>
          </table:table-cell>
          <table:table-cell office:value-type="float" office:value="163.4485887">
            <text:p>163,4485887</text:p>
          </table:table-cell>
          <table:table-cell office:value-type="float" office:value="158.7719745">
            <text:p>158,7719745</text:p>
          </table:table-cell>
          <table:table-cell office:value-type="float" office:value="166.2107295">
            <text:p>166,2107295</text:p>
          </table:table-cell>
          <table:table-cell office:value-type="float" office:value="162.6741292">
            <text:p>162,6741292</text:p>
          </table:table-cell>
          <table:table-cell office:value-type="float" office:value="158.2003733">
            <text:p>158,2003733</text:p>
          </table:table-cell>
          <table:table-cell office:value-type="float" office:value="158.5571967">
            <text:p>158,5571967</text:p>
          </table:table-cell>
          <table:table-cell office:value-type="float" office:value="159.2080729">
            <text:p>159,2080729</text:p>
          </table:table-cell>
          <table:table-cell office:value-type="float" office:value="161.4999258">
            <text:p>161,4999258</text:p>
          </table:table-cell>
          <table:table-cell office:value-type="float" office:value="165.4690605">
            <text:p>165,4690605</text:p>
          </table:table-cell>
          <table:table-cell office:value-type="float" office:value="165.1732427">
            <text:p>165,1732427</text:p>
          </table:table-cell>
          <table:table-cell office:value-type="float" office:value="165.0021009">
            <text:p>165,0021009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63.6722868">
            <text:p>163,6722868</text:p>
          </table:table-cell>
          <table:table-cell office:value-type="float" office:value="161.5241744">
            <text:p>161,5241744</text:p>
          </table:table-cell>
          <table:table-cell office:value-type="float" office:value="162.0736408">
            <text:p>162,0736408</text:p>
          </table:table-cell>
          <table:table-cell office:value-type="float" office:value="162.2941787">
            <text:p>162,2941787</text:p>
          </table:table-cell>
          <table:table-cell office:value-type="float" office:value="163.5290842">
            <text:p>163,5290842</text:p>
          </table:table-cell>
          <table:table-cell office:value-type="float" office:value="158.8589231">
            <text:p>158,8589231</text:p>
          </table:table-cell>
          <table:table-cell office:value-type="float" office:value="166.3301506">
            <text:p>166,3301506</text:p>
          </table:table-cell>
          <table:table-cell office:value-type="float" office:value="162.7437887">
            <text:p>162,7437887</text:p>
          </table:table-cell>
          <table:table-cell office:value-type="float" office:value="158.350131">
            <text:p>158,350131</text:p>
          </table:table-cell>
          <table:table-cell office:value-type="float" office:value="158.6790565">
            <text:p>158,6790565</text:p>
          </table:table-cell>
          <table:table-cell office:value-type="float" office:value="159.372555">
            <text:p>159,372555</text:p>
          </table:table-cell>
          <table:table-cell office:value-type="float" office:value="161.5862771">
            <text:p>161,5862771</text:p>
          </table:table-cell>
          <table:table-cell office:value-type="float" office:value="165.5766424">
            <text:p>165,5766424</text:p>
          </table:table-cell>
          <table:table-cell office:value-type="float" office:value="165.2373154">
            <text:p>165,2373154</text:p>
          </table:table-cell>
          <table:table-cell office:value-type="float" office:value="165.067581">
            <text:p>165,067581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63.740946">
            <text:p>163,740946</text:p>
          </table:table-cell>
          <table:table-cell office:value-type="float" office:value="161.6287918">
            <text:p>161,6287918</text:p>
          </table:table-cell>
          <table:table-cell office:value-type="float" office:value="162.1849282">
            <text:p>162,1849282</text:p>
          </table:table-cell>
          <table:table-cell office:value-type="float" office:value="162.3627153">
            <text:p>162,3627153</text:p>
          </table:table-cell>
          <table:table-cell office:value-type="float" office:value="163.6181083">
            <text:p>163,6181083</text:p>
          </table:table-cell>
          <table:table-cell office:value-type="float" office:value="158.952529">
            <text:p>158,952529</text:p>
          </table:table-cell>
          <table:table-cell office:value-type="float" office:value="166.4529884">
            <text:p>166,4529884</text:p>
          </table:table-cell>
          <table:table-cell office:value-type="float" office:value="162.8181268">
            <text:p>162,8181268</text:p>
          </table:table-cell>
          <table:table-cell office:value-type="float" office:value="158.5036789">
            <text:p>158,5036789</text:p>
          </table:table-cell>
          <table:table-cell office:value-type="float" office:value="158.8030222">
            <text:p>158,8030222</text:p>
          </table:table-cell>
          <table:table-cell office:value-type="float" office:value="159.5393304">
            <text:p>159,5393304</text:p>
          </table:table-cell>
          <table:table-cell office:value-type="float" office:value="161.6741844">
            <text:p>161,6741844</text:p>
          </table:table-cell>
          <table:table-cell office:value-type="float" office:value="165.6871758">
            <text:p>165,6871758</text:p>
          </table:table-cell>
          <table:table-cell office:value-type="float" office:value="165.3036776">
            <text:p>165,3036776</text:p>
          </table:table-cell>
          <table:table-cell office:value-type="float" office:value="165.1400706">
            <text:p>165,1400706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63.8136076">
            <text:p>163,8136076</text:p>
          </table:table-cell>
          <table:table-cell office:value-type="float" office:value="161.7373585">
            <text:p>161,7373585</text:p>
          </table:table-cell>
          <table:table-cell office:value-type="float" office:value="162.3034003">
            <text:p>162,3034003</text:p>
          </table:table-cell>
          <table:table-cell office:value-type="float" office:value="162.4327266">
            <text:p>162,4327266</text:p>
          </table:table-cell>
          <table:table-cell office:value-type="float" office:value="163.7152639">
            <text:p>163,7152639</text:p>
          </table:table-cell>
          <table:table-cell office:value-type="float" office:value="159.0532739">
            <text:p>159,0532739</text:p>
          </table:table-cell>
          <table:table-cell office:value-type="float" office:value="166.5788887">
            <text:p>166,5788887</text:p>
          </table:table-cell>
          <table:table-cell office:value-type="float" office:value="162.8964551">
            <text:p>162,8964551</text:p>
          </table:table-cell>
          <table:table-cell office:value-type="float" office:value="158.6611587">
            <text:p>158,6611587</text:p>
          </table:table-cell>
          <table:table-cell office:value-type="float" office:value="158.9291406">
            <text:p>158,9291406</text:p>
          </table:table-cell>
          <table:table-cell office:value-type="float" office:value="159.7081387">
            <text:p>159,7081387</text:p>
          </table:table-cell>
          <table:table-cell office:value-type="float" office:value="161.76438">
            <text:p>161,76438</text:p>
          </table:table-cell>
          <table:table-cell office:value-type="float" office:value="165.8001569">
            <text:p>165,8001569</text:p>
          </table:table-cell>
          <table:table-cell office:value-type="float" office:value="165.3722615">
            <text:p>165,3722615</text:p>
          </table:table-cell>
          <table:table-cell office:value-type="float" office:value="165.2181292">
            <text:p>165,2181292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63.8902634">
            <text:p>163,8902634</text:p>
          </table:table-cell>
          <table:table-cell office:value-type="float" office:value="161.8498998">
            <text:p>161,8498998</text:p>
          </table:table-cell>
          <table:table-cell office:value-type="float" office:value="162.4282908">
            <text:p>162,4282908</text:p>
          </table:table-cell>
          <table:table-cell office:value-type="float" office:value="162.5041512">
            <text:p>162,5041512</text:p>
          </table:table-cell>
          <table:table-cell office:value-type="float" office:value="163.8205807">
            <text:p>163,8205807</text:p>
          </table:table-cell>
          <table:table-cell office:value-type="float" office:value="159.1611535">
            <text:p>159,1611535</text:p>
          </table:table-cell>
          <table:table-cell office:value-type="float" office:value="166.7072215">
            <text:p>166,7072215</text:p>
          </table:table-cell>
          <table:table-cell office:value-type="float" office:value="162.978572">
            <text:p>162,978572</text:p>
          </table:table-cell>
          <table:table-cell office:value-type="float" office:value="158.82245">
            <text:p>158,82245</text:p>
          </table:table-cell>
          <table:table-cell office:value-type="float" office:value="159.0578618">
            <text:p>159,0578618</text:p>
          </table:table-cell>
          <table:table-cell office:value-type="float" office:value="159.8789649">
            <text:p>159,8789649</text:p>
          </table:table-cell>
          <table:table-cell office:value-type="float" office:value="161.8568697">
            <text:p>161,8568697</text:p>
          </table:table-cell>
          <table:table-cell office:value-type="float" office:value="165.9154035">
            <text:p>165,9154035</text:p>
          </table:table-cell>
          <table:table-cell office:value-type="float" office:value="165.4428285">
            <text:p>165,4428285</text:p>
          </table:table-cell>
          <table:table-cell office:value-type="float" office:value="165.3012973">
            <text:p>165,3012973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63.9712517">
            <text:p>163,9712517</text:p>
          </table:table-cell>
          <table:table-cell office:value-type="float" office:value="161.9666226">
            <text:p>161,9666226</text:p>
          </table:table-cell>
          <table:table-cell office:value-type="float" office:value="162.5599654">
            <text:p>162,5599654</text:p>
          </table:table-cell>
          <table:table-cell office:value-type="float" office:value="162.5782526">
            <text:p>162,5782526</text:p>
          </table:table-cell>
          <table:table-cell office:value-type="float" office:value="163.9344563">
            <text:p>163,9344563</text:p>
          </table:table-cell>
          <table:table-cell office:value-type="float" office:value="159.2772466">
            <text:p>159,2772466</text:p>
          </table:table-cell>
          <table:table-cell office:value-type="float" office:value="166.8381402">
            <text:p>166,8381402</text:p>
          </table:table-cell>
          <table:table-cell office:value-type="float" office:value="163.0645282">
            <text:p>163,0645282</text:p>
          </table:table-cell>
          <table:table-cell office:value-type="float" office:value="158.9879425">
            <text:p>158,9879425</text:p>
          </table:table-cell>
          <table:table-cell office:value-type="float" office:value="159.1900383">
            <text:p>159,1900383</text:p>
          </table:table-cell>
          <table:table-cell office:value-type="float" office:value="160.0521059">
            <text:p>160,0521059</text:p>
          </table:table-cell>
          <table:table-cell office:value-type="float" office:value="161.9526273">
            <text:p>161,9526273</text:p>
          </table:table-cell>
          <table:table-cell office:value-type="float" office:value="166.0329565">
            <text:p>166,0329565</text:p>
          </table:table-cell>
          <table:table-cell office:value-type="float" office:value="165.5158786">
            <text:p>165,5158786</text:p>
          </table:table-cell>
          <table:table-cell office:value-type="float" office:value="165.3895912">
            <text:p>165,3895912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64.0572162">
            <text:p>164,0572162</text:p>
          </table:table-cell>
          <table:table-cell office:value-type="float" office:value="162.0876968">
            <text:p>162,0876968</text:p>
          </table:table-cell>
          <table:table-cell office:value-type="float" office:value="162.6986594">
            <text:p>162,6986594</text:p>
          </table:table-cell>
          <table:table-cell office:value-type="float" office:value="162.6545198">
            <text:p>162,6545198</text:p>
          </table:table-cell>
          <table:table-cell office:value-type="float" office:value="164.0571608">
            <text:p>164,0571608</text:p>
          </table:table-cell>
          <table:table-cell office:value-type="float" office:value="159.4019447">
            <text:p>159,4019447</text:p>
          </table:table-cell>
          <table:table-cell office:value-type="float" office:value="166.972174">
            <text:p>166,972174</text:p>
          </table:table-cell>
          <table:table-cell office:value-type="float" office:value="163.1545555">
            <text:p>163,1545555</text:p>
          </table:table-cell>
          <table:table-cell office:value-type="float" office:value="159.1572867">
            <text:p>159,1572867</text:p>
          </table:table-cell>
          <table:table-cell office:value-type="float" office:value="159.3258843">
            <text:p>159,3258843</text:p>
          </table:table-cell>
          <table:table-cell office:value-type="float" office:value="160.2281897">
            <text:p>160,2281897</text:p>
          </table:table-cell>
          <table:table-cell office:value-type="float" office:value="162.0516587">
            <text:p>162,0516587</text:p>
          </table:table-cell>
          <table:table-cell office:value-type="float" office:value="166.1536405">
            <text:p>166,1536405</text:p>
          </table:table-cell>
          <table:table-cell office:value-type="float" office:value="165.5918814">
            <text:p>165,5918814</text:p>
          </table:table-cell>
          <table:table-cell office:value-type="float" office:value="165.4831144">
            <text:p>165,4831144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64.1487302">
            <text:p>164,1487302</text:p>
          </table:table-cell>
          <table:table-cell office:value-type="float" office:value="162.2132589">
            <text:p>162,2132589</text:p>
          </table:table-cell>
          <table:table-cell office:value-type="float" office:value="162.8447147">
            <text:p>162,8447147</text:p>
          </table:table-cell>
          <table:table-cell office:value-type="float" office:value="162.7319408">
            <text:p>162,7319408</text:p>
          </table:table-cell>
          <table:table-cell office:value-type="float" office:value="164.1887721">
            <text:p>164,1887721</text:p>
          </table:table-cell>
          <table:table-cell office:value-type="float" office:value="159.535411">
            <text:p>159,535411</text:p>
          </table:table-cell>
          <table:table-cell office:value-type="float" office:value="167.1099089">
            <text:p>167,1099089</text:p>
          </table:table-cell>
          <table:table-cell office:value-type="float" office:value="163.2490358">
            <text:p>163,2490358</text:p>
          </table:table-cell>
          <table:table-cell office:value-type="float" office:value="159.3309253">
            <text:p>159,3309253</text:p>
          </table:table-cell>
          <table:table-cell office:value-type="float" office:value="159.4656465">
            <text:p>159,4656465</text:p>
          </table:table-cell>
          <table:table-cell office:value-type="float" office:value="160.4074443">
            <text:p>160,4074443</text:p>
          </table:table-cell>
          <table:table-cell office:value-type="float" office:value="162.1535399">
            <text:p>162,1535399</text:p>
          </table:table-cell>
          <table:table-cell office:value-type="float" office:value="166.2781127">
            <text:p>166,2781127</text:p>
          </table:table-cell>
          <table:table-cell office:value-type="float" office:value="165.6714209">
            <text:p>165,6714209</text:p>
          </table:table-cell>
          <table:table-cell office:value-type="float" office:value="165.5824101">
            <text:p>165,5824101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64.2449788">
            <text:p>164,2449788</text:p>
          </table:table-cell>
          <table:table-cell office:value-type="float" office:value="162.3422562">
            <text:p>162,3422562</text:p>
          </table:table-cell>
          <table:table-cell office:value-type="float" office:value="162.9975324">
            <text:p>162,9975324</text:p>
          </table:table-cell>
          <table:table-cell office:value-type="float" office:value="162.8094316">
            <text:p>162,8094316</text:p>
          </table:table-cell>
          <table:table-cell office:value-type="float" office:value="164.3288939">
            <text:p>164,3288939</text:p>
          </table:table-cell>
          <table:table-cell office:value-type="float" office:value="159.6772805">
            <text:p>159,6772805</text:p>
          </table:table-cell>
          <table:table-cell office:value-type="float" office:value="167.2507">
            <text:p>167,2507</text:p>
          </table:table-cell>
          <table:table-cell office:value-type="float" office:value="163.3470471">
            <text:p>163,3470471</text:p>
          </table:table-cell>
          <table:table-cell office:value-type="float" office:value="159.5075921">
            <text:p>159,5075921</text:p>
          </table:table-cell>
          <table:table-cell office:value-type="float" office:value="159.608745">
            <text:p>159,608745</text:p>
          </table:table-cell>
          <table:table-cell office:value-type="float" office:value="160.5888036">
            <text:p>160,5888036</text:p>
          </table:table-cell>
          <table:table-cell office:value-type="float" office:value="162.2569385">
            <text:p>162,2569385</text:p>
          </table:table-cell>
          <table:table-cell office:value-type="float" office:value="166.4059129">
            <text:p>166,4059129</text:p>
          </table:table-cell>
          <table:table-cell office:value-type="float" office:value="165.7543877">
            <text:p>165,7543877</text:p>
          </table:table-cell>
          <table:table-cell office:value-type="float" office:value="165.686265">
            <text:p>165,686265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64.3464048">
            <text:p>164,3464048</text:p>
          </table:table-cell>
          <table:table-cell office:value-type="float" office:value="162.4749436">
            <text:p>162,4749436</text:p>
          </table:table-cell>
          <table:table-cell office:value-type="float" office:value="163.1572235">
            <text:p>163,1572235</text:p>
          </table:table-cell>
          <table:table-cell office:value-type="float" office:value="162.8874065">
            <text:p>162,8874065</text:p>
          </table:table-cell>
          <table:table-cell office:value-type="float" office:value="164.4774444">
            <text:p>164,4774444</text:p>
          </table:table-cell>
          <table:table-cell office:value-type="float" office:value="159.8276435">
            <text:p>159,8276435</text:p>
          </table:table-cell>
          <table:table-cell office:value-type="float" office:value="167.3953604">
            <text:p>167,3953604</text:p>
          </table:table-cell>
          <table:table-cell office:value-type="float" office:value="163.4494436">
            <text:p>163,4494436</text:p>
          </table:table-cell>
          <table:table-cell office:value-type="float" office:value="159.6876755">
            <text:p>159,6876755</text:p>
          </table:table-cell>
          <table:table-cell office:value-type="float" office:value="159.7555174">
            <text:p>159,7555174</text:p>
          </table:table-cell>
          <table:table-cell office:value-type="float" office:value="160.772801">
            <text:p>160,772801</text:p>
          </table:table-cell>
          <table:table-cell office:value-type="float" office:value="162.362701">
            <text:p>162,362701</text:p>
          </table:table-cell>
          <table:table-cell office:value-type="float" office:value="166.5376795">
            <text:p>166,5376795</text:p>
          </table:table-cell>
          <table:table-cell office:value-type="float" office:value="165.841436">
            <text:p>165,841436</text:p>
          </table:table-cell>
          <table:table-cell office:value-type="float" office:value="165.7945986">
            <text:p>165,7945986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64.4521624">
            <text:p>164,4521624</text:p>
          </table:table-cell>
          <table:table-cell office:value-type="float" office:value="162.6110881">
            <text:p>162,6110881</text:p>
          </table:table-cell>
          <table:table-cell office:value-type="float" office:value="163.3222913">
            <text:p>163,3222913</text:p>
          </table:table-cell>
          <table:table-cell office:value-type="float" office:value="162.966367">
            <text:p>162,966367</text:p>
          </table:table-cell>
          <table:table-cell office:value-type="float" office:value="164.6329562">
            <text:p>164,6329562</text:p>
          </table:table-cell>
          <table:table-cell office:value-type="float" office:value="159.9861302">
            <text:p>159,9861302</text:p>
          </table:table-cell>
          <table:table-cell office:value-type="float" office:value="167.5426097">
            <text:p>167,5426097</text:p>
          </table:table-cell>
          <table:table-cell office:value-type="float" office:value="163.5547448">
            <text:p>163,5547448</text:p>
          </table:table-cell>
          <table:table-cell office:value-type="float" office:value="159.8708831">
            <text:p>159,8708831</text:p>
          </table:table-cell>
          <table:table-cell office:value-type="float" office:value="159.9052874">
            <text:p>159,9052874</text:p>
          </table:table-cell>
          <table:table-cell office:value-type="float" office:value="160.9589973">
            <text:p>160,9589973</text:p>
          </table:table-cell>
          <table:table-cell office:value-type="float" office:value="162.4711085">
            <text:p>162,4711085</text:p>
          </table:table-cell>
          <table:table-cell office:value-type="float" office:value="166.672061">
            <text:p>166,672061</text:p>
          </table:table-cell>
          <table:table-cell office:value-type="float" office:value="165.9318089">
            <text:p>165,9318089</text:p>
          </table:table-cell>
          <table:table-cell office:value-type="float" office:value="165.905703">
            <text:p>165,905703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64.5600276">
            <text:p>164,5600276</text:p>
          </table:table-cell>
          <table:table-cell office:value-type="float" office:value="162.7491697">
            <text:p>162,7491697</text:p>
          </table:table-cell>
          <table:table-cell office:value-type="float" office:value="163.490534">
            <text:p>163,490534</text:p>
          </table:table-cell>
          <table:table-cell office:value-type="float" office:value="163.0451987">
            <text:p>163,0451987</text:p>
          </table:table-cell>
          <table:table-cell office:value-type="float" office:value="164.7927964">
            <text:p>164,7927964</text:p>
          </table:table-cell>
          <table:table-cell office:value-type="float" office:value="160.1511037">
            <text:p>160,1511037</text:p>
          </table:table-cell>
          <table:table-cell office:value-type="float" office:value="167.6909695">
            <text:p>167,6909695</text:p>
          </table:table-cell>
          <table:table-cell office:value-type="float" office:value="163.6613927">
            <text:p>163,6613927</text:p>
          </table:table-cell>
          <table:table-cell office:value-type="float" office:value="160.0557231">
            <text:p>160,0557231</text:p>
          </table:table-cell>
          <table:table-cell office:value-type="float" office:value="160.0569857">
            <text:p>160,0569857</text:p>
          </table:table-cell>
          <table:table-cell office:value-type="float" office:value="161.1460018">
            <text:p>161,1460018</text:p>
          </table:table-cell>
          <table:table-cell office:value-type="float" office:value="162.5809006">
            <text:p>162,5809006</text:p>
          </table:table-cell>
          <table:table-cell office:value-type="float" office:value="166.8074186">
            <text:p>166,8074186</text:p>
          </table:table-cell>
          <table:table-cell office:value-type="float" office:value="166.0238609">
            <text:p>166,0238609</text:p>
          </table:table-cell>
          <table:table-cell office:value-type="float" office:value="166.0176862">
            <text:p>166,0176862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64.6684344">
            <text:p>164,6684344</text:p>
          </table:table-cell>
          <table:table-cell office:value-type="float" office:value="162.8884751">
            <text:p>162,8884751</text:p>
          </table:table-cell>
          <table:table-cell office:value-type="float" office:value="163.6605006">
            <text:p>163,6605006</text:p>
          </table:table-cell>
          <table:table-cell office:value-type="float" office:value="163.1240172">
            <text:p>163,1240172</text:p>
          </table:table-cell>
          <table:table-cell office:value-type="float" office:value="164.954266">
            <text:p>164,954266</text:p>
          </table:table-cell>
          <table:table-cell office:value-type="float" office:value="160.3221039">
            <text:p>160,3221039</text:p>
          </table:table-cell>
          <table:table-cell office:value-type="float" office:value="167.8388548">
            <text:p>167,8388548</text:p>
          </table:table-cell>
          <table:table-cell office:value-type="float" office:value="163.7678054">
            <text:p>163,7678054</text:p>
          </table:table-cell>
          <table:table-cell office:value-type="float" office:value="160.2412968">
            <text:p>160,2412968</text:p>
          </table:table-cell>
          <table:table-cell office:value-type="float" office:value="160.2102097">
            <text:p>160,2102097</text:p>
          </table:table-cell>
          <table:table-cell office:value-type="float" office:value="161.3336376">
            <text:p>161,3336376</text:p>
          </table:table-cell>
          <table:table-cell office:value-type="float" office:value="162.6922924">
            <text:p>162,6922924</text:p>
          </table:table-cell>
          <table:table-cell office:value-type="float" office:value="166.9418945">
            <text:p>166,9418945</text:p>
          </table:table-cell>
          <table:table-cell office:value-type="float" office:value="166.1162691">
            <text:p>166,1162691</text:p>
          </table:table-cell>
          <table:table-cell office:value-type="float" office:value="166.1281946">
            <text:p>166,1281946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64.7762705">
            <text:p>164,7762705</text:p>
          </table:table-cell>
          <table:table-cell office:value-type="float" office:value="163.0278552">
            <text:p>163,0278552</text:p>
          </table:table-cell>
          <table:table-cell office:value-type="float" office:value="163.8307038">
            <text:p>163,8307038</text:p>
          </table:table-cell>
          <table:table-cell office:value-type="float" office:value="163.2031073">
            <text:p>163,2031073</text:p>
          </table:table-cell>
          <table:table-cell office:value-type="float" office:value="165.1159104">
            <text:p>165,1159104</text:p>
          </table:table-cell>
          <table:table-cell office:value-type="float" office:value="160.4979442">
            <text:p>160,4979442</text:p>
          </table:table-cell>
          <table:table-cell office:value-type="float" office:value="167.9851294">
            <text:p>167,9851294</text:p>
          </table:table-cell>
          <table:table-cell office:value-type="float" office:value="163.8724028">
            <text:p>163,8724028</text:p>
          </table:table-cell>
          <table:table-cell office:value-type="float" office:value="160.426647">
            <text:p>160,426647</text:p>
          </table:table-cell>
          <table:table-cell office:value-type="float" office:value="160.3638275">
            <text:p>160,3638275</text:p>
          </table:table-cell>
          <table:table-cell office:value-type="float" office:value="161.5205222">
            <text:p>161,5205222</text:p>
          </table:table-cell>
          <table:table-cell office:value-type="float" office:value="162.8051559">
            <text:p>162,8051559</text:p>
          </table:table-cell>
          <table:table-cell office:value-type="float" office:value="167.0740449">
            <text:p>167,0740449</text:p>
          </table:table-cell>
          <table:table-cell office:value-type="float" office:value="166.2079226">
            <text:p>166,2079226</text:p>
          </table:table-cell>
          <table:table-cell office:value-type="float" office:value="166.2358684">
            <text:p>166,2358684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64.8804893">
            <text:p>164,8804893</text:p>
          </table:table-cell>
          <table:table-cell office:value-type="float" office:value="163.1648749">
            <text:p>163,1648749</text:p>
          </table:table-cell>
          <table:table-cell office:value-type="float" office:value="163.9980207">
            <text:p>163,9980207</text:p>
          </table:table-cell>
          <table:table-cell office:value-type="float" office:value="163.2806855">
            <text:p>163,2806855</text:p>
          </table:table-cell>
          <table:table-cell office:value-type="float" office:value="165.2740343">
            <text:p>165,2740343</text:p>
          </table:table-cell>
          <table:table-cell office:value-type="float" office:value="160.6761807">
            <text:p>160,6761807</text:p>
          </table:table-cell>
          <table:table-cell office:value-type="float" office:value="168.1266627">
            <text:p>168,1266627</text:p>
          </table:table-cell>
          <table:table-cell office:value-type="float" office:value="163.9723684">
            <text:p>163,9723684</text:p>
          </table:table-cell>
          <table:table-cell office:value-type="float" office:value="160.609524">
            <text:p>160,609524</text:p>
          </table:table-cell>
          <table:table-cell office:value-type="float" office:value="160.5159292">
            <text:p>160,5159292</text:p>
          </table:table-cell>
          <table:table-cell office:value-type="float" office:value="161.7049818">
            <text:p>161,7049818</text:p>
          </table:table-cell>
          <table:table-cell office:value-type="float" office:value="162.917829">
            <text:p>162,917829</text:p>
          </table:table-cell>
          <table:table-cell office:value-type="float" office:value="167.2005856">
            <text:p>167,2005856</text:p>
          </table:table-cell>
          <table:table-cell office:value-type="float" office:value="166.2963897">
            <text:p>166,2963897</text:p>
          </table:table-cell>
          <table:table-cell office:value-type="float" office:value="166.3376317">
            <text:p>166,3376317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4.9775317">
            <text:p>164,9775317</text:p>
          </table:table-cell>
          <table:table-cell office:value-type="float" office:value="163.2963984">
            <text:p>163,2963984</text:p>
          </table:table-cell>
          <table:table-cell office:value-type="float" office:value="164.1588402">
            <text:p>164,1588402</text:p>
          </table:table-cell>
          <table:table-cell office:value-type="float" office:value="163.3540118">
            <text:p>163,3540118</text:p>
          </table:table-cell>
          <table:table-cell office:value-type="float" office:value="165.4240234">
            <text:p>165,4240234</text:p>
          </table:table-cell>
          <table:table-cell office:value-type="float" office:value="160.8530159">
            <text:p>160,8530159</text:p>
          </table:table-cell>
          <table:table-cell office:value-type="float" office:value="168.2596407">
            <text:p>168,2596407</text:p>
          </table:table-cell>
          <table:table-cell office:value-type="float" office:value="164.0642013">
            <text:p>164,0642013</text:p>
          </table:table-cell>
          <table:table-cell office:value-type="float" office:value="160.7868386">
            <text:p>160,7868386</text:p>
          </table:table-cell>
          <table:table-cell office:value-type="float" office:value="160.6636239">
            <text:p>160,6636239</text:p>
          </table:table-cell>
          <table:table-cell office:value-type="float" office:value="161.8836912">
            <text:p>161,8836912</text:p>
          </table:table-cell>
          <table:table-cell office:value-type="float" office:value="163.0279757">
            <text:p>163,0279757</text:p>
          </table:table-cell>
          <table:table-cell office:value-type="float" office:value="167.3178203">
            <text:p>167,3178203</text:p>
          </table:table-cell>
          <table:table-cell office:value-type="float" office:value="166.3778244">
            <text:p>166,3778244</text:p>
          </table:table-cell>
          <table:table-cell office:value-type="float" office:value="166.4300051">
            <text:p>166,4300051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65.0640683">
            <text:p>165,0640683</text:p>
          </table:table-cell>
          <table:table-cell office:value-type="float" office:value="163.4196151">
            <text:p>163,4196151</text:p>
          </table:table-cell>
          <table:table-cell office:value-type="float" office:value="164.3099831">
            <text:p>164,3099831</text:p>
          </table:table-cell>
          <table:table-cell office:value-type="float" office:value="163.4195972">
            <text:p>163,4195972</text:p>
          </table:table-cell>
          <table:table-cell office:value-type="float" office:value="165.5623561">
            <text:p>165,5623561</text:p>
          </table:table-cell>
          <table:table-cell office:value-type="float" office:value="161.0251309">
            <text:p>161,0251309</text:p>
          </table:table-cell>
          <table:table-cell office:value-type="float" office:value="168.3808561">
            <text:p>168,3808561</text:p>
          </table:table-cell>
          <table:table-cell office:value-type="float" office:value="164.1448416">
            <text:p>164,1448416</text:p>
          </table:table-cell>
          <table:table-cell office:value-type="float" office:value="160.9559488">
            <text:p>160,9559488</text:p>
          </table:table-cell>
          <table:table-cell office:value-type="float" office:value="160.8043051">
            <text:p>160,8043051</text:p>
          </table:table-cell>
          <table:table-cell office:value-type="float" office:value="162.0539484">
            <text:p>162,0539484</text:p>
          </table:table-cell>
          <table:table-cell office:value-type="float" office:value="163.1321721">
            <text:p>163,1321721</text:p>
          </table:table-cell>
          <table:table-cell office:value-type="float" office:value="167.4231585">
            <text:p>167,4231585</text:p>
          </table:table-cell>
          <table:table-cell office:value-type="float" office:value="166.4496921">
            <text:p>166,4496921</text:p>
          </table:table-cell>
          <table:table-cell office:value-type="float" office:value="166.5098806">
            <text:p>166,5098806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65.1386609">
            <text:p>165,1386609</text:p>
          </table:table-cell>
          <table:table-cell office:value-type="float" office:value="163.5332596">
            <text:p>163,5332596</text:p>
          </table:table-cell>
          <table:table-cell office:value-type="float" office:value="164.4496941">
            <text:p>164,4496941</text:p>
          </table:table-cell>
          <table:table-cell office:value-type="float" office:value="163.4759074">
            <text:p>163,4759074</text:p>
          </table:table-cell>
          <table:table-cell office:value-type="float" office:value="165.6870514">
            <text:p>165,6870514</text:p>
          </table:table-cell>
          <table:table-cell office:value-type="float" office:value="161.1908069">
            <text:p>161,1908069</text:p>
          </table:table-cell>
          <table:table-cell office:value-type="float" office:value="168.4890349">
            <text:p>168,4890349</text:p>
          </table:table-cell>
          <table:table-cell office:value-type="float" office:value="164.2130768">
            <text:p>164,2130768</text:p>
          </table:table-cell>
          <table:table-cell office:value-type="float" office:value="161.1151448">
            <text:p>161,1151448</text:p>
          </table:table-cell>
          <table:table-cell office:value-type="float" office:value="160.936521">
            <text:p>160,936521</text:p>
          </table:table-cell>
          <table:table-cell office:value-type="float" office:value="162.2148762">
            <text:p>162,2148762</text:p>
          </table:table-cell>
          <table:table-cell office:value-type="float" office:value="163.2291331">
            <text:p>163,2291331</text:p>
          </table:table-cell>
          <table:table-cell office:value-type="float" office:value="167.5148149">
            <text:p>167,5148149</text:p>
          </table:table-cell>
          <table:table-cell office:value-type="float" office:value="166.5109143">
            <text:p>166,5109143</text:p>
          </table:table-cell>
          <table:table-cell office:value-type="float" office:value="166.5760968">
            <text:p>166,5760968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65.2010233">
            <text:p>165,2010233</text:p>
          </table:table-cell>
          <table:table-cell office:value-type="float" office:value="163.6371343">
            <text:p>163,6371343</text:p>
          </table:table-cell>
          <table:table-cell office:value-type="float" office:value="164.5768672">
            <text:p>164,5768672</text:p>
          </table:table-cell>
          <table:table-cell office:value-type="float" office:value="163.5223382">
            <text:p>163,5223382</text:p>
          </table:table-cell>
          <table:table-cell office:value-type="float" office:value="165.7972952">
            <text:p>165,7972952</text:p>
          </table:table-cell>
          <table:table-cell office:value-type="float" office:value="161.349927">
            <text:p>161,349927</text:p>
          </table:table-cell>
          <table:table-cell office:value-type="float" office:value="168.5836307">
            <text:p>168,5836307</text:p>
          </table:table-cell>
          <table:table-cell office:value-type="float" office:value="164.2686403">
            <text:p>164,2686403</text:p>
          </table:table-cell>
          <table:table-cell office:value-type="float" office:value="161.2643165">
            <text:p>161,2643165</text:p>
          </table:table-cell>
          <table:table-cell office:value-type="float" office:value="161.0600078">
            <text:p>161,0600078</text:p>
          </table:table-cell>
          <table:table-cell office:value-type="float" office:value="162.3660734">
            <text:p>162,3660734</text:p>
          </table:table-cell>
          <table:table-cell office:value-type="float" office:value="163.318434">
            <text:p>163,318434</text:p>
          </table:table-cell>
          <table:table-cell office:value-type="float" office:value="167.5925662">
            <text:p>167,5925662</text:p>
          </table:table-cell>
          <table:table-cell office:value-type="float" office:value="166.5611408">
            <text:p>166,5611408</text:p>
          </table:table-cell>
          <table:table-cell office:value-type="float" office:value="166.628474">
            <text:p>166,628474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65.2527905">
            <text:p>165,2527905</text:p>
          </table:table-cell>
          <table:table-cell office:value-type="float" office:value="163.7330959">
            <text:p>163,7330959</text:p>
          </table:table-cell>
          <table:table-cell office:value-type="float" office:value="164.6925291">
            <text:p>164,6925291</text:p>
          </table:table-cell>
          <table:table-cell office:value-type="float" office:value="163.5605916">
            <text:p>163,5605916</text:p>
          </table:table-cell>
          <table:table-cell office:value-type="float" office:value="165.8941757">
            <text:p>165,8941757</text:p>
          </table:table-cell>
          <table:table-cell office:value-type="float" office:value="161.5042243">
            <text:p>161,5042243</text:p>
          </table:table-cell>
          <table:table-cell office:value-type="float" office:value="168.6657742">
            <text:p>168,6657742</text:p>
          </table:table-cell>
          <table:table-cell office:value-type="float" office:value="164.3130159">
            <text:p>164,3130159</text:p>
          </table:table-cell>
          <table:table-cell office:value-type="float" office:value="161.4054452">
            <text:p>161,4054452</text:p>
          </table:table-cell>
          <table:table-cell office:value-type="float" office:value="161.176883">
            <text:p>161,176883</text:p>
          </table:table-cell>
          <table:table-cell office:value-type="float" office:value="162.509479">
            <text:p>162,509479</text:p>
          </table:table-cell>
          <table:table-cell office:value-type="float" office:value="163.4013899">
            <text:p>163,4013899</text:p>
          </table:table-cell>
          <table:table-cell office:value-type="float" office:value="167.657997">
            <text:p>167,657997</text:p>
          </table:table-cell>
          <table:table-cell office:value-type="float" office:value="166.601602">
            <text:p>166,601602</text:p>
          </table:table-cell>
          <table:table-cell office:value-type="float" office:value="166.668552">
            <text:p>166,668552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65.2940603">
            <text:p>165,2940603</text:p>
          </table:table-cell>
          <table:table-cell office:value-type="float" office:value="163.8221186">
            <text:p>163,8221186</text:p>
          </table:table-cell>
          <table:table-cell office:value-type="float" office:value="164.7966328">
            <text:p>164,7966328</text:p>
          </table:table-cell>
          <table:table-cell office:value-type="float" office:value="163.5919176">
            <text:p>163,5919176</text:p>
          </table:table-cell>
          <table:table-cell office:value-type="float" office:value="165.9781349">
            <text:p>165,9781349</text:p>
          </table:table-cell>
          <table:table-cell office:value-type="float" office:value="161.6544522">
            <text:p>161,6544522</text:p>
          </table:table-cell>
          <table:table-cell office:value-type="float" office:value="168.7359905">
            <text:p>168,7359905</text:p>
          </table:table-cell>
          <table:table-cell office:value-type="float" office:value="164.3468689">
            <text:p>164,3468689</text:p>
          </table:table-cell>
          <table:table-cell office:value-type="float" office:value="161.5391493">
            <text:p>161,5391493</text:p>
          </table:table-cell>
          <table:table-cell office:value-type="float" office:value="161.2876857">
            <text:p>161,2876857</text:p>
          </table:table-cell>
          <table:table-cell office:value-type="float" office:value="162.6459383">
            <text:p>162,6459383</text:p>
          </table:table-cell>
          <table:table-cell office:value-type="float" office:value="163.4786248">
            <text:p>163,4786248</text:p>
          </table:table-cell>
          <table:table-cell office:value-type="float" office:value="167.7115937">
            <text:p>167,7115937</text:p>
          </table:table-cell>
          <table:table-cell office:value-type="float" office:value="166.6328944">
            <text:p>166,6328944</text:p>
          </table:table-cell>
          <table:table-cell office:value-type="float" office:value="166.6971526">
            <text:p>166,6971526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65.3267612">
            <text:p>165,3267612</text:p>
          </table:table-cell>
          <table:table-cell office:value-type="float" office:value="163.9056062">
            <text:p>163,9056062</text:p>
          </table:table-cell>
          <table:table-cell office:value-type="float" office:value="164.8908472">
            <text:p>164,8908472</text:p>
          </table:table-cell>
          <table:table-cell office:value-type="float" office:value="163.6184535">
            <text:p>163,6184535</text:p>
          </table:table-cell>
          <table:table-cell office:value-type="float" office:value="166.0509487">
            <text:p>166,0509487</text:p>
          </table:table-cell>
          <table:table-cell office:value-type="float" office:value="161.8018567">
            <text:p>161,8018567</text:p>
          </table:table-cell>
          <table:table-cell office:value-type="float" office:value="168.7965467">
            <text:p>168,7965467</text:p>
          </table:table-cell>
          <table:table-cell office:value-type="float" office:value="164.3720738">
            <text:p>164,3720738</text:p>
          </table:table-cell>
          <table:table-cell office:value-type="float" office:value="161.6669368">
            <text:p>161,6669368</text:p>
          </table:table-cell>
          <table:table-cell office:value-type="float" office:value="161.3935899">
            <text:p>161,3935899</text:p>
          </table:table-cell>
          <table:table-cell office:value-type="float" office:value="162.7771119">
            <text:p>162,7771119</text:p>
          </table:table-cell>
          <table:table-cell office:value-type="float" office:value="163.5518593">
            <text:p>163,5518593</text:p>
          </table:table-cell>
          <table:table-cell office:value-type="float" office:value="167.7553479">
            <text:p>167,7553479</text:p>
          </table:table-cell>
          <table:table-cell office:value-type="float" office:value="166.6564471">
            <text:p>166,6564471</text:p>
          </table:table-cell>
          <table:table-cell office:value-type="float" office:value="166.7162359">
            <text:p>166,716235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65.350401">
            <text:p>165,350401</text:p>
          </table:table-cell>
          <table:table-cell office:value-type="float" office:value="163.9834691">
            <text:p>163,9834691</text:p>
          </table:table-cell>
          <table:table-cell office:value-type="float" office:value="164.9746092">
            <text:p>164,9746092</text:p>
          </table:table-cell>
          <table:table-cell office:value-type="float" office:value="163.6412445">
            <text:p>163,6412445</text:p>
          </table:table-cell>
          <table:table-cell office:value-type="float" office:value="166.1120251">
            <text:p>166,1120251</text:p>
          </table:table-cell>
          <table:table-cell office:value-type="float" office:value="161.9458544">
            <text:p>161,9458544</text:p>
          </table:table-cell>
          <table:table-cell office:value-type="float" office:value="168.8473887">
            <text:p>168,8473887</text:p>
          </table:table-cell>
          <table:table-cell office:value-type="float" office:value="164.3882199">
            <text:p>164,3882199</text:p>
          </table:table-cell>
          <table:table-cell office:value-type="float" office:value="161.7885822">
            <text:p>161,7885822</text:p>
          </table:table-cell>
          <table:table-cell office:value-type="float" office:value="161.4945152">
            <text:p>161,4945152</text:p>
          </table:table-cell>
          <table:table-cell office:value-type="float" office:value="162.9027045">
            <text:p>162,9027045</text:p>
          </table:table-cell>
          <table:table-cell office:value-type="float" office:value="163.6213584">
            <text:p>163,6213584</text:p>
          </table:table-cell>
          <table:table-cell office:value-type="float" office:value="167.7892816">
            <text:p>167,7892816</text:p>
          </table:table-cell>
          <table:table-cell office:value-type="float" office:value="166.6717411">
            <text:p>166,6717411</text:p>
          </table:table-cell>
          <table:table-cell office:value-type="float" office:value="166.7258469">
            <text:p>166,7258469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65.3659737">
            <text:p>165,3659737</text:p>
          </table:table-cell>
          <table:table-cell office:value-type="float" office:value="164.056815">
            <text:p>164,056815</text:p>
          </table:table-cell>
          <table:table-cell office:value-type="float" office:value="165.0490139">
            <text:p>165,0490139</text:p>
          </table:table-cell>
          <table:table-cell office:value-type="float" office:value="163.6622747">
            <text:p>163,6622747</text:p>
          </table:table-cell>
          <table:table-cell office:value-type="float" office:value="166.1627088">
            <text:p>166,1627088</text:p>
          </table:table-cell>
          <table:table-cell office:value-type="float" office:value="162.0867926">
            <text:p>162,0867926</text:p>
          </table:table-cell>
          <table:table-cell office:value-type="float" office:value="168.8895216">
            <text:p>168,8895216</text:p>
          </table:table-cell>
          <table:table-cell office:value-type="float" office:value="164.3964441">
            <text:p>164,3964441</text:p>
          </table:table-cell>
          <table:table-cell office:value-type="float" office:value="161.9050297">
            <text:p>161,9050297</text:p>
          </table:table-cell>
          <table:table-cell office:value-type="float" office:value="161.5913429">
            <text:p>161,5913429</text:p>
          </table:table-cell>
          <table:table-cell office:value-type="float" office:value="163.023613">
            <text:p>163,023613</text:p>
          </table:table-cell>
          <table:table-cell office:value-type="float" office:value="163.6880271">
            <text:p>163,6880271</text:p>
          </table:table-cell>
          <table:table-cell office:value-type="float" office:value="167.8145078">
            <text:p>167,8145078</text:p>
          </table:table-cell>
          <table:table-cell office:value-type="float" office:value="166.6794579">
            <text:p>166,6794579</text:p>
          </table:table-cell>
          <table:table-cell office:value-type="float" office:value="166.7274687">
            <text:p>166,7274687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65.3739597">
            <text:p>165,3739597</text:p>
          </table:table-cell>
          <table:table-cell office:value-type="float" office:value="164.1260658">
            <text:p>164,1260658</text:p>
          </table:table-cell>
          <table:table-cell office:value-type="float" office:value="165.1143298">
            <text:p>165,1143298</text:p>
          </table:table-cell>
          <table:table-cell office:value-type="float" office:value="163.6826645">
            <text:p>163,6826645</text:p>
          </table:table-cell>
          <table:table-cell office:value-type="float" office:value="166.2035732">
            <text:p>166,2035732</text:p>
          </table:table-cell>
          <table:table-cell office:value-type="float" office:value="162.2243148">
            <text:p>162,2243148</text:p>
          </table:table-cell>
          <table:table-cell office:value-type="float" office:value="168.9233767">
            <text:p>168,9233767</text:p>
          </table:table-cell>
          <table:table-cell office:value-type="float" office:value="164.3971665">
            <text:p>164,3971665</text:p>
          </table:table-cell>
          <table:table-cell office:value-type="float" office:value="162.0162696">
            <text:p>162,0162696</text:p>
          </table:table-cell>
          <table:table-cell office:value-type="float" office:value="161.6838317">
            <text:p>161,6838317</text:p>
          </table:table-cell>
          <table:table-cell office:value-type="float" office:value="163.1401915">
            <text:p>163,1401915</text:p>
          </table:table-cell>
          <table:table-cell office:value-type="float" office:value="163.752485">
            <text:p>163,752485</text:p>
          </table:table-cell>
          <table:table-cell office:value-type="float" office:value="167.8316427">
            <text:p>167,8316427</text:p>
          </table:table-cell>
          <table:table-cell office:value-type="float" office:value="166.6799585">
            <text:p>166,6799585</text:p>
          </table:table-cell>
          <table:table-cell office:value-type="float" office:value="166.7211412">
            <text:p>166,7211412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65.3747776">
            <text:p>165,3747776</text:p>
          </table:table-cell>
          <table:table-cell office:value-type="float" office:value="164.1908443">
            <text:p>164,1908443</text:p>
          </table:table-cell>
          <table:table-cell office:value-type="float" office:value="165.1704644">
            <text:p>165,1704644</text:p>
          </table:table-cell>
          <table:table-cell office:value-type="float" office:value="163.7025019">
            <text:p>163,7025019</text:p>
          </table:table-cell>
          <table:table-cell office:value-type="float" office:value="166.2350184">
            <text:p>166,2350184</text:p>
          </table:table-cell>
          <table:table-cell office:value-type="float" office:value="162.3577623">
            <text:p>162,3577623</text:p>
          </table:table-cell>
          <table:table-cell office:value-type="float" office:value="168.9497701">
            <text:p>168,9497701</text:p>
          </table:table-cell>
          <table:table-cell office:value-type="float" office:value="164.3909613">
            <text:p>164,3909613</text:p>
          </table:table-cell>
          <table:table-cell office:value-type="float" office:value="162.1215872">
            <text:p>162,1215872</text:p>
          </table:table-cell>
          <table:table-cell office:value-type="float" office:value="161.7718446">
            <text:p>161,7718446</text:p>
          </table:table-cell>
          <table:table-cell office:value-type="float" office:value="163.252045">
            <text:p>163,252045</text:p>
          </table:table-cell>
          <table:table-cell office:value-type="float" office:value="163.8149516">
            <text:p>163,8149516</text:p>
          </table:table-cell>
          <table:table-cell office:value-type="float" office:value="167.8412022">
            <text:p>167,8412022</text:p>
          </table:table-cell>
          <table:table-cell office:value-type="float" office:value="166.6734734">
            <text:p>166,6734734</text:p>
          </table:table-cell>
          <table:table-cell office:value-type="float" office:value="166.7076691">
            <text:p>166,7076691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65.3686035">
            <text:p>165,3686035</text:p>
          </table:table-cell>
          <table:table-cell office:value-type="float" office:value="164.2507319">
            <text:p>164,2507319</text:p>
          </table:table-cell>
          <table:table-cell office:value-type="float" office:value="165.2178101">
            <text:p>165,2178101</text:p>
          </table:table-cell>
          <table:table-cell office:value-type="float" office:value="163.7220473">
            <text:p>163,7220473</text:p>
          </table:table-cell>
          <table:table-cell office:value-type="float" office:value="166.2572105">
            <text:p>166,2572105</text:p>
          </table:table-cell>
          <table:table-cell office:value-type="float" office:value="162.4868109">
            <text:p>162,4868109</text:p>
          </table:table-cell>
          <table:table-cell office:value-type="float" office:value="168.9688123">
            <text:p>168,9688123</text:p>
          </table:table-cell>
          <table:table-cell office:value-type="float" office:value="164.3777722">
            <text:p>164,3777722</text:p>
          </table:table-cell>
          <table:table-cell office:value-type="float" office:value="162.2205722">
            <text:p>162,2205722</text:p>
          </table:table-cell>
          <table:table-cell office:value-type="float" office:value="161.8551482">
            <text:p>161,8551482</text:p>
          </table:table-cell>
          <table:table-cell office:value-type="float" office:value="163.3585593">
            <text:p>163,3585593</text:p>
          </table:table-cell>
          <table:table-cell office:value-type="float" office:value="163.8753773">
            <text:p>163,8753773</text:p>
          </table:table-cell>
          <table:table-cell office:value-type="float" office:value="167.8434878">
            <text:p>167,8434878</text:p>
          </table:table-cell>
          <table:table-cell office:value-type="float" office:value="166.6597572">
            <text:p>166,6597572</text:p>
          </table:table-cell>
          <table:table-cell office:value-type="float" office:value="166.6867162">
            <text:p>166,6867162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65.3552239">
            <text:p>165,3552239</text:p>
          </table:table-cell>
          <table:table-cell office:value-type="float" office:value="164.3048419">
            <text:p>164,3048419</text:p>
          </table:table-cell>
          <table:table-cell office:value-type="float" office:value="165.2562004">
            <text:p>165,2562004</text:p>
          </table:table-cell>
          <table:table-cell office:value-type="float" office:value="163.7404472">
            <text:p>163,7404472</text:p>
          </table:table-cell>
          <table:table-cell office:value-type="float" office:value="166.2703509">
            <text:p>166,2703509</text:p>
          </table:table-cell>
          <table:table-cell office:value-type="float" office:value="162.6100954">
            <text:p>162,6100954</text:p>
          </table:table-cell>
          <table:table-cell office:value-type="float" office:value="168.980508">
            <text:p>168,980508</text:p>
          </table:table-cell>
          <table:table-cell office:value-type="float" office:value="164.3576178">
            <text:p>164,3576178</text:p>
          </table:table-cell>
          <table:table-cell office:value-type="float" office:value="162.3125975">
            <text:p>162,3125975</text:p>
          </table:table-cell>
          <table:table-cell office:value-type="float" office:value="161.9328699">
            <text:p>161,9328699</text:p>
          </table:table-cell>
          <table:table-cell office:value-type="float" office:value="163.4589838">
            <text:p>163,4589838</text:p>
          </table:table-cell>
          <table:table-cell office:value-type="float" office:value="163.9329147">
            <text:p>163,9329147</text:p>
          </table:table-cell>
          <table:table-cell office:value-type="float" office:value="167.8382239">
            <text:p>167,8382239</text:p>
          </table:table-cell>
          <table:table-cell office:value-type="float" office:value="166.6387873">
            <text:p>166,6387873</text:p>
          </table:table-cell>
          <table:table-cell office:value-type="float" office:value="166.6584777">
            <text:p>166,6584777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65.3346504">
            <text:p>165,3346504</text:p>
          </table:table-cell>
          <table:table-cell office:value-type="float" office:value="164.3529322">
            <text:p>164,3529322</text:p>
          </table:table-cell>
          <table:table-cell office:value-type="float" office:value="165.2854613">
            <text:p>165,2854613</text:p>
          </table:table-cell>
          <table:table-cell office:value-type="float" office:value="163.7572945">
            <text:p>163,7572945</text:p>
          </table:table-cell>
          <table:table-cell office:value-type="float" office:value="166.2745886">
            <text:p>166,2745886</text:p>
          </table:table-cell>
          <table:table-cell office:value-type="float" office:value="162.7273369">
            <text:p>162,7273369</text:p>
          </table:table-cell>
          <table:table-cell office:value-type="float" office:value="168.9847522">
            <text:p>168,9847522</text:p>
          </table:table-cell>
          <table:table-cell office:value-type="float" office:value="164.3300152">
            <text:p>164,3300152</text:p>
          </table:table-cell>
          <table:table-cell office:value-type="float" office:value="162.3972615">
            <text:p>162,3972615</text:p>
          </table:table-cell>
          <table:table-cell office:value-type="float" office:value="162.0047118">
            <text:p>162,0047118</text:p>
          </table:table-cell>
          <table:table-cell office:value-type="float" office:value="163.5528917">
            <text:p>163,5528917</text:p>
          </table:table-cell>
          <table:table-cell office:value-type="float" office:value="163.9873105">
            <text:p>163,9873105</text:p>
          </table:table-cell>
          <table:table-cell office:value-type="float" office:value="167.8252446">
            <text:p>167,8252446</text:p>
          </table:table-cell>
          <table:table-cell office:value-type="float" office:value="166.6103146">
            <text:p>166,6103146</text:p>
          </table:table-cell>
          <table:table-cell office:value-type="float" office:value="166.6227865">
            <text:p>166,6227865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65.3068703">
            <text:p>165,3068703</text:p>
          </table:table-cell>
          <table:table-cell office:value-type="float" office:value="164.3946564">
            <text:p>164,3946564</text:p>
          </table:table-cell>
          <table:table-cell office:value-type="float" office:value="165.3056202">
            <text:p>165,3056202</text:p>
          </table:table-cell>
          <table:table-cell office:value-type="float" office:value="163.7722382">
            <text:p>163,7722382</text:p>
          </table:table-cell>
          <table:table-cell office:value-type="float" office:value="166.2701959">
            <text:p>166,2701959</text:p>
          </table:table-cell>
          <table:table-cell office:value-type="float" office:value="162.8381359">
            <text:p>162,8381359</text:p>
          </table:table-cell>
          <table:table-cell office:value-type="float" office:value="168.9816308">
            <text:p>168,9816308</text:p>
          </table:table-cell>
          <table:table-cell office:value-type="float" office:value="164.2952142">
            <text:p>164,2952142</text:p>
          </table:table-cell>
          <table:table-cell office:value-type="float" office:value="162.4740751">
            <text:p>162,4740751</text:p>
          </table:table-cell>
          <table:table-cell office:value-type="float" office:value="162.0703911">
            <text:p>162,0703911</text:p>
          </table:table-cell>
          <table:table-cell office:value-type="float" office:value="163.6402497">
            <text:p>163,6402497</text:p>
          </table:table-cell>
          <table:table-cell office:value-type="float" office:value="164.0381016">
            <text:p>164,0381016</text:p>
          </table:table-cell>
          <table:table-cell office:value-type="float" office:value="167.8044794">
            <text:p>167,8044794</text:p>
          </table:table-cell>
          <table:table-cell office:value-type="float" office:value="166.5743741">
            <text:p>166,5743741</text:p>
          </table:table-cell>
          <table:table-cell office:value-type="float" office:value="166.579491">
            <text:p>166,579491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65.2726702">
            <text:p>165,2726702</text:p>
          </table:table-cell>
          <table:table-cell office:value-type="float" office:value="164.4310791">
            <text:p>164,4310791</text:p>
          </table:table-cell>
          <table:table-cell office:value-type="float" office:value="165.3175342">
            <text:p>165,3175342</text:p>
          </table:table-cell>
          <table:table-cell office:value-type="float" office:value="163.7852123">
            <text:p>163,7852123</text:p>
          </table:table-cell>
          <table:table-cell office:value-type="float" office:value="166.2579226">
            <text:p>166,2579226</text:p>
          </table:table-cell>
          <table:table-cell office:value-type="float" office:value="162.9432759">
            <text:p>162,9432759</text:p>
          </table:table-cell>
          <table:table-cell office:value-type="float" office:value="168.971544">
            <text:p>168,971544</text:p>
          </table:table-cell>
          <table:table-cell office:value-type="float" office:value="164.253521">
            <text:p>164,253521</text:p>
          </table:table-cell>
          <table:table-cell office:value-type="float" office:value="162.5436422">
            <text:p>162,5436422</text:p>
          </table:table-cell>
          <table:table-cell office:value-type="float" office:value="162.1306644">
            <text:p>162,1306644</text:p>
          </table:table-cell>
          <table:table-cell office:value-type="float" office:value="163.7214158">
            <text:p>163,7214158</text:p>
          </table:table-cell>
          <table:table-cell office:value-type="float" office:value="164.0855055">
            <text:p>164,0855055</text:p>
          </table:table-cell>
          <table:table-cell office:value-type="float" office:value="167.7767377">
            <text:p>167,7767377</text:p>
          </table:table-cell>
          <table:table-cell office:value-type="float" office:value="166.5315421">
            <text:p>166,5315421</text:p>
          </table:table-cell>
          <table:table-cell office:value-type="float" office:value="166.5293924">
            <text:p>166,5293924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65.232904">
            <text:p>165,232904</text:p>
          </table:table-cell>
          <table:table-cell office:value-type="float" office:value="164.4628099">
            <text:p>164,4628099</text:p>
          </table:table-cell>
          <table:table-cell office:value-type="float" office:value="165.3228216">
            <text:p>165,3228216</text:p>
          </table:table-cell>
          <table:table-cell office:value-type="float" office:value="163.7976344">
            <text:p>163,7976344</text:p>
          </table:table-cell>
          <table:table-cell office:value-type="float" office:value="166.2386997">
            <text:p>166,2386997</text:p>
          </table:table-cell>
          <table:table-cell office:value-type="float" office:value="163.0436743">
            <text:p>163,0436743</text:p>
          </table:table-cell>
          <table:table-cell office:value-type="float" office:value="168.9556762">
            <text:p>168,9556762</text:p>
          </table:table-cell>
          <table:table-cell office:value-type="float" office:value="164.2064962">
            <text:p>164,2064962</text:p>
          </table:table-cell>
          <table:table-cell office:value-type="float" office:value="162.607012">
            <text:p>162,607012</text:p>
          </table:table-cell>
          <table:table-cell office:value-type="float" office:value="162.1863414">
            <text:p>162,1863414</text:p>
          </table:table-cell>
          <table:table-cell office:value-type="float" office:value="163.7976031">
            <text:p>163,7976031</text:p>
          </table:table-cell>
          <table:table-cell office:value-type="float" office:value="164.1306425">
            <text:p>164,1306425</text:p>
          </table:table-cell>
          <table:table-cell office:value-type="float" office:value="167.7432527">
            <text:p>167,7432527</text:p>
          </table:table-cell>
          <table:table-cell office:value-type="float" office:value="166.4831929">
            <text:p>166,4831929</text:p>
          </table:table-cell>
          <table:table-cell office:value-type="float" office:value="166.4736948">
            <text:p>166,4736948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65.1912514">
            <text:p>165,1912514</text:p>
          </table:table-cell>
          <table:table-cell office:value-type="float" office:value="164.4920817">
            <text:p>164,4920817</text:p>
          </table:table-cell>
          <table:table-cell office:value-type="float" office:value="165.3250566">
            <text:p>165,3250566</text:p>
          </table:table-cell>
          <table:table-cell office:value-type="float" office:value="163.8121012">
            <text:p>163,8121012</text:p>
          </table:table-cell>
          <table:table-cell office:value-type="float" office:value="166.2161117">
            <text:p>166,2161117</text:p>
          </table:table-cell>
          <table:table-cell office:value-type="float" office:value="163.1412931">
            <text:p>163,1412931</text:p>
          </table:table-cell>
          <table:table-cell office:value-type="float" office:value="168.936814">
            <text:p>168,936814</text:p>
          </table:table-cell>
          <table:table-cell office:value-type="float" office:value="164.1571371">
            <text:p>164,1571371</text:p>
          </table:table-cell>
          <table:table-cell office:value-type="float" office:value="162.6661863">
            <text:p>162,6661863</text:p>
          </table:table-cell>
          <table:table-cell office:value-type="float" office:value="162.2398835">
            <text:p>162,2398835</text:p>
          </table:table-cell>
          <table:table-cell office:value-type="float" office:value="163.8708359">
            <text:p>163,8708359</text:p>
          </table:table-cell>
          <table:table-cell office:value-type="float" office:value="164.1762033">
            <text:p>164,1762033</text:p>
          </table:table-cell>
          <table:table-cell office:value-type="float" office:value="167.7074609">
            <text:p>167,7074609</text:p>
          </table:table-cell>
          <table:table-cell office:value-type="float" office:value="166.4324784">
            <text:p>166,4324784</text:p>
          </table:table-cell>
          <table:table-cell office:value-type="float" office:value="166.415379">
            <text:p>166,415379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65.1493034">
            <text:p>165,1493034</text:p>
          </table:table-cell>
          <table:table-cell office:value-type="float" office:value="164.5201869">
            <text:p>164,5201869</text:p>
          </table:table-cell>
          <table:table-cell office:value-type="float" office:value="165.3266919">
            <text:p>165,3266919</text:p>
          </table:table-cell>
          <table:table-cell office:value-type="float" office:value="163.8303167">
            <text:p>163,8303167</text:p>
          </table:table-cell>
          <table:table-cell office:value-type="float" office:value="166.1925833">
            <text:p>166,1925833</text:p>
          </table:table-cell>
          <table:table-cell office:value-type="float" office:value="163.2376709">
            <text:p>163,2376709</text:p>
          </table:table-cell>
          <table:table-cell office:value-type="float" office:value="168.9175514">
            <text:p>168,9175514</text:p>
          </table:table-cell>
          <table:table-cell office:value-type="float" office:value="164.1075123">
            <text:p>164,1075123</text:p>
          </table:table-cell>
          <table:table-cell office:value-type="float" office:value="162.722524">
            <text:p>162,722524</text:p>
          </table:table-cell>
          <table:table-cell office:value-type="float" office:value="162.2928824">
            <text:p>162,2928824</text:p>
          </table:table-cell>
          <table:table-cell office:value-type="float" office:value="163.942336">
            <text:p>163,942336</text:p>
          </table:table-cell>
          <table:table-cell office:value-type="float" office:value="164.2234996">
            <text:p>164,2234996</text:p>
          </table:table-cell>
          <table:table-cell office:value-type="float" office:value="167.6712086">
            <text:p>167,6712086</text:p>
          </table:table-cell>
          <table:table-cell office:value-type="float" office:value="166.3813547">
            <text:p>166,3813547</text:p>
          </table:table-cell>
          <table:table-cell office:value-type="float" office:value="166.3566321">
            <text:p>166,3566321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65.1093961">
            <text:p>165,1093961</text:p>
          </table:table-cell>
          <table:table-cell office:value-type="float" office:value="164.5486498">
            <text:p>164,5486498</text:p>
          </table:table-cell>
          <table:table-cell office:value-type="float" office:value="165.3305242">
            <text:p>165,3305242</text:p>
          </table:table-cell>
          <table:table-cell office:value-type="float" office:value="163.8540214">
            <text:p>163,8540214</text:p>
          </table:table-cell>
          <table:table-cell office:value-type="float" office:value="166.1701915">
            <text:p>166,1701915</text:p>
          </table:table-cell>
          <table:table-cell office:value-type="float" office:value="163.3341351">
            <text:p>163,3341351</text:p>
          </table:table-cell>
          <table:table-cell office:value-type="float" office:value="168.9000874">
            <text:p>168,9000874</text:p>
          </table:table-cell>
          <table:table-cell office:value-type="float" office:value="164.0598141">
            <text:p>164,0598141</text:p>
          </table:table-cell>
          <table:table-cell office:value-type="float" office:value="162.7772559">
            <text:p>162,7772559</text:p>
          </table:table-cell>
          <table:table-cell office:value-type="float" office:value="162.3463995">
            <text:p>162,3463995</text:p>
          </table:table-cell>
          <table:table-cell office:value-type="float" office:value="164.0133986">
            <text:p>164,0133986</text:p>
          </table:table-cell>
          <table:table-cell office:value-type="float" office:value="164.2744079">
            <text:p>164,2744079</text:p>
          </table:table-cell>
          <table:table-cell office:value-type="float" office:value="167.636971">
            <text:p>167,636971</text:p>
          </table:table-cell>
          <table:table-cell office:value-type="float" office:value="166.3320303">
            <text:p>166,3320303</text:p>
          </table:table-cell>
          <table:table-cell office:value-type="float" office:value="166.2995807">
            <text:p>166,2995807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65.0732392">
            <text:p>165,0732392</text:p>
          </table:table-cell>
          <table:table-cell office:value-type="float" office:value="164.5782035">
            <text:p>164,5782035</text:p>
          </table:table-cell>
          <table:table-cell office:value-type="float" office:value="165.3389291">
            <text:p>165,3389291</text:p>
          </table:table-cell>
          <table:table-cell office:value-type="float" office:value="163.8841882">
            <text:p>163,8841882</text:p>
          </table:table-cell>
          <table:table-cell office:value-type="float" office:value="166.1504305">
            <text:p>166,1504305</text:p>
          </table:table-cell>
          <table:table-cell office:value-type="float" office:value="163.4312684">
            <text:p>163,4312684</text:p>
          </table:table-cell>
          <table:table-cell office:value-type="float" office:value="168.8858911">
            <text:p>168,8858911</text:p>
          </table:table-cell>
          <table:table-cell office:value-type="float" office:value="164.0155084">
            <text:p>164,0155084</text:p>
          </table:table-cell>
          <table:table-cell office:value-type="float" office:value="162.8314527">
            <text:p>162,8314527</text:p>
          </table:table-cell>
          <table:table-cell office:value-type="float" office:value="162.4010234">
            <text:p>162,4010234</text:p>
          </table:table-cell>
          <table:table-cell office:value-type="float" office:value="164.0845798">
            <text:p>164,0845798</text:p>
          </table:table-cell>
          <table:table-cell office:value-type="float" office:value="164.3301401">
            <text:p>164,3301401</text:p>
          </table:table-cell>
          <table:table-cell office:value-type="float" office:value="167.6063481">
            <text:p>167,6063481</text:p>
          </table:table-cell>
          <table:table-cell office:value-type="float" office:value="166.2859976">
            <text:p>166,2859976</text:p>
          </table:table-cell>
          <table:table-cell office:value-type="float" office:value="166.2459734">
            <text:p>166,2459734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65.0392861">
            <text:p>165,0392861</text:p>
          </table:table-cell>
          <table:table-cell office:value-type="float" office:value="164.6081989">
            <text:p>164,6081989</text:p>
          </table:table-cell>
          <table:table-cell office:value-type="float" office:value="165.350274">
            <text:p>165,350274</text:p>
          </table:table-cell>
          <table:table-cell office:value-type="float" office:value="163.9195897">
            <text:p>163,9195897</text:p>
          </table:table-cell>
          <table:table-cell office:value-type="float" office:value="166.131913">
            <text:p>166,131913</text:p>
          </table:table-cell>
          <table:table-cell office:value-type="float" office:value="163.5286995">
            <text:p>163,5286995</text:p>
          </table:table-cell>
          <table:table-cell office:value-type="float" office:value="168.8737507">
            <text:p>168,8737507</text:p>
          </table:table-cell>
          <table:table-cell office:value-type="float" office:value="163.9733181">
            <text:p>163,9733181</text:p>
          </table:table-cell>
          <table:table-cell office:value-type="float" office:value="162.8846302">
            <text:p>162,8846302</text:p>
          </table:table-cell>
          <table:table-cell office:value-type="float" office:value="162.4560105">
            <text:p>162,4560105</text:p>
          </table:table-cell>
          <table:table-cell office:value-type="float" office:value="164.1553876">
            <text:p>164,1553876</text:p>
          </table:table-cell>
          <table:table-cell office:value-type="float" office:value="164.389631">
            <text:p>164,389631</text:p>
          </table:table-cell>
          <table:table-cell office:value-type="float" office:value="167.5775909">
            <text:p>167,5775909</text:p>
          </table:table-cell>
          <table:table-cell office:value-type="float" office:value="166.2420648">
            <text:p>166,2420648</text:p>
          </table:table-cell>
          <table:table-cell office:value-type="float" office:value="166.1945338">
            <text:p>166,1945338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65.0070096">
            <text:p>165,0070096</text:p>
          </table:table-cell>
          <table:table-cell office:value-type="float" office:value="164.6377073">
            <text:p>164,6377073</text:p>
          </table:table-cell>
          <table:table-cell office:value-type="float" office:value="165.3638672">
            <text:p>165,3638672</text:p>
          </table:table-cell>
          <table:table-cell office:value-type="float" office:value="163.9587796">
            <text:p>163,9587796</text:p>
          </table:table-cell>
          <table:table-cell office:value-type="float" office:value="166.1139011">
            <text:p>166,1139011</text:p>
          </table:table-cell>
          <table:table-cell office:value-type="float" office:value="163.625582">
            <text:p>163,625582</text:p>
          </table:table-cell>
          <table:table-cell office:value-type="float" office:value="168.8630401">
            <text:p>168,8630401</text:p>
          </table:table-cell>
          <table:table-cell office:value-type="float" office:value="163.932386">
            <text:p>163,932386</text:p>
          </table:table-cell>
          <table:table-cell office:value-type="float" office:value="162.9361919">
            <text:p>162,9361919</text:p>
          </table:table-cell>
          <table:table-cell office:value-type="float" office:value="162.5106943">
            <text:p>162,5106943</text:p>
          </table:table-cell>
          <table:table-cell office:value-type="float" office:value="164.2247984">
            <text:p>164,2247984</text:p>
          </table:table-cell>
          <table:table-cell office:value-type="float" office:value="164.4513522">
            <text:p>164,4513522</text:p>
          </table:table-cell>
          <table:table-cell office:value-type="float" office:value="167.550085">
            <text:p>167,550085</text:p>
          </table:table-cell>
          <table:table-cell office:value-type="float" office:value="166.1995334">
            <text:p>166,1995334</text:p>
          </table:table-cell>
          <table:table-cell office:value-type="float" office:value="166.1443506">
            <text:p>166,1443506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64.9750338">
            <text:p>164,9750338</text:p>
          </table:table-cell>
          <table:table-cell office:value-type="float" office:value="164.665947">
            <text:p>164,665947</text:p>
          </table:table-cell>
          <table:table-cell office:value-type="float" office:value="165.3785285">
            <text:p>165,3785285</text:p>
          </table:table-cell>
          <table:table-cell office:value-type="float" office:value="164.0001926">
            <text:p>164,0001926</text:p>
          </table:table-cell>
          <table:table-cell office:value-type="float" office:value="166.0958651">
            <text:p>166,0958651</text:p>
          </table:table-cell>
          <table:table-cell office:value-type="float" office:value="163.7210051">
            <text:p>163,7210051</text:p>
          </table:table-cell>
          <table:table-cell office:value-type="float" office:value="168.852843">
            <text:p>168,852843</text:p>
          </table:table-cell>
          <table:table-cell office:value-type="float" office:value="163.892153">
            <text:p>163,892153</text:p>
          </table:table-cell>
          <table:table-cell office:value-type="float" office:value="162.9857499">
            <text:p>162,9857499</text:p>
          </table:table-cell>
          <table:table-cell office:value-type="float" office:value="162.5643795">
            <text:p>162,5643795</text:p>
          </table:table-cell>
          <table:table-cell office:value-type="float" office:value="164.2921366">
            <text:p>164,2921366</text:p>
          </table:table-cell>
          <table:table-cell office:value-type="float" office:value="164.5141269">
            <text:p>164,5141269</text:p>
          </table:table-cell>
          <table:table-cell office:value-type="float" office:value="167.5231916">
            <text:p>167,5231916</text:p>
          </table:table-cell>
          <table:table-cell office:value-type="float" office:value="166.1573753">
            <text:p>166,1573753</text:p>
          </table:table-cell>
          <table:table-cell office:value-type="float" office:value="166.0946747">
            <text:p>166,0946747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64.9424539">
            <text:p>164,9424539</text:p>
          </table:table-cell>
          <table:table-cell office:value-type="float" office:value="164.6926241">
            <text:p>164,6926241</text:p>
          </table:table-cell>
          <table:table-cell office:value-type="float" office:value="165.3934376">
            <text:p>165,3934376</text:p>
          </table:table-cell>
          <table:table-cell office:value-type="float" office:value="164.0424445">
            <text:p>164,0424445</text:p>
          </table:table-cell>
          <table:table-cell office:value-type="float" office:value="166.076901">
            <text:p>166,076901</text:p>
          </table:table-cell>
          <table:table-cell office:value-type="float" office:value="163.8147993">
            <text:p>163,8147993</text:p>
          </table:table-cell>
          <table:table-cell office:value-type="float" office:value="168.8425093">
            <text:p>168,8425093</text:p>
          </table:table-cell>
          <table:table-cell office:value-type="float" office:value="163.8515865">
            <text:p>163,8515865</text:p>
          </table:table-cell>
          <table:table-cell office:value-type="float" office:value="163.033384">
            <text:p>163,033384</text:p>
          </table:table-cell>
          <table:table-cell office:value-type="float" office:value="162.6169432">
            <text:p>162,6169432</text:p>
          </table:table-cell>
          <table:table-cell office:value-type="float" office:value="164.3573476">
            <text:p>164,3573476</text:p>
          </table:table-cell>
          <table:table-cell office:value-type="float" office:value="164.5769983">
            <text:p>164,5769983</text:p>
          </table:table-cell>
          <table:table-cell office:value-type="float" office:value="167.4959618">
            <text:p>167,4959618</text:p>
          </table:table-cell>
          <table:table-cell office:value-type="float" office:value="166.1146797">
            <text:p>166,1146797</text:p>
          </table:table-cell>
          <table:table-cell office:value-type="float" office:value="166.0446149">
            <text:p>166,0446149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64.9084548">
            <text:p>164,9084548</text:p>
          </table:table-cell>
          <table:table-cell office:value-type="float" office:value="164.7171343">
            <text:p>164,7171343</text:p>
          </table:table-cell>
          <table:table-cell office:value-type="float" office:value="165.4071299">
            <text:p>165,4071299</text:p>
          </table:table-cell>
          <table:table-cell office:value-type="float" office:value="164.0841337">
            <text:p>164,0841337</text:p>
          </table:table-cell>
          <table:table-cell office:value-type="float" office:value="166.0560823">
            <text:p>166,0560823</text:p>
          </table:table-cell>
          <table:table-cell office:value-type="float" office:value="163.9068312">
            <text:p>163,9068312</text:p>
          </table:table-cell>
          <table:table-cell office:value-type="float" office:value="168.830825">
            <text:p>168,830825</text:p>
          </table:table-cell>
          <table:table-cell office:value-type="float" office:value="163.8094112">
            <text:p>163,8094112</text:p>
          </table:table-cell>
          <table:table-cell office:value-type="float" office:value="163.0783843">
            <text:p>163,0783843</text:p>
          </table:table-cell>
          <table:table-cell office:value-type="float" office:value="162.6676856">
            <text:p>162,6676856</text:p>
          </table:table-cell>
          <table:table-cell office:value-type="float" office:value="164.4199121">
            <text:p>164,4199121</text:p>
          </table:table-cell>
          <table:table-cell office:value-type="float" office:value="164.6386509">
            <text:p>164,6386509</text:p>
          </table:table-cell>
          <table:table-cell office:value-type="float" office:value="167.4671569">
            <text:p>167,4671569</text:p>
          </table:table-cell>
          <table:table-cell office:value-type="float" office:value="166.0707018">
            <text:p>166,0707018</text:p>
          </table:table-cell>
          <table:table-cell office:value-type="float" office:value="165.9932155">
            <text:p>165,9932155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64.8735288">
            <text:p>164,8735288</text:p>
          </table:table-cell>
          <table:table-cell office:value-type="float" office:value="164.7396521">
            <text:p>164,7396521</text:p>
          </table:table-cell>
          <table:table-cell office:value-type="float" office:value="165.4195444">
            <text:p>165,4195444</text:p>
          </table:table-cell>
          <table:table-cell office:value-type="float" office:value="164.1249506">
            <text:p>164,1249506</text:p>
          </table:table-cell>
          <table:table-cell office:value-type="float" office:value="166.0339141">
            <text:p>166,0339141</text:p>
          </table:table-cell>
          <table:table-cell office:value-type="float" office:value="163.996627">
            <text:p>163,996627</text:p>
          </table:table-cell>
          <table:table-cell office:value-type="float" office:value="168.8180307">
            <text:p>168,8180307</text:p>
          </table:table-cell>
          <table:table-cell office:value-type="float" office:value="163.7661909">
            <text:p>163,7661909</text:p>
          </table:table-cell>
          <table:table-cell office:value-type="float" office:value="163.1210348">
            <text:p>163,1210348</text:p>
          </table:table-cell>
          <table:table-cell office:value-type="float" office:value="162.7165148">
            <text:p>162,7165148</text:p>
          </table:table-cell>
          <table:table-cell office:value-type="float" office:value="164.4798509">
            <text:p>164,4798509</text:p>
          </table:table-cell>
          <table:table-cell office:value-type="float" office:value="164.6992079">
            <text:p>164,6992079</text:p>
          </table:table-cell>
          <table:table-cell office:value-type="float" office:value="167.4370544">
            <text:p>167,4370544</text:p>
          </table:table-cell>
          <table:table-cell office:value-type="float" office:value="166.0254687">
            <text:p>166,0254687</text:p>
          </table:table-cell>
          <table:table-cell office:value-type="float" office:value="165.9407878">
            <text:p>165,940787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64.8373249">
            <text:p>164,8373249</text:p>
          </table:table-cell>
          <table:table-cell office:value-type="float" office:value="164.7602699">
            <text:p>164,7602699</text:p>
          </table:table-cell>
          <table:table-cell office:value-type="float" office:value="165.4302173">
            <text:p>165,4302173</text:p>
          </table:table-cell>
          <table:table-cell office:value-type="float" office:value="164.1646187">
            <text:p>164,1646187</text:p>
          </table:table-cell>
          <table:table-cell office:value-type="float" office:value="166.0099675">
            <text:p>166,0099675</text:p>
          </table:table-cell>
          <table:table-cell office:value-type="float" office:value="164.0843612">
            <text:p>164,0843612</text:p>
          </table:table-cell>
          <table:table-cell office:value-type="float" office:value="168.8039163">
            <text:p>168,8039163</text:p>
          </table:table-cell>
          <table:table-cell office:value-type="float" office:value="163.7214633">
            <text:p>163,7214633</text:p>
          </table:table-cell>
          <table:table-cell office:value-type="float" office:value="163.1612601">
            <text:p>163,1612601</text:p>
          </table:table-cell>
          <table:table-cell office:value-type="float" office:value="162.7634591">
            <text:p>162,7634591</text:p>
          </table:table-cell>
          <table:table-cell office:value-type="float" office:value="164.5375586">
            <text:p>164,5375586</text:p>
          </table:table-cell>
          <table:table-cell office:value-type="float" office:value="164.7585447">
            <text:p>164,7585447</text:p>
          </table:table-cell>
          <table:table-cell office:value-type="float" office:value="167.4053335">
            <text:p>167,4053335</text:p>
          </table:table-cell>
          <table:table-cell office:value-type="float" office:value="165.9786891">
            <text:p>165,9786891</text:p>
          </table:table-cell>
          <table:table-cell office:value-type="float" office:value="165.8869636">
            <text:p>165,8869636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64.8013679">
            <text:p>164,8013679</text:p>
          </table:table-cell>
          <table:table-cell office:value-type="float" office:value="164.7806839">
            <text:p>164,7806839</text:p>
          </table:table-cell>
          <table:table-cell office:value-type="float" office:value="165.4409483">
            <text:p>165,4409483</text:p>
          </table:table-cell>
          <table:table-cell office:value-type="float" office:value="164.2048218">
            <text:p>164,2048218</text:p>
          </table:table-cell>
          <table:table-cell office:value-type="float" office:value="165.9858166">
            <text:p>165,9858166</text:p>
          </table:table-cell>
          <table:table-cell office:value-type="float" office:value="164.1716899">
            <text:p>164,1716899</text:p>
          </table:table-cell>
          <table:table-cell office:value-type="float" office:value="168.7899002">
            <text:p>168,7899002</text:p>
          </table:table-cell>
          <table:table-cell office:value-type="float" office:value="163.6766789">
            <text:p>163,6766789</text:p>
          </table:table-cell>
          <table:table-cell office:value-type="float" office:value="163.2010006">
            <text:p>163,2010006</text:p>
          </table:table-cell>
          <table:table-cell office:value-type="float" office:value="162.8101722">
            <text:p>162,8101722</text:p>
          </table:table-cell>
          <table:table-cell office:value-type="float" office:value="164.5942914">
            <text:p>164,5942914</text:p>
          </table:table-cell>
          <table:table-cell office:value-type="float" office:value="164.8179884">
            <text:p>164,8179884</text:p>
          </table:table-cell>
          <table:table-cell office:value-type="float" office:value="167.3734948">
            <text:p>167,3734948</text:p>
          </table:table-cell>
          <table:table-cell office:value-type="float" office:value="165.9317766">
            <text:p>165,9317766</text:p>
          </table:table-cell>
          <table:table-cell office:value-type="float" office:value="165.8333143">
            <text:p>165,8333143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64.7655806">
            <text:p>164,7655806</text:p>
          </table:table-cell>
          <table:table-cell office:value-type="float" office:value="164.801069">
            <text:p>164,801069</text:p>
          </table:table-cell>
          <table:table-cell office:value-type="float" office:value="165.4515421">
            <text:p>165,4515421</text:p>
          </table:table-cell>
          <table:table-cell office:value-type="float" office:value="164.2450103">
            <text:p>164,2450103</text:p>
          </table:table-cell>
          <table:table-cell office:value-type="float" office:value="165.9616327">
            <text:p>165,9616327</text:p>
          </table:table-cell>
          <table:table-cell office:value-type="float" office:value="164.2591696">
            <text:p>164,2591696</text:p>
          </table:table-cell>
          <table:table-cell office:value-type="float" office:value="168.775987">
            <text:p>168,775987</text:p>
          </table:table-cell>
          <table:table-cell office:value-type="float" office:value="163.6320061">
            <text:p>163,6320061</text:p>
          </table:table-cell>
          <table:table-cell office:value-type="float" office:value="163.240556">
            <text:p>163,240556</text:p>
          </table:table-cell>
          <table:table-cell office:value-type="float" office:value="162.8568966">
            <text:p>162,8568966</text:p>
          </table:table-cell>
          <table:table-cell office:value-type="float" office:value="164.6505295">
            <text:p>164,6505295</text:p>
          </table:table-cell>
          <table:table-cell office:value-type="float" office:value="164.8773927">
            <text:p>164,8773927</text:p>
          </table:table-cell>
          <table:table-cell office:value-type="float" office:value="167.3416643">
            <text:p>167,3416643</text:p>
          </table:table-cell>
          <table:table-cell office:value-type="float" office:value="165.8848971">
            <text:p>165,8848971</text:p>
          </table:table-cell>
          <table:table-cell office:value-type="float" office:value="165.7799591">
            <text:p>165,7799591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64.7297321">
            <text:p>164,7297321</text:p>
          </table:table-cell>
          <table:table-cell office:value-type="float" office:value="164.8215348">
            <text:p>164,8215348</text:p>
          </table:table-cell>
          <table:table-cell office:value-type="float" office:value="165.4619593">
            <text:p>165,4619593</text:p>
          </table:table-cell>
          <table:table-cell office:value-type="float" office:value="164.2850095">
            <text:p>164,2850095</text:p>
          </table:table-cell>
          <table:table-cell office:value-type="float" office:value="165.9372954">
            <text:p>165,9372954</text:p>
          </table:table-cell>
          <table:table-cell office:value-type="float" office:value="164.3468908">
            <text:p>164,3468908</text:p>
          </table:table-cell>
          <table:table-cell office:value-type="float" office:value="168.7618574">
            <text:p>168,7618574</text:p>
          </table:table-cell>
          <table:table-cell office:value-type="float" office:value="163.5874308">
            <text:p>163,5874308</text:p>
          </table:table-cell>
          <table:table-cell office:value-type="float" office:value="163.2802495">
            <text:p>163,2802495</text:p>
          </table:table-cell>
          <table:table-cell office:value-type="float" office:value="162.9038837">
            <text:p>162,9038837</text:p>
          </table:table-cell>
          <table:table-cell office:value-type="float" office:value="164.7066002">
            <text:p>164,7066002</text:p>
          </table:table-cell>
          <table:table-cell office:value-type="float" office:value="164.9369279">
            <text:p>164,9369279</text:p>
          </table:table-cell>
          <table:table-cell office:value-type="float" office:value="167.3098335">
            <text:p>167,3098335</text:p>
          </table:table-cell>
          <table:table-cell office:value-type="float" office:value="165.8382852">
            <text:p>165,8382852</text:p>
          </table:table-cell>
          <table:table-cell office:value-type="float" office:value="165.7265048">
            <text:p>165,7265048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64.6936354">
            <text:p>164,6936354</text:p>
          </table:table-cell>
          <table:table-cell office:value-type="float" office:value="164.8415444">
            <text:p>164,8415444</text:p>
          </table:table-cell>
          <table:table-cell office:value-type="float" office:value="165.4718516">
            <text:p>165,4718516</text:p>
          </table:table-cell>
          <table:table-cell office:value-type="float" office:value="164.3240663">
            <text:p>164,3240663</text:p>
          </table:table-cell>
          <table:table-cell office:value-type="float" office:value="165.9127431">
            <text:p>165,9127431</text:p>
          </table:table-cell>
          <table:table-cell office:value-type="float" office:value="164.4341636">
            <text:p>164,4341636</text:p>
          </table:table-cell>
          <table:table-cell office:value-type="float" office:value="168.7474592">
            <text:p>168,7474592</text:p>
          </table:table-cell>
          <table:table-cell office:value-type="float" office:value="163.542441">
            <text:p>163,542441</text:p>
          </table:table-cell>
          <table:table-cell office:value-type="float" office:value="163.319335">
            <text:p>163,319335</text:p>
          </table:table-cell>
          <table:table-cell office:value-type="float" office:value="162.9505218">
            <text:p>162,9505218</text:p>
          </table:table-cell>
          <table:table-cell office:value-type="float" office:value="164.7622319">
            <text:p>164,7622319</text:p>
          </table:table-cell>
          <table:table-cell office:value-type="float" office:value="164.995875">
            <text:p>164,995875</text:p>
          </table:table-cell>
          <table:table-cell office:value-type="float" office:value="167.2777669">
            <text:p>167,2777669</text:p>
          </table:table-cell>
          <table:table-cell office:value-type="float" office:value="165.7914629">
            <text:p>165,7914629</text:p>
          </table:table-cell>
          <table:table-cell office:value-type="float" office:value="165.6725432">
            <text:p>165,6725432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64.6574267">
            <text:p>164,6574267</text:p>
          </table:table-cell>
          <table:table-cell office:value-type="float" office:value="164.8617375">
            <text:p>164,8617375</text:p>
          </table:table-cell>
          <table:table-cell office:value-type="float" office:value="165.4815348">
            <text:p>165,4815348</text:p>
          </table:table-cell>
          <table:table-cell office:value-type="float" office:value="164.3630455">
            <text:p>164,3630455</text:p>
          </table:table-cell>
          <table:table-cell office:value-type="float" office:value="165.8882431">
            <text:p>165,8882431</text:p>
          </table:table-cell>
          <table:table-cell office:value-type="float" office:value="164.5216085">
            <text:p>164,5216085</text:p>
          </table:table-cell>
          <table:table-cell office:value-type="float" office:value="168.7330205">
            <text:p>168,7330205</text:p>
          </table:table-cell>
          <table:table-cell office:value-type="float" office:value="163.4975489">
            <text:p>163,4975489</text:p>
          </table:table-cell>
          <table:table-cell office:value-type="float" office:value="163.3585462">
            <text:p>163,3585462</text:p>
          </table:table-cell>
          <table:table-cell office:value-type="float" office:value="162.9975265">
            <text:p>162,9975265</text:p>
          </table:table-cell>
          <table:table-cell office:value-type="float" office:value="164.8182556">
            <text:p>164,8182556</text:p>
          </table:table-cell>
          <table:table-cell office:value-type="float" office:value="165.0547489">
            <text:p>165,0547489</text:p>
          </table:table-cell>
          <table:table-cell office:value-type="float" office:value="167.2457085">
            <text:p>167,2457085</text:p>
          </table:table-cell>
          <table:table-cell office:value-type="float" office:value="165.7445047">
            <text:p>165,7445047</text:p>
          </table:table-cell>
          <table:table-cell office:value-type="float" office:value="165.618782">
            <text:p>165,618782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64.6209454">
            <text:p>164,6209454</text:p>
          </table:table-cell>
          <table:table-cell office:value-type="float" office:value="164.8815932">
            <text:p>164,8815932</text:p>
          </table:table-cell>
          <table:table-cell office:value-type="float" office:value="165.4911355">
            <text:p>165,4911355</text:p>
          </table:table-cell>
          <table:table-cell office:value-type="float" office:value="164.4020547">
            <text:p>164,4020547</text:p>
          </table:table-cell>
          <table:table-cell office:value-type="float" office:value="165.8635947">
            <text:p>165,8635947</text:p>
          </table:table-cell>
          <table:table-cell office:value-type="float" office:value="164.6091934">
            <text:p>164,6091934</text:p>
          </table:table-cell>
          <table:table-cell office:value-type="float" office:value="168.7185794">
            <text:p>168,7185794</text:p>
          </table:table-cell>
          <table:table-cell office:value-type="float" office:value="163.4526375">
            <text:p>163,4526375</text:p>
          </table:table-cell>
          <table:table-cell office:value-type="float" office:value="163.3978007">
            <text:p>163,3978007</text:p>
          </table:table-cell>
          <table:table-cell office:value-type="float" office:value="163.0445808">
            <text:p>163,0445808</text:p>
          </table:table-cell>
          <table:table-cell office:value-type="float" office:value="164.8744011">
            <text:p>164,8744011</text:p>
          </table:table-cell>
          <table:table-cell office:value-type="float" office:value="165.1137476">
            <text:p>165,1137476</text:p>
          </table:table-cell>
          <table:table-cell office:value-type="float" office:value="167.2137607">
            <text:p>167,2137607</text:p>
          </table:table-cell>
          <table:table-cell office:value-type="float" office:value="165.697469">
            <text:p>165,697469</text:p>
          </table:table-cell>
          <table:table-cell office:value-type="float" office:value="165.5649024">
            <text:p>165,56490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/08/2019</text:date>, <text:time>12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9:29:53.33</meta:creation-date>
    <dc:date>2019-08-15T12:46:49.53</dc:date>
    <meta:editing-duration>PT3H16M33S</meta:editing-duration>
    <meta:editing-cycles>44</meta:editing-cycles>
    <meta:generator>OpenOffice/4.1.6$Win32 OpenOffice.org_project/416m1$Build-9790</meta:generator>
    <meta:document-statistic meta:table-count="2" meta:cell-count="3294" meta:object-count="0"/>
  </office:meta>
</office:document-meta>
</file>